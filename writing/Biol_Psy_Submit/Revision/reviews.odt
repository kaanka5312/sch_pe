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13" manifest:media-type=""/>
  <manifest:file-entry manifest:full-path="ObjectReplacements/Object 3"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14" manifest:media-type=""/>
  <manifest:file-entry manifest:full-path="ObjectReplacements/Object 12" manifest:media-type=""/>
  <manifest:file-entry manifest:full-path="ObjectReplacements/Object 11" manifest:media-type=""/>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Thumbnails/thumbnail.png" manifest:media-type="image/png"/>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Helvetica Neue" svg:font-family="'Helvetica Neue'"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paragraph-rsid="001d386f"/>
    </style:style>
    <style:style style:name="P2" style:family="paragraph" style:parent-style-name="Text_20_body">
      <style:text-properties officeooo:paragraph-rsid="001d386f"/>
    </style:style>
    <style:style style:name="P3" style:family="paragraph" style:parent-style-name="Text_20_body">
      <style:text-properties style:font-name="Arial" officeooo:paragraph-rsid="001d386f"/>
    </style:style>
    <style:style style:name="P4" style:family="paragraph" style:parent-style-name="Text_20_body" style:list-style-name="L1">
      <style:text-properties fo:color="#2a6099" loext:opacity="100%" style:font-name="Helvetica Neue" fo:font-size="12pt" officeooo:rsid="002a1424" officeooo:paragraph-rsid="002a1424" style:font-size-asian="12pt" style:font-size-complex="12pt"/>
    </style:style>
    <style:style style:name="P5" style:family="paragraph" style:parent-style-name="Text_20_body">
      <style:text-properties officeooo:rsid="001e12ef" officeooo:paragraph-rsid="001e12ef"/>
    </style:style>
    <style:style style:name="P6" style:family="paragraph" style:parent-style-name="Text_20_body">
      <style:text-properties style:font-name="Arial" officeooo:rsid="001e12ef" officeooo:paragraph-rsid="001fbe2d"/>
    </style:style>
    <style:style style:name="P7" style:family="paragraph" style:parent-style-name="Text_20_body" style:list-style-name="L2">
      <style:text-properties fo:color="#2a6099" loext:opacity="100%" style:font-name="Helvetica Neue" fo:font-size="12pt" officeooo:rsid="001ffef4" officeooo:paragraph-rsid="001ffef4" style:font-size-asian="12pt" style:font-name-complex="Arial1" style:font-size-complex="12pt"/>
    </style:style>
    <style:style style:name="P8" style:family="paragraph" style:parent-style-name="Text_20_body">
      <style:text-properties style:font-name="Arial" fo:font-size="12pt" officeooo:rsid="001e12ef" officeooo:paragraph-rsid="002b2a9b" style:font-size-asian="12pt" style:font-size-complex="12pt"/>
    </style:style>
    <style:style style:name="P9" style:family="paragraph" style:parent-style-name="Standard" style:list-style-name="L3">
      <style:paragraph-properties fo:text-align="justify" style:justify-single-word="false" loext:word-spacing-minimum="75%" loext:word-spacing-maximum="133%"/>
      <style:text-properties fo:color="#3465a4" loext:opacity="100%" style:font-name="Helvetica Neue" fo:font-size="12pt" officeooo:paragraph-rsid="002c8cee" style:font-size-asian="12pt" style:font-size-complex="12pt"/>
    </style:style>
    <style:style style:name="P10" style:family="paragraph" style:parent-style-name="Text_20_body" style:list-style-name="L4">
      <style:text-properties style:font-name="Arial" fo:font-size="12pt" officeooo:paragraph-rsid="0020ce2c" style:font-size-asian="12pt" style:font-size-complex="12pt"/>
    </style:style>
    <style:style style:name="P11" style:family="paragraph" style:parent-style-name="Text_20_body">
      <style:text-properties fo:color="#000000" loext:opacity="100%" style:font-name="Arial" fo:font-style="normal" officeooo:rsid="001e12ef" officeooo:paragraph-rsid="0022aea5" style:font-style-asian="normal" style:font-style-complex="normal"/>
    </style:style>
    <style:style style:name="P12" style:family="paragraph" style:parent-style-name="Standard" style:list-style-name="L5">
      <style:paragraph-properties fo:margin-top="0in" fo:margin-bottom="0.1665in" style:contextual-spacing="false" fo:text-align="justify" style:justify-single-word="false" loext:word-spacing-minimum="75%" loext:word-spacing-maximum="133%"/>
      <style:text-properties fo:color="#3465a4" loext:opacity="100%" style:font-name="Helvetica Neue" fo:font-size="12pt" officeooo:paragraph-rsid="002dc141" style:font-size-asian="12pt" style:font-size-complex="12pt"/>
    </style:style>
    <style:style style:name="P13" style:family="paragraph" style:parent-style-name="Standard" style:list-style-name="L5">
      <style:text-properties fo:color="#3465a4" loext:opacity="100%" style:font-name="Helvetica Neue" fo:font-size="12pt" officeooo:paragraph-rsid="002dc141" style:font-size-asian="12pt" style:font-size-complex="12pt"/>
    </style:style>
    <style:style style:name="P14" style:family="paragraph" style:parent-style-name="Standard" style:list-style-name="L5">
      <style:text-properties fo:font-size="10pt" officeooo:paragraph-rsid="002dc141" style:font-size-asian="10pt" style:font-size-complex="10pt"/>
    </style:style>
    <style:style style:name="P15" style:family="paragraph" style:parent-style-name="Heading_20_1">
      <style:text-properties officeooo:paragraph-rsid="001e12ef"/>
    </style:style>
    <style:style style:name="P16" style:family="paragraph" style:parent-style-name="Text_20_body">
      <style:text-properties officeooo:paragraph-rsid="001e12ef"/>
    </style:style>
    <style:style style:name="P17" style:family="paragraph" style:parent-style-name="Text_20_body" style:list-style-name="L4">
      <style:text-properties fo:color="#0e0e0e" loext:opacity="100%" style:font-name="Arial" fo:font-size="10pt" fo:font-weight="normal" officeooo:rsid="0020ce2c" officeooo:paragraph-rsid="0020ce2c" fo:background-color="#ffff00" style:font-name-asian="Helvetica Neue1" style:font-size-asian="10pt" style:font-weight-asian="normal" style:font-name-complex="Helvetica Neue1" style:font-size-complex="10pt" style:font-weight-complex="normal"/>
    </style:style>
    <style:style style:name="P18" style:family="paragraph" style:parent-style-name="Text_20_body">
      <style:text-properties style:font-name="Arial" officeooo:rsid="001e12ef" officeooo:paragraph-rsid="001e12ef"/>
    </style:style>
    <style:style style:name="P19" style:family="paragraph" style:parent-style-name="Standard">
      <style:text-properties officeooo:rsid="001e12ef" officeooo:paragraph-rsid="001e12ef"/>
    </style:style>
    <style:style style:name="P20" style:family="paragraph" style:parent-style-name="Standard">
      <style:text-properties fo:font-style="italic" officeooo:rsid="001e12ef" officeooo:paragraph-rsid="001e12ef" style:font-style-asian="italic" style:font-style-complex="italic"/>
    </style:style>
    <style:style style:name="P21" style:family="paragraph" style:parent-style-name="Standard">
      <style:text-properties officeooo:paragraph-rsid="001e12ef"/>
    </style:style>
    <style:style style:name="P22" style:family="paragraph" style:parent-style-name="Standard">
      <style:text-properties style:font-name="Arial" officeooo:rsid="001e12ef" officeooo:paragraph-rsid="001e12ef"/>
    </style:style>
    <style:style style:name="P23" style:family="paragraph" style:parent-style-name="Standard" style:list-style-name="L6">
      <style:text-properties fo:color="#2a6099" loext:opacity="100%" style:font-name="Arial" fo:font-size="12pt" officeooo:rsid="001e12ef" officeooo:paragraph-rsid="0021145a" style:font-size-asian="12pt" style:font-size-complex="12pt"/>
    </style:style>
    <style:style style:name="P24" style:family="paragraph" style:parent-style-name="Standard">
      <style:text-properties style:font-name="Arial" fo:font-size="12pt" officeooo:rsid="001e12ef" officeooo:paragraph-rsid="001e12ef" style:font-size-asian="12pt" style:font-size-complex="12pt"/>
    </style:style>
    <style:style style:name="P25" style:family="paragraph" style:parent-style-name="Standard">
      <style:text-properties style:font-name="Arial" fo:font-size="10pt" officeooo:rsid="001e12ef" officeooo:paragraph-rsid="001e12ef" style:font-size-asian="10pt" style:font-size-complex="10pt"/>
    </style:style>
    <style:style style:name="P26" style:family="paragraph" style:parent-style-name="Standard">
      <style:text-properties style:font-name="Arial" officeooo:paragraph-rsid="001e12ef"/>
    </style:style>
    <style:style style:name="P27" style:family="paragraph" style:parent-style-name="Standard" style:list-style-name="L7">
      <style:paragraph-properties fo:margin-top="0.111in" fo:margin-bottom="0.0555in" style:contextual-spacing="false" fo:line-height="116%" fo:text-align="justify" style:justify-single-word="false" fo:keep-together="always" fo:keep-with-next="always" loext:word-spacing-minimum="75%" loext:word-spacing-maximum="133%"/>
      <style:text-properties fo:color="#2a6099" loext:opacity="100%" style:font-name="Arial" fo:font-size="12pt" fo:font-weight="normal" officeooo:paragraph-rsid="00212cf3" style:font-size-asian="12pt" style:font-weight-asian="normal" style:font-size-complex="12pt" style:font-weight-complex="normal"/>
    </style:style>
    <style:style style:name="P28" style:family="paragraph" style:parent-style-name="Standard">
      <style:text-properties fo:font-style="normal" officeooo:rsid="001e12ef" officeooo:paragraph-rsid="001e12ef" style:font-style-asian="normal" style:font-style-complex="normal"/>
    </style:style>
    <style:style style:name="P29" style:family="paragraph" style:parent-style-name="Standard" style:list-style-name="L8">
      <style:text-properties fo:color="#2a6099" loext:opacity="100%" style:font-name="Arial" fo:font-size="10pt" fo:font-style="normal" officeooo:rsid="001e12ef" officeooo:paragraph-rsid="0021f3db" style:font-size-asian="10pt" style:font-style-asian="normal" style:font-size-complex="10pt" style:font-style-complex="normal"/>
    </style:style>
    <style:style style:name="P30" style:family="paragraph" style:parent-style-name="Standard" style:list-style-name="L8">
      <style:text-properties fo:color="#2a6099" loext:opacity="100%" style:font-name="Arial" fo:font-size="12pt" fo:font-style="normal" officeooo:rsid="001e12ef" officeooo:paragraph-rsid="0021f3db" style:font-size-asian="12pt" style:font-style-asian="normal" style:font-size-complex="12pt" style:font-style-complex="normal"/>
    </style:style>
    <style:style style:name="P31" style:family="paragraph" style:parent-style-name="Standard">
      <style:text-properties style:font-name="Arial" fo:font-size="10pt" fo:font-style="normal" officeooo:rsid="001e12ef" officeooo:paragraph-rsid="001e12ef" style:font-size-asian="10pt" style:font-style-asian="normal" style:font-size-complex="10pt" style:font-style-complex="normal"/>
    </style:style>
    <style:style style:name="P32" style:family="paragraph" style:parent-style-name="Standard" style:list-style-name="L9">
      <style:paragraph-properties fo:margin-top="0.111in" fo:margin-bottom="0.0555in" style:contextual-spacing="false" fo:line-height="116%" fo:text-align="justify" style:justify-single-word="false" fo:keep-together="always" fo:keep-with-next="always" loext:word-spacing-minimum="75%" loext:word-spacing-maximum="133%"/>
      <style:text-properties officeooo:paragraph-rsid="0025a2ec"/>
    </style:style>
    <style:style style:name="P33" style:family="paragraph" style:parent-style-name="Text_20_body">
      <style:paragraph-properties fo:margin-left="0in" fo:margin-right="0in" fo:margin-top="0in" fo:margin-bottom="0.0972in" style:contextual-spacing="false" fo:line-height="114%" fo:text-indent="0in" style:auto-text-indent="false"/>
      <style:text-properties officeooo:rsid="001e12ef"/>
    </style:style>
    <style:style style:name="P34" style:family="paragraph" style:parent-style-name="Standard" style:list-style-name="L10">
      <style:paragraph-properties fo:margin-top="0.111in" fo:margin-bottom="0.0555in" style:contextual-spacing="false" fo:line-height="116%" fo:text-align="justify" style:justify-single-word="false" fo:keep-together="always" fo:keep-with-next="always" loext:word-spacing-minimum="75%" loext:word-spacing-maximum="133%"/>
      <style:text-properties fo:color="#2a6099" loext:opacity="100%" style:font-name="Helvetica Neue" fo:font-size="12pt" fo:font-weight="normal" officeooo:rsid="00212cf3" officeooo:paragraph-rsid="00264256" style:font-name-asian="Helvetica Neue1" style:font-size-asian="12pt" style:font-weight-asian="normal" style:font-name-complex="Helvetica Neue1" style:font-size-complex="12pt" style:font-weight-complex="normal"/>
    </style:style>
    <style:style style:name="P35" style:family="paragraph" style:parent-style-name="Standard" style:list-style-name="L10">
      <style:paragraph-properties fo:margin-top="0.111in" fo:margin-bottom="0.0555in" style:contextual-spacing="false" fo:line-height="116%" fo:text-align="justify" style:justify-single-word="false" loext:word-spacing-minimum="75%" loext:word-spacing-maximum="133%"/>
      <style:text-properties fo:color="#2a6099" loext:opacity="100%" style:font-name="Arial" fo:font-size="10pt" fo:font-weight="normal" officeooo:rsid="00212cf3" officeooo:paragraph-rsid="00264256" style:font-name-asian="Helvetica Neue1" style:font-size-asian="10pt" style:font-weight-asian="normal" style:font-name-complex="Helvetica Neue1" style:font-size-complex="10pt" style:font-weight-complex="normal"/>
    </style:style>
    <style:style style:name="T1" style:family="text">
      <style:text-properties officeooo:rsid="001d386f"/>
    </style:style>
    <style:style style:name="T2" style:family="text">
      <style:text-properties fo:font-style="italic" officeooo:rsid="001d386f" style:font-style-asian="italic" style:font-style-complex="italic"/>
    </style:style>
    <style:style style:name="T3" style:family="text">
      <style:text-properties fo:color="#000000" loext:opacity="100%" officeooo:rsid="002a1424"/>
    </style:style>
    <style:style style:name="T4" style:family="text">
      <style:text-properties officeooo:rsid="00077855" style:font-name-asian="Helvetica Neue1" style:font-name-complex="Helvetica Neue1"/>
    </style:style>
    <style:style style:name="T5" style:family="text">
      <style:text-properties style:font-name-asian="Helvetica Neue1" style:font-name-complex="Helvetica Neue1"/>
    </style:style>
    <style:style style:name="T6" style:family="text">
      <style:text-properties style:text-position="super 58%" style:font-name-asian="Helvetica Neue1" style:font-name-complex="Helvetica Neue1"/>
    </style:style>
    <style:style style:name="T7" style:family="text">
      <style:text-properties fo:color="#000000" loext:opacity="100%" style:font-name-asian="Helvetica Neue1" style:font-name-complex="Helvetica Neue1"/>
    </style:style>
    <style:style style:name="T8" style:family="text">
      <style:text-properties fo:color="#000000" loext:opacity="100%" officeooo:rsid="002eaea6" style:font-name-asian="Helvetica Neue1" style:font-name-complex="Helvetica Neue1"/>
    </style:style>
    <style:style style:name="T9" style:family="text">
      <style:text-properties fo:color="#000000" loext:opacity="100%" officeooo:rsid="001ffef4" style:font-name-asian="Helvetica Neue1" style:font-name-complex="Arial1"/>
    </style:style>
    <style:style style:name="T10" style:family="text">
      <style:text-properties fo:font-style="italic" style:font-style-asian="italic" style:font-style-complex="italic"/>
    </style:style>
    <style:style style:name="T11" style:family="text">
      <style:text-properties style:font-name-complex="Arial1"/>
    </style:style>
    <style:style style:name="T12" style:family="text">
      <style:text-properties officeooo:rsid="001ffef4" style:font-name-complex="Arial1"/>
    </style:style>
    <style:style style:name="T13" style:family="text">
      <style:text-properties fo:font-weight="normal" officeooo:rsid="00078f71" style:font-name-asian="Helvetica Neue1" style:font-weight-asian="normal" style:font-name-complex="Helvetica Neue1" style:font-weight-complex="normal"/>
    </style:style>
    <style:style style:name="T14" style:family="text">
      <style:text-properties fo:font-weight="normal" officeooo:rsid="0008acbf" style:font-name-asian="Helvetica Neue1" style:font-weight-asian="normal" style:font-name-complex="Helvetica Neue1" style:font-weight-complex="normal"/>
    </style:style>
    <style:style style:name="T15" style:family="text">
      <style:text-properties fo:color="#000000" loext:opacity="100%"/>
    </style:style>
    <style:style style:name="T16" style:family="text">
      <style:text-properties fo:color="#000000" loext:opacity="100%" officeooo:rsid="002ed7a8"/>
    </style:style>
    <style:style style:name="T17" style:family="text">
      <style:text-properties officeooo:rsid="002b2a9b"/>
    </style:style>
    <style:style style:name="T18" style:family="text">
      <style:text-properties officeooo:rsid="002c8cee"/>
    </style:style>
    <style:style style:name="T19" style:family="text">
      <style:text-properties fo:font-family="'Helvetica Neue'" style:font-family-generic="swiss" style:font-pitch="variable" fo:font-size="10pt" style:font-name-asian="Helvetica Neue1" style:font-size-asian="10pt" style:font-name-complex="Helvetica Neue1" style:font-size-complex="10pt"/>
    </style:style>
    <style:style style:name="T20" style:family="text">
      <style:text-properties fo:color="#000000" loext:opacity="100%" officeooo:rsid="002ed7a8" style:font-name-asian="Helvetica Neue1" style:font-name-complex="Helvetica Neue1"/>
    </style:style>
    <style:style style:name="T21" style:family="text">
      <style:text-properties fo:color="#0e0e0e" loext:opacity="100%" fo:font-weight="normal" officeooo:rsid="0020ce2c" fo:background-color="#ffff00" loext:char-shading-value="0" style:font-name-asian="Helvetica Neue1" style:font-weight-asian="normal" style:font-name-complex="Helvetica Neue1" style:font-weight-complex="normal"/>
    </style:style>
    <style:style style:name="T22" style:family="text">
      <style:text-properties officeooo:rsid="002dc141"/>
    </style:style>
    <style:style style:name="T23" style:family="text">
      <style:text-properties fo:font-size="10pt" style:font-size-asian="10pt" style:font-size-complex="10pt"/>
    </style:style>
    <style:style style:name="T24" style:family="text">
      <style:text-properties fo:font-weight="normal" style:font-weight-asian="normal" style:font-weight-complex="normal"/>
    </style:style>
    <style:style style:name="T25" style:family="text">
      <style:text-properties fo:font-variant="normal" fo:text-transform="none" style:text-position="0% 100%" fo:font-style="normal" style:text-underline-style="none" fo:font-weight="normal"/>
    </style:style>
    <style:style style:name="T26" style:family="text">
      <style:text-properties fo:color="#000000" loext:opacity="100%" officeooo:rsid="002dc141"/>
    </style:style>
    <style:style style:name="T27" style:family="text">
      <style:text-properties officeooo:rsid="001e12ef"/>
    </style:style>
    <style:style style:name="T28" style:family="text">
      <style:text-properties style:font-name="Arial"/>
    </style:style>
    <style:style style:name="T29" style:family="text">
      <style:text-properties fo:color="#2a6099" loext:opacity="100%" style:font-name="Helvetica Neue" officeooo:rsid="001ffef4" style:font-name-complex="Arial1"/>
    </style:style>
    <style:style style:name="T30" style:family="text">
      <style:text-properties fo:color="#2a6099" loext:opacity="100%" style:font-name="Helvetica Neue" fo:font-weight="normal" officeooo:rsid="000948a8" style:font-name-asian="Helvetica Neue1" style:font-weight-asian="normal" style:font-name-complex="Helvetica Neue1" style:font-weight-complex="normal"/>
    </style:style>
    <style:style style:name="T31" style:family="text">
      <style:text-properties fo:color="#2a6099" loext:opacity="100%" style:font-name="Helvetica Neue" fo:language="en" fo:country="US" fo:font-weight="normal" officeooo:rsid="000948a8" style:letter-kerning="false" style:font-name-asian="Helvetica Neue1" style:language-asian="en" style:country-asian="US" style:font-weight-asian="normal" style:font-name-complex="Helvetica Neue1" style:language-complex="ar" style:country-complex="SA" style:font-weight-complex="normal"/>
    </style:style>
    <style:style style:name="T32" style:family="text">
      <style:text-properties fo:color="#0e0e0e" loext:opacity="100%" style:font-name="Helvetica Neue" fo:font-weight="normal" officeooo:rsid="00078f71" style:font-name-asian="Helvetica Neue1" style:font-weight-asian="normal" style:font-name-complex="Helvetica Neue1" style:font-weight-complex="normal"/>
    </style:style>
    <style:style style:name="T33" style:family="text">
      <style:text-properties fo:color="#0e0e0e" loext:opacity="100%" fo:font-weight="normal" officeooo:rsid="0020ce2c" style:font-name-asian="Helvetica Neue1" style:font-weight-asian="normal" style:font-name-complex="Helvetica Neue1" style:font-weight-complex="normal"/>
    </style:style>
    <style:style style:name="T34" style:family="text">
      <style:text-properties fo:color="#0e0e0e" loext:opacity="100%" fo:font-weight="normal" officeooo:rsid="0020ce2c" fo:background-color="transparent" loext:char-shading-value="0" style:font-name-asian="Helvetica Neue1" style:font-weight-asian="normal" style:font-name-complex="Helvetica Neue1" style:font-weight-complex="normal"/>
    </style:style>
    <style:style style:name="T35" style:family="text">
      <style:text-properties fo:color="#0e0e0e" loext:opacity="100%" fo:font-weight="normal" officeooo:rsid="0030377b" fo:background-color="transparent" loext:char-shading-value="0" style:font-name-asian="Helvetica Neue1" style:font-weight-asian="normal" style:font-name-complex="Helvetica Neue1" style:font-weight-complex="normal"/>
    </style:style>
    <style:style style:name="T36" style:family="text">
      <style:text-properties style:font-name="Helvetica Neue"/>
    </style:style>
    <style:style style:name="T37" style:family="text">
      <style:text-properties fo:color="#000000" loext:opacity="100%" fo:font-family="'Helvetica Neue'" style:font-family-generic="swiss" style:font-pitch="variable" fo:font-size="10pt" fo:font-weight="bold" style:font-name-asian="Helvetica Neue1" style:font-size-asian="10pt" style:font-weight-asian="bold" style:font-name-complex="Helvetica Neue1" style:font-size-complex="10pt" style:font-weight-complex="bold"/>
    </style:style>
    <style:style style:name="T38" style:family="text">
      <style:text-properties style:font-name="Helvetica Neue" officeooo:rsid="00212cf3" style:font-name-asian="Helvetica Neue1" style:font-name-complex="Helvetica Neue1"/>
    </style:style>
    <style:style style:name="T39" style:family="text">
      <style:text-properties officeooo:rsid="00212cf3" style:font-name-asian="Helvetica Neue1" style:font-name-complex="Helvetica Neue1"/>
    </style:style>
    <style:style style:name="T40" style:family="text">
      <style:text-properties fo:color="#000000" loext:opacity="100%" officeooo:rsid="00212cf3" style:font-name-asian="Helvetica Neue1" style:font-name-complex="Helvetica Neue1"/>
    </style:style>
    <style:style style:name="T41" style:family="text">
      <style:text-properties fo:color="#000000" loext:opacity="100%" officeooo:rsid="00212cf3" fo:background-color="transparent" loext:char-shading-value="0" style:font-name-asian="Helvetica Neue1" style:font-name-complex="Helvetica Neue1"/>
    </style:style>
    <style:style style:name="T42" style:family="text">
      <style:text-properties fo:color="#000000" loext:opacity="100%" officeooo:rsid="0030377b" fo:background-color="transparent" loext:char-shading-value="0" style:font-name-asian="Helvetica Neue1" style:font-name-complex="Helvetica Neue1"/>
    </style:style>
    <style:style style:name="T43" style:family="text">
      <style:text-properties fo:font-style="normal" officeooo:rsid="001e12ef" style:font-style-asian="normal" style:font-style-complex="normal"/>
    </style:style>
    <style:style style:name="T44" style:family="text">
      <style:text-properties style:font-name="Helvetica Neue" fo:font-size="12pt" style:font-size-asian="12pt" style:font-size-complex="12pt"/>
    </style:style>
    <style:style style:name="T45" style:family="text">
      <style:text-properties style:font-name="Helvetica Neue" fo:font-size="12pt" style:font-name-asian="Helvetica Neue1" style:font-size-asian="12pt" style:font-name-complex="Helvetica Neue1" style:font-size-complex="12pt"/>
    </style:style>
    <style:style style:name="T46" style:family="text">
      <style:text-properties style:font-name="Helvetica Neue" fo:font-size="12pt" officeooo:rsid="000cb873" style:font-size-asian="12pt" style:font-size-complex="12pt"/>
    </style:style>
    <style:style style:name="T47" style:family="text">
      <style:text-properties fo:color="#000000" loext:opacity="100%" fo:font-weight="normal" officeooo:rsid="00212cf3" style:font-name-asian="Helvetica Neue1" style:font-weight-asian="normal" style:font-name-complex="Helvetica Neue1" style:font-weight-complex="normal"/>
    </style:style>
    <style:style style:name="T48" style:family="text">
      <style:text-properties fo:color="#000000" loext:opacity="100%" fo:font-size="12pt" fo:font-weight="normal" officeooo:rsid="000cb873" style:font-name-asian="Helvetica Neue1" style:font-size-asian="12pt" style:font-weight-asian="normal" style:font-name-complex="Helvetica Neue1" style:font-size-complex="12pt" style:font-weight-complex="normal"/>
    </style:style>
    <style:style style:name="T49" style:family="text">
      <style:text-properties fo:color="#000000" loext:opacity="100%" fo:font-size="12pt" fo:font-weight="normal" officeooo:rsid="00212cf3" fo:background-color="transparent" loext:char-shading-value="0" style:font-name-asian="Helvetica Neue1" style:font-size-asian="12pt" style:font-weight-asian="normal" style:font-name-complex="Helvetica Neue1" style:font-size-complex="12pt" style:font-weight-complex="normal"/>
    </style:style>
    <style:style style:name="T50" style:family="text">
      <style:text-properties fo:color="#000000" loext:opacity="100%" fo:font-size="12pt" fo:font-weight="normal" officeooo:rsid="0030377b" fo:background-color="transparent" loext:char-shading-value="0" style:font-name-asian="Helvetica Neue1" style:font-size-asian="12pt" style:font-weight-asian="normal" style:font-name-complex="Helvetica Neue1" style:font-size-complex="12pt" style:font-weight-complex="normal"/>
    </style:style>
    <style:style style:name="T51" style:family="text">
      <style:text-properties fo:font-style="normal" style:font-style-asian="normal" style:font-style-complex="normal"/>
    </style:style>
    <style:style style:name="T52" style:family="text">
      <style:text-properties fo:color="#2a6099" loext:opacity="100%" style:font-name="Helvetica Neue" fo:font-size="12pt" fo:font-weight="normal" officeooo:rsid="00212cf3" style:font-name-asian="Helvetica Neue1" style:font-size-asian="12pt" style:font-weight-asian="normal" style:font-name-complex="Helvetica Neue1" style:font-size-complex="12pt" style:font-weight-complex="normal"/>
    </style:style>
    <style:style style:name="T53" style:family="text">
      <style:text-properties fo:color="#2a6099" loext:opacity="100%" style:font-name="Arial" fo:font-size="10pt" fo:font-weight="normal" officeooo:rsid="00212cf3" style:font-name-asian="Helvetica Neue1" style:font-size-asian="10pt" style:font-weight-asian="normal" style:font-name-complex="Helvetica Neue1" style:font-size-complex="10pt" style:font-weight-complex="normal"/>
    </style:style>
    <style:style style:name="T54" style:family="text">
      <style:text-properties fo:color="#000000" loext:opacity="100%" style:font-name="Arial" fo:font-size="12pt" fo:font-weight="normal" officeooo:rsid="00212cf3" style:font-name-asian="Helvetica Neue1" style:font-size-asian="12pt" style:font-weight-asian="normal" style:font-name-complex="Helvetica Neue1" style:font-size-complex="12pt" style:font-weight-complex="normal"/>
    </style:style>
    <style:style style:name="T55" style:family="text">
      <style:text-properties fo:color="#000000" loext:opacity="100%" fo:font-family="'Helvetica Neue'" style:font-family-generic="swiss" style:font-pitch="variable" fo:font-size="12pt" fo:font-weight="normal" officeooo:rsid="00212cf3" style:font-name-asian="Helvetica Neue1" style:font-size-asian="12pt" style:font-weight-asian="normal" style:font-name-complex="Helvetica Neue1" style:font-size-complex="12pt" style:font-weight-complex="normal"/>
    </style:style>
    <style:style style:name="T56" style:family="text">
      <style:text-properties fo:color="#000000" loext:opacity="100%" style:font-name="Arial" fo:font-size="12pt" fo:font-weight="normal" officeooo:rsid="00212cf3" fo:background-color="transparent" loext:char-shading-value="0" style:font-name-asian="Helvetica Neue1" style:font-size-asian="12pt" style:font-weight-asian="normal" style:font-name-complex="Helvetica Neue1" style:font-size-complex="12pt" style:font-weight-complex="normal"/>
    </style:style>
    <style:style style:name="T57" style:family="text">
      <style:text-properties fo:color="#000000" loext:opacity="100%" style:font-name="Arial" fo:font-size="12pt" fo:font-weight="normal" officeooo:rsid="0030377b" fo:background-color="transparent" loext:char-shading-value="0" style:font-name-asian="Helvetica Neue1" style:font-size-asian="12pt" style:font-weight-asian="normal" style:font-name-complex="Helvetica Neue1" style:font-size-complex="12pt" style:font-weight-complex="normal"/>
    </style:style>
    <style:style style:name="T58" style:family="text">
      <style:text-properties fo:color="#000000" loext:opacity="100%" style:font-name="Arial" fo:font-size="12pt" fo:font-weight="normal" officeooo:rsid="0025a2ec" fo:background-color="transparent" loext:char-shading-value="0" style:font-name-asian="Helvetica Neue1" style:font-size-asian="12pt" style:font-weight-asian="normal" style:font-name-complex="Helvetica Neue1" style:font-size-complex="12pt" style:font-weight-complex="normal"/>
    </style:style>
    <style:style style:name="T59" style:family="text">
      <style:text-properties fo:font-family="'Google Sans Text', sans-serif"/>
    </style:style>
    <style:style style:name="T60" style:family="text">
      <style:text-properties fo:font-weight="bold" officeooo:rsid="00264256"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style>
    <style:style style:name="T63" style:family="text">
      <style:text-properties style:font-name="Helvetica Neue" fo:font-size="12pt" officeooo:rsid="0010eff4" style:font-size-asian="12pt" style:font-size-complex="12pt"/>
    </style:style>
    <style:style style:name="T64" style:family="text">
      <style:text-properties fo:color="#000000" loext:opacity="100%" style:font-name="Arial" fo:font-size="12pt" style:font-size-asian="12pt" style:font-size-complex="12pt"/>
    </style:style>
    <style:style style:name="T65" style:family="text">
      <style:text-properties fo:color="#000000" loext:opacity="100%" style:font-name="Arial" fo:font-size="12pt" officeooo:rsid="00264256" style:font-size-asian="12pt" style:font-size-complex="12pt"/>
    </style:style>
    <style:style style:name="T66" style:family="text">
      <style:text-properties fo:color="#000000" loext:opacity="100%" style:font-name="Arial" fo:font-size="12pt" fo:background-color="transparent" loext:char-shading-value="0" style:font-size-asian="12pt" style:font-size-complex="12pt"/>
    </style:style>
    <style:style style:name="T67" style:family="text">
      <style:text-properties fo:color="#000000" loext:opacity="100%" style:font-name="Arial" fo:font-size="12pt" officeooo:rsid="0030377b" fo:background-color="transparent" loext:char-shading-value="0" style:font-size-asian="12pt" style:font-size-complex="12pt"/>
    </style:style>
    <style:style style:name="T68" style:family="text">
      <style:text-properties fo:color="#000000" loext:opacity="100%" style:font-name="Arial" fo:font-size="12pt" officeooo:rsid="0025a2ec" fo:background-color="transparent" loext:char-shading-value="0" style:font-size-asian="12pt" style:font-size-complex="12pt"/>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Formula">
      <style:graphic-properties fo:margin-left="0in" fo:margin-right="0in" fo:margin-top="0in" fo:margin-bottom="0in" style:vertical-pos="from-top"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ents to Reviewers </text:p>
      <text:h text:style-name="P1" text:outline-level="1">Reviewer 1</text:h>
      <text:p text:style-name="P2"><text:span text:style-name="T1">Comment 1: </text:span><text:span text:style-name="T2">“In section 2.4.2, the authors state that group differences for computational parameters were assessed using non-parametric permutation tests with 10,000 samples. Please specify exactly what data points or variables were permuted during this process to ensure full reproducibility.”</text:span></text:p>
      <text:p text:style-name="P3"><text:span text:style-name="T1">Response 1: </text:span><text:s/><text:span text:style-name="T3">We thank reviewer for higlighting a point about reproducibilty .We explicitly stated that we randomized the group labels for comparing medians due to non-normal distrubition of parameters</text:span></text:p>
      <text:list text:style-name="L1">
        <text:list-item>
          <text:p text:style-name="P4"><text:span text:style-name="T4">“..G</text:span><text:span text:style-name="T5">roup differences in the computational parameters (</text:span><text:span text:style-name="T5"><draw:frame draw:style-name="fr1" draw:name="Object73" text:anchor-type="as-char" svg:width="0.1028in" svg:height="0.1854in" draw:z-index="4"><draw:object xlink:href="./Object 5" xlink:type="simple" xlink:show="embed" xlink:actuate="onLoad"/><draw:image xlink:href="./ObjectReplacements/Object 5" xlink:type="simple" xlink:show="embed" xlink:actuate="onLoad"/><svg:desc>formula</svg:desc></draw:frame></text:span><text:span text:style-name="T5">, </text:span><text:span text:style-name="T5"><draw:frame draw:style-name="fr1" draw:name="Object74" text:anchor-type="as-char" svg:width="0.1035in" svg:height="0.1854in" draw:z-index="5"><draw:object xlink:href="./Object 6" xlink:type="simple" xlink:show="embed" xlink:actuate="onLoad"/><draw:image xlink:href="./ObjectReplacements/Object 6" xlink:type="simple" xlink:show="embed" xlink:actuate="onLoad"/><svg:desc>formula</svg:desc></draw:frame></text:span><text:span text:style-name="T5">, Pseudo-R</text:span><text:span text:style-name="T6">2</text:span><text:span text:style-name="T5">) were evaluated using non-parametric permutation tests (10,000 iterations). To robustly account for the non-normal distribution of the estimates, the difference in group medians was computed through the methodological resampling of group labels...” </text:span><text:span text:style-name="T7">(Section 2.4.2, lines </text:span><text:span text:style-name="T8">212-224</text:span><text:span text:style-name="T9">)</text:span><text:span text:style-name="T7">)</text:span></text:p>
        </text:list-item>
      </text:list>
      <text:p text:style-name="P2"/>
      <text:p text:style-name="P5">Comment 2: <text:span text:style-name="T10">“In section 3.1, the text reports model-free metrics with margins. Please explicitly state in the text or figure captions whether these bounds represent Standard Deviation (SD) or Standard Error (SE).”</text:span></text:p>
      <text:p text:style-name="P6">Response 2: <text:s/><text:span text:style-name="T11">We thank the reviewer for their careful attention. </text:span><text:span text:style-name="T12">We explicitly added that we reported the results as Standard Deviation.</text:span></text:p>
      <text:list text:style-name="L2">
        <text:list-item>
          <text:p text:style-name="P7">“...<text:span text:style-name="T13">Statistical results are reported as </text:span><text:span text:style-name="T14">M</text:span><text:span text:style-name="T13">ean (</text:span><text:span text:style-name="T13"><draw:frame draw:style-name="fr2" draw:name="Object70" text:anchor-type="as-char" svg:y="-0.1492in" svg:width="0.1661in" svg:height="0.1854in" draw:z-index="0"><draw:object xlink:href="./Object 1" xlink:type="simple" xlink:show="embed" xlink:actuate="onLoad"/><draw:image xlink:href="./ObjectReplacements/Object 1" xlink:type="simple" xlink:show="embed" xlink:actuate="onLoad"/><svg:desc>formula</svg:desc></draw:frame></text:span><text:span text:style-name="T14">) and Standard Deviation (</text:span><text:span text:style-name="T14"><draw:frame draw:style-name="fr2" draw:name="Object71" text:anchor-type="as-char" svg:y="-0.1492in" svg:width="0.402in" svg:height="0.1854in" draw:z-index="1"><draw:object xlink:href="./Object 2" xlink:type="simple" xlink:show="embed" xlink:actuate="onLoad"/><draw:image xlink:href="./ObjectReplacements/Object 2" xlink:type="simple" xlink:show="embed" xlink:actuate="onLoad"/><svg:desc>formula</svg:desc></draw:frame></text:span><text:span text:style-name="T14">).</text:span>” <text:span text:style-name="T15">(3. Results, line </text:span><text:span text:style-name="T16">258</text:span><text:span text:style-name="T15">)</text:span></text:p>
        </text:list-item>
      </text:list>
      <text:p text:style-name="P5"/>
      <text:p text:style-name="P5">Comment 3: <text:span text:style-name="T10">“In section 3.4, the authors note that the regression model predicting the log-transformed inverse temperature was statistically significant, while the model predicting the learning rate was not. Please provide a brief scientific or statistical rationale within the text explaining why the log transformation was applied specifically to beta but not to alpha.”</text:span></text:p>
      <text:p text:style-name="P8">Response 3: We thank the reviewer for pointing out this omission. The decision to apply a log transformation specifically to the inverse temperature (<draw:frame draw:style-name="fr3" draw:name="Object2" text:anchor-type="as-char" svg:y="-0.1492in" svg:width="0.2547in" svg:height="0.1854in" draw:z-index="7"><draw:object xlink:href="./Object 7" xlink:type="simple" xlink:show="embed" xlink:actuate="onLoad"/><draw:image xlink:href="./ObjectReplacements/Object 7" xlink:type="simple" xlink:show="embed" xlink:actuate="onLoad"/></draw:frame>) was driven by both the theoretical bounds of the computational parameters and the statistical assumptions of Ordinary Least Squares (OLS) regression.</text:p>
      <text:p text:style-name="P8">Scientifically, the learning rate (<draw:frame draw:style-name="fr3" draw:name="Object3" text:anchor-type="as-char" svg:y="-0.1492in" svg:width="0.1028in" svg:height="0.1854in" draw:z-index="8"><draw:object xlink:href="./Object 8" xlink:type="simple" xlink:show="embed" xlink:actuate="onLoad"/><draw:image xlink:href="./ObjectReplacements/Object 8" xlink:type="simple" xlink:show="embed" xlink:actuate="onLoad"/></draw:frame>) is inherently bounded between <text:span text:style-name="T17">0</text:span> and <text:span text:style-name="T17">1</text:span>, meaning its values and variance are naturally constrained. Conversely, the inverse temperature parameter is bounded at zero but unbounded at the upper end, typically spanning multiple orders of magnitude depending on a subject's exploration/exploitation threshold.</text:p>
      <text:p text:style-name="P8">Statistically, this unbounded upper limit causes the raw inverse temperature distribution to be heavily right-skewed. When fitting our initial OLS models, diagnostic checks (e.g., <text:soft-page-break/>Omnibus and Jarque-Bera tests) revealed that the residuals for the raw inverse temperature significantly violated the assumption of normality. Log-transforming this parameter successfully corrected the positive skew, normalized the residuals, and minimized the disproportionate leverage of extreme outliers, thereby ensuring the validity of the OLS model. Because <draw:frame draw:style-name="fr3" draw:name="Object4" text:anchor-type="as-char" svg:y="-0.1492in" svg:width="0.1028in" svg:height="0.1854in" draw:z-index="6"><draw:object xlink:href="./Object 9" xlink:type="simple" xlink:show="embed" xlink:actuate="onLoad"/><draw:image xlink:href="./ObjectReplacements/Object 9" xlink:type="simple" xlink:show="embed" xlink:actuate="onLoad"/></draw:frame><text:s/>does not exhibit this extreme magnitude scaling, it did not require transformation.</text:p>
      <text:p text:style-name="P8">We have now explicitly added this rationale to Section <text:span text:style-name="T18">2</text:span>.4.<text:span text:style-name="T18">2</text:span> of the revised manuscript to ensure full methodological transparency.</text:p>
      <text:list text:style-name="L3">
        <text:list-item>
          <text:p text:style-name="P9" loext:marker-style-name="T19"><text:span text:style-name="T5">“To robustly account for the non-normal distribution of the estimates, the difference in group medians was computed through the methodological resampling of group labels. Following the assessment of main group effects, we investigated the relationship between these computational parameters and clinical symptomatology using Ordinary Least Squares (OLS) regression. Prior to these regression analyses, a log transformation was applied specifically to the inverse temperature parameter (</text:span><draw:frame draw:style-name="fr1" draw:name="Object11" text:anchor-type="as-char" svg:width="0.0791in" svg:height="0.1854in" draw:z-index="9"><draw:object xlink:href="./Object 10" xlink:type="simple" xlink:show="embed" xlink:actuate="onLoad"/><draw:image xlink:href="./ObjectReplacements/Object 10" xlink:type="simple" xlink:show="embed" xlink:actuate="onLoad"/><svg:desc>formula</svg:desc></draw:frame><text:span text:style-name="T5">). Because </text:span><draw:frame draw:style-name="fr1" draw:name="Object12" text:anchor-type="as-char" svg:width="0.0791in" svg:height="0.1854in" draw:z-index="10"><draw:object xlink:href="./Object 11" xlink:type="simple" xlink:show="embed" xlink:actuate="onLoad"/><draw:image xlink:href="./ObjectReplacements/Object 11" xlink:type="simple" xlink:show="embed" xlink:actuate="onLoad"/><svg:desc>formula</svg:desc></draw:frame><text:span text:style-name="T5"><text:s/>is theoretically unbounded at the upper end, its raw values exhibited a strong positive skew that violated the OLS assumption of normally distributed residuals. Log-transforming this parameter corrected the skew and stabilized the variance, ensuring robust model fits, whereas the naturally bounded learning rate (</text:span><draw:frame draw:style-name="fr1" draw:name="Object13" text:anchor-type="as-char" svg:width="0.1028in" svg:height="0.1854in" draw:z-index="11"><draw:object xlink:href="./Object 12" xlink:type="simple" xlink:show="embed" xlink:actuate="onLoad"/><draw:image xlink:href="./ObjectReplacements/Object 12" xlink:type="simple" xlink:show="embed" xlink:actuate="onLoad"/><svg:desc>formula</svg:desc></draw:frame><text:span text:style-name="T5">) required no such transformation.” </text:span><text:span text:style-name="T20">(lines 216 – 224)</text:span></text:p>
        </text:list-item>
      </text:list>
      <text:p text:style-name="P8"/>
      <text:list xml:id="list2391089688" text:style-name="L4">
        <text:list-header>
          <text:p text:style-name="P10"><text:span text:style-name="T21"/></text:p>
        </text:list-header>
      </text:list>
      <text:p text:style-name="P5">Comment 4: <text:span text:style-name="T10">“How do their findings stand in relation to the recently developed imprecision model of SZ and the concept of spatiotemporal psychopathology by the group around Northoff..may be a good discussion point with explicit reference..”</text:span></text:p>
      <text:p text:style-name="P11">Response 4: <text:s/><text:span text:style-name="T22">We thank reviwer <text:s/>for contribution to the discussion. We explicitly point the spatiotemporal psychopathology our relationship for the findings of temporal <text:s/>imprecision.</text:span></text:p>
      <text:list text:style-name="L5">
        <text:list-item>
          <text:p text:style-name="P12" loext:marker-style-name="T23">...“Behaviorally, standard reinforcement learning models poorly described patient choices, evidenced by severely reduced <text:span text:style-name="T5">Pseudo-R</text:span><text:span text:style-name="T6">2</text:span> and blunted learning rates <text:span text:style-name="T5">(</text:span><draw:frame draw:style-name="fr4" draw:name="Object68" text:anchor-type="as-char" svg:y="-0.1492in" svg:width="0.1028in" svg:height="0.1854in" draw:z-index="12"><draw:object xlink:href="./Object 13" xlink:type="simple" xlink:show="embed" xlink:actuate="onLoad"/><draw:image xlink:href="./ObjectReplacements/Object 13" xlink:type="simple" xlink:show="embed" xlink:actuate="onLoad"/><svg:desc>formula</svg:desc></draw:frame><text:span text:style-name="T5">). </text:span><text:s/>Strikingly, a zero-parameter null model best fit most patients, indicating a profound failure to integrate trial-by-trial social feedback. Rather than dynamically updating expected values, patient decisions were highly stochastic. This aligns with findings that schizophrenia patients exhibit fundamentally inconsistent preference judgments <text:bookmark-start text:name="ZOTERO_BREF_mPBy5hwwx8bO"/>(35)<text:bookmark-end text:name="ZOTERO_BREF_mPBy5hwwx8bO"/>, and that systemic "imprecision" might be a core pathophysiological mechanism <text:bookmark-start text:name="ZOTERO_BREF_PCStAFXMF8Au"/>(36)<text:bookmark-end text:name="ZOTERO_BREF_PCStAFXMF8Au"/>.</text:p>
          <text:p text:style-name="P13"><text:span text:style-name="T24">Importantly, our findings align closely with the recently developed concept of spatiotemporal psychopathology advanced by the group around Northoff </text:span><text:bookmark-start text:name="ZOTERO_BREF_SSvM32OwjYAp"/><text:span text:style-name="T25">(36–38)</text:span><text:bookmark-end text:name="ZOTERO_BREF_SSvM32OwjYAp"/>. Their framework conceptualizes schizophrenia fundamentally as a disorder of temporal imprecision, a deficit evident across both neural and behavioral accounts. In our Trust Game, the severe reduction in inverse temperature <text:span text:style-name="T5">(</text:span><draw:frame draw:style-name="fr4" draw:name="Object69" text:anchor-type="as-char" svg:y="-0.1492in" svg:width="0.1035in" svg:height="0.1854in" draw:z-index="13"><draw:object xlink:href="./Object 14" xlink:type="simple" xlink:show="embed" xlink:actuate="onLoad"/><draw:image xlink:href="./ObjectReplacements/Object 14" xlink:type="simple" xlink:show="embed" xlink:actuate="onLoad"/><svg:desc>formula</svg:desc></draw:frame><text:span text:style-name="T5">)</text:span>, indexing choice precision, suggests this imprecision disrupts higher-order social valuation, rendering patients incapable of utilizing positive feedback to guide consistent behavior.” <text:span text:style-name="T26">(Section 4.2, lines </text:span><text:span text:style-name="T16">379-390</text:span><text:span text:style-name="T26">)</text:span></text:p>
          <text:p text:style-name="P14"/>
        </text:list-item>
      </text:list>
      <text:p text:style-name="P5"/>
      <text:h text:style-name="P15" text:outline-level="1"><text:soft-page-break/>Reviewer <text:span text:style-name="T27">2</text:span></text:h>
      <text:p text:style-name="P16"><text:span text:style-name="T1">Comment 1: </text:span><text:span text:style-name="T2">“Please clarify how the matching procedure for age, sex and education was done.”</text:span></text:p>
      <text:p text:style-name="P16"><text:span text:style-name="T27">Response 1: </text:span><text:span text:style-name="T28">We thank the reviewer for pointing this out. We have clarified the matching procedure in the revised manuscript. Specifically, the healthy control group was matched to the schizophrenia group at the group level. To confirm the matching, we assessed group differences in continuous variables (age and years of education) using independent samples t-tests, and categorical variables (sex distribution) using a Chi-square test. These analyses confirmed that there were no significant demographic differences between the two groups.</text:span></text:p>
      <text:list text:continue-list="list2391089688" text:style-name="L4">
        <text:list-item>
          <text:p text:style-name="P10"><text:span text:style-name="T29">“...</text:span><text:span text:style-name="T30">A total of 49 right-handed healthy controls (HC) were recruited via advertisements and social media platforms. The HC group was matched to the SZ group at he group level. The equivalence between groups in terms of age, sex and years of education was confirmed using independent samples t-tests for continuous variables and Pearson</text:span><text:span text:style-name="T31">’s chi-square test for categorical variables, ensuring no significant differences (all p&gt;0.05).”</text:span><text:span text:style-name="T32"> </text:span><text:span text:style-name="T33">(2.1 Participants, </text:span><text:span text:style-name="T34">line </text:span><text:span text:style-name="T35">1</text:span><text:span text:style-name="T35">26-131</text:span><text:span text:style-name="T34">)</text:span></text:p>
          <text:p text:style-name="P17"/>
        </text:list-item>
      </text:list>
      <text:p text:style-name="P18"/>
      <text:p text:style-name="P19"><text:span text:style-name="T1">Comment </text:span>2: <text:span text:style-name="T10">“How long were patients ill? Were there any first episode patients?”</text:span></text:p>
      <text:p text:style-name="P20"/>
      <text:p text:style-name="P21"><text:span text:style-name="T27">Response 2: </text:span><text:span text:style-name="T28">We thank the reviewer for requesting this clinical clarification. The mean duration of illness for the schizophrenia cohort was 13.72 ± 10.23 years. We confirm that there were no acute first-episode patients included in this study.</text:span></text:p>
      <text:p text:style-name="P22"/>
      <text:list text:style-name="L6">
        <text:list-item>
          <text:p text:style-name="P23"><text:span text:style-name="T36">“...The mean duration of illness for the SZ group was 13.72 ± 10.23 years (see Table 1). The clinical sample consisted of individuals with a chronic course of the illness, and no first-episode patients were included.” </text:span><text:span text:style-name="T33">(2.1 Participants, </text:span><text:span text:style-name="T34">line </text:span><text:span text:style-name="T35">1</text:span><text:span text:style-name="T35">40 -142</text:span><text:span text:style-name="T34">)</text:span></text:p>
        </text:list-item>
      </text:list>
      <text:p text:style-name="P24"/>
      <text:p text:style-name="P25"/>
      <text:p text:style-name="P25"/>
      <text:p text:style-name="P25"/>
      <text:p text:style-name="P19">Comment 3: <text:span text:style-name="T10">“Has SPM12 been used, or which version?”</text:span></text:p>
      <text:p text:style-name="P19"/>
      <text:p text:style-name="P21"><text:span text:style-name="T27">Response 3: </text:span><text:span text:style-name="T28">We thank the reviewer for this question. We used the latest 2025 version of the software, which was recently renamed from “SPM12” to simply “SPM”. We have updated the manuscript to reflect this.</text:span></text:p>
      <text:p text:style-name="P26"/>
      <text:list text:style-name="L7">
        <text:list-item>
          <text:p text:style-name="P27" loext:marker-style-name="T37"><text:span text:style-name="T38">“... Standard preprocessing was conducted using the recent 2025 release of SPM, ...”</text:span><text:span text:style-name="T39"> <text:s/></text:span><text:span text:style-name="T40">(</text:span><text:span text:style-name="T7">2.5 fMRI Data Acquisition and Preprocessing, </text:span><text:span text:style-name="T41">line</text:span><text:span text:style-name="T42">s 246-247</text:span><text:span text:style-name="T41"> )</text:span></text:p>
        </text:list-item>
      </text:list>
      <text:p text:style-name="P19"/>
      <text:p text:style-name="P19"/>
      <text:p text:style-name="P19"/>
      <text:p text:style-name="P19"/>
      <text:p text:style-name="P19">Comment 4: <text:span text:style-name="T10">“Please also include details on the scanner and sequence used to obtain the BOLD signal.”</text:span></text:p>
      <text:p text:style-name="P20"><text:soft-page-break/></text:p>
      <text:p text:style-name="P21"><text:span text:style-name="T43">Response 4: </text:span><text:span text:style-name="T28">We agree with the reviewer that essential acquisition details should be available in the main text. We have now included the scanner model and the core BOLD sequence parameters (including TR, TE, flip angle, and voxel size) directly in the manuscript.</text:span></text:p>
      <text:p text:style-name="P28"/>
      <text:list text:style-name="L8">
        <text:list-item>
          <text:p text:style-name="P29"><text:span text:style-name="T44">“</text:span><text:span text:style-name="T45">Functional imaging (fMRI) was performed using a 3.0-Tesla scanner</text:span><text:span text:style-name="T44">(Siemens Magnetom Verio, Erlangen, Germany) equipped with a 12-channel head coil. </text:span><text:span text:style-name="T46">A 24-minute and 54-second task- based fMRI scan (utilizing the Trust Game paradigm) was acquired with the following core parameters: repetition time (TR) = 3000 ms, echo time (TE) = 30 ms, flip angle (FA) = 90</text:span><text:span text:style-name="T44">°, </text:span><text:span text:style-name="T46">voxel size 3x3x3 mm, matrix = 64x64, and the field of view (FOV) = 192x192 mm...” <text:s/></text:span><text:span text:style-name="T47">(</text:span><text:span text:style-name="T48">2.5 fMRI Data Acquisition and Preprocessing, </text:span><text:span text:style-name="T49">line </text:span><text:span text:style-name="T50">241-246</text:span><text:span text:style-name="T49">)</text:span></text:p>
          <text:p text:style-name="P30"/>
        </text:list-item>
      </text:list>
      <text:p text:style-name="P31"><text:s/></text:p>
      <text:p text:style-name="P28"/>
      <text:p text:style-name="P28"/>
      <text:p text:style-name="P28">Comment 5: <text:span text:style-name="T10">“Is the deficit in prediction error more related to psychopathology of patients and changes in the dopaminergic system, e.g. also a lack of confidence to others or is it more related to social withdrawal and thus reduced experience in trusting others?”</text:span></text:p>
      <text:p text:style-name="P28"/>
      <text:p text:style-name="P19"><text:span text:style-name="T51">Response 5: </text:span><text:span text:style-name="T28">We thank the reviewer for raising this insightful mechanistic question. Our clinical correlation analyses strongly support the hypothesis that this deficit is primarily related to the core psychopathology and underlying dopaminergic disruptions, rather than being a secondary consequence of social withdrawal. In our cohort, the computational impairments, specifically the profound decision imprecision and blunted prediction error signaling, correlated significantly with positive symptom severity, but were independent of negative symptoms. If the prediction error deficits were primarily driven by social withdrawal and a resulting lack of experience in trusting others, we would expect a strong correlation with the negative symptom domain (which captures asociality and withdrawal). Instead, the specific association with positive symptoms aligns with the “aberrant salience” and predictive coding frameworks of dopaminergic dysfunction. </text:span></text:p>
      <text:p text:style-name="P28"/>
      <text:list text:style-name="L9">
        <text:list-item>
          <text:p text:style-name="P32" loext:marker-style-name="T37"><text:span text:style-name="T52">“...This clinical dissociation suggests that the observed computational deficits stem from primary psychopathology rather than secondary social withdrawal. Since choice imprecision was independent of negative symptoms, blunted prediction errors do not merely reflect social isolation. Instead, their specific link to positive symptoms supports a primary dopaminergic disruption. Aberrant precision-weighting degrades social feedback reliability, causing a symptom-associated lack of trust rather than a loss of social practice."</text:span><text:span text:style-name="T53"> </text:span><text:span text:style-name="T54">(</text:span><text:span text:style-name="T55">4.2 Behavioral Imprecision and Inconsistent Preferences</text:span><text:span text:style-name="T54">, </text:span><text:span text:style-name="T56">line </text:span><text:span text:style-name="T57">395-400</text:span><text:span text:style-name="T58">)</text:span></text:p>
        </text:list-item>
      </text:list>
      <text:p text:style-name="P28"/>
      <text:p text:style-name="P28"/>
      <text:p text:style-name="P28"/>
      <text:p text:style-name="P28"/>
      <text:p text:style-name="P28">Comment 6: <text:span text:style-name="T10">“What would be the consequences for clinicians. Could this behavioural task be used in stable patients to predict long-term clinical outcome?”</text:span></text:p>
      <text:p text:style-name="P28"/>
      <text:p text:style-name="P21"><text:span text:style-name="T43">Response 6: </text:span><text:span text:style-name="T28">We sincerely thank the reviewer for highlighting the translational importance of our findings. </text:span><text:span text:style-name="T59">Our findings reframe how treatment resistance in social functioning is </text:span><text:soft-page-break/><text:span text:style-name="T59">understood. When patients fail to engage in therapeutic alliances or social skills training, it is often viewed as a negative symptom (amotivation). Our data demonstrates that it is actually a specific computational failure to process positive social feedback. For clinicians, this implies that traditional, socially reinforced therapies may fail for patients with high decision imprecision, highlighting the need for alternative, perhaps non-socially mediated cognitive remediation strategies. We strongly agree that this is a promising application. While our cross-sectional design warrants caution, computational parameters (like choice precision, </text:span><text:span text:style-name="T59"><draw:frame draw:style-name="fr5" draw:name="Object1" text:anchor-type="as-char" svg:width="0.1035in" svg:height="0.1854in" draw:z-index="3"><draw:object xlink:href="./Object 4" xlink:type="simple" xlink:show="embed" xlink:actuate="onLoad"/><draw:image xlink:href="./ObjectReplacements/Object 4" xlink:type="simple" xlink:show="embed" xlink:actuate="onLoad"/><svg:desc>formula</svg:desc></draw:frame></text:span><text:span text:style-name="T59"><text:s/>) essentially provide a “stress test” for social integration. Using the Trust Game in stable patients could act as a quantitative biomarker; patients who show an inability to computationally update expectations are likely at much higher risk for long-term functional decline and social isolation.</text:span></text:p>
      <text:p text:style-name="P33"/>
      <text:list text:style-name="L10">
        <text:list-item>
          <text:p text:style-name="P34" loext:marker-style-name="T37">“<text:span text:style-name="T60">4.5 </text:span><text:span text:style-name="T61">C</text:span><text:span text:style-name="T62">linical Implications and Predictive Utility</text:span></text:p>
          <text:p text:style-name="P35" loext:marker-style-name="T37"><text:span text:style-name="T44">These computational findings offer actionable insights for clinical practice. When stable patients fail to benefit from social skills training or struggle to form therapeutic alliances, clinicians often attribute this to amotivation or cognitive decline. However, our results suggest a different mechanism: a fundamental computational inability to integrate positive social feedback. Consequently, interventions relying heavily on social reinforcement may be ineffective for patients exhibiting profound decision imprecision (low </text:span><text:span text:style-name="T44"><draw:frame draw:style-name="fr5" draw:name="Object72" text:anchor-type="as-char" svg:width="0.1035in" svg:height="0.1854in" draw:z-index="2"><draw:object xlink:href="./Object 3" xlink:type="simple" xlink:show="embed" xlink:actuate="onLoad"/><draw:image xlink:href="./ObjectReplacements/Object 3" xlink:type="simple" xlink:show="embed" xlink:actuate="onLoad"/><svg:desc>formula</svg:desc></draw:frame></text:span><text:span text:style-name="T44">)</text:span><text:span text:style-name="T63">) Furthermore, behavioral paradigms like the Trust Game hold significant promise as prognostic tools. In clinically stable outpatients, extracting these computational parameters could serve as a quantitive biomarker to identify individuals at high risk for long-term social withdrawal and functional decline, guiding the early implementation of tailored cognitive remediation strategies.” </text:span><text:span text:style-name="T64">(4.</text:span><text:span text:style-name="T65">5</text:span><text:span text:style-name="T64"> Clinical Implications and Predictive Utility,</text:span><text:span text:style-name="T66"> </text:span><text:span text:style-name="T66">line </text:span><text:span text:style-name="T67">454-463</text:span><text:span text:style-name="T68">)</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Helvetica Neue" svg:font-family="'Helvetica Neue'"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T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T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fo:color="#2a6099"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7T16:22:52.506309000</meta:creation-date>
    <dc:date>2026-07-02T21:34:34.731989000</dc:date>
    <meta:editing-duration>PT1H47M52S</meta:editing-duration>
    <meta:editing-cycles>4</meta:editing-cycles>
    <meta:generator>LibreOffice/26.2.4.2$MacOSX_AARCH64 LibreOffice_project/0229ac93fcf0d7cbc6376066c6f35021cef002dc</meta:generator>
    <meta:document-statistic meta:table-count="0" meta:image-count="0" meta:object-count="14" meta:page-count="5" meta:paragraph-count="43" meta:word-count="1791" meta:character-count="12654" meta:non-whitespace-character-count="10903"/>
  </office:meta>
</office:document-meta>
</file>

<file path=Object 1/content.xml><?xml version="1.0" encoding="utf-8"?>
<math xmlns="http://www.w3.org/1998/Math/MathML" display="block">
  <semantics>
    <mi>M</mi>
    <annotation encoding="StarMath 5.0">M </annotation>
  </semantics>
</math>
</file>

<file path=Object 10/content.xml><?xml version="1.0" encoding="utf-8"?>
<math xmlns="http://www.w3.org/1998/Math/MathML" display="block">
  <semantics>
    <mi>τ</mi>
    <annotation encoding="StarMath 5.0">τ</annotation>
  </semantics>
</math>
</file>

<file path=Object 11/content.xml><?xml version="1.0" encoding="utf-8"?>
<math xmlns="http://www.w3.org/1998/Math/MathML" display="block">
  <semantics>
    <mi>τ</mi>
    <annotation encoding="StarMath 5.0">τ</annotation>
  </semantics>
</math>
</file>

<file path=Object 12/content.xml><?xml version="1.0" encoding="utf-8"?>
<math xmlns="http://www.w3.org/1998/Math/MathML" display="block">
  <semantics>
    <mi>α</mi>
    <annotation encoding="StarMath 5.0">α</annotation>
  </semantics>
</math>
</file>

<file path=Object 13/content.xml><?xml version="1.0" encoding="utf-8"?>
<math xmlns="http://www.w3.org/1998/Math/MathML" display="block">
  <semantics>
    <mi>α</mi>
    <annotation encoding="StarMath 5.0">α</annotation>
  </semantics>
</math>
</file>

<file path=Object 14/content.xml><?xml version="1.0" encoding="utf-8"?>
<math xmlns="http://www.w3.org/1998/Math/MathML" display="block">
  <semantics>
    <mi>β</mi>
    <annotation encoding="StarMath 5.0">β</annotation>
  </semantics>
</math>
</file>

<file path=Object 2/content.xml><?xml version="1.0" encoding="utf-8"?>
<math xmlns="http://www.w3.org/1998/Math/MathML" display="block">
  <semantics>
    <mrow>
      <mi mathvariant="italic">SD</mi>
      <mi>;</mi>
      <mi>±</mi>
    </mrow>
    <annotation encoding="StarMath 5.0">SD;±</annotation>
  </semantics>
</math>
</file>

<file path=Object 3/content.xml><?xml version="1.0" encoding="utf-8"?>
<math xmlns="http://www.w3.org/1998/Math/MathML" display="block">
  <semantics>
    <mi>β</mi>
    <annotation encoding="StarMath 5.0">β</annotation>
  </semantics>
</math>
</file>

<file path=Object 4/content.xml><?xml version="1.0" encoding="utf-8"?>
<math xmlns="http://www.w3.org/1998/Math/MathML" display="block">
  <semantics>
    <mi>β</mi>
    <annotation encoding="StarMath 5.0">β</annotation>
  </semantics>
</math>
</file>

<file path=Object 5/content.xml><?xml version="1.0" encoding="utf-8"?>
<math xmlns="http://www.w3.org/1998/Math/MathML" display="block">
  <semantics>
    <mi>α</mi>
    <annotation encoding="StarMath 5.0">α</annotation>
  </semantics>
</math>
</file>

<file path=Object 6/content.xml><?xml version="1.0" encoding="utf-8"?>
<math xmlns="http://www.w3.org/1998/Math/MathML" display="block">
  <semantics>
    <mi>β</mi>
    <annotation encoding="StarMath 5.0">β</annotation>
  </semantics>
</math>
</file>

<file path=Object 7/content.xml><?xml version="1.0" encoding="utf-8"?>
<math xmlns="http://www.w3.org/1998/Math/MathML" display="block">
  <semantics>
    <mrow>
      <mi>β</mi>
      <mo stretchy="false">/</mo>
      <mi>τ</mi>
    </mrow>
    <annotation encoding="StarMath 5.0">%beta/%tau</annotation>
  </semantics>
</math>
</file>

<file path=Object 8/content.xml><?xml version="1.0" encoding="utf-8"?>
<math xmlns="http://www.w3.org/1998/Math/MathML" display="block">
  <semantics>
    <mi>α</mi>
    <annotation encoding="StarMath 5.0">%alpha</annotation>
  </semantics>
</math>
</file>

<file path=Object 9/content.xml><?xml version="1.0" encoding="utf-8"?>
<math xmlns="http://www.w3.org/1998/Math/MathML" display="block">
  <semantics>
    <mi>α</mi>
    <annotation encoding="StarMath 5.0">%alpha</annotation>
  </semantics>
</math>
</file>