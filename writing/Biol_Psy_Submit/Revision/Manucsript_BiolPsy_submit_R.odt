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75/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5.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Arial Unicode MS" svg:font-family="Arial Unicode MS" style:font-family-generic="system"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style:font-name="Helvetica Neue" fo:font-weight="bold" style:font-weight-asian="bold" style:font-weight-complex="bold" fo:font-size="10pt" style:font-size-asian="10pt" style:font-size-complex="10pt"/>
    </style:style>
    <style:style style:name="T4" style:parent-style-name="DefaultParagraphFont" style:family="text">
      <style:text-properties style:font-name="Helvetica Neue" fo:font-size="10pt" style:font-size-asian="10pt" style:font-size-complex="10pt"/>
    </style:style>
    <style:style style:name="P5" style:parent-style-name="Standard" style:family="paragraph">
      <style:paragraph-properties fo:line-height="100%"/>
      <style:text-properties style:font-name="Helvetica Neue" style:font-name-asian="Times New Roman" fo:font-size="10pt" style:font-size-asian="10pt" style:font-size-complex="10pt"/>
    </style:style>
    <style:style style:name="P6" style:parent-style-name="Standard" style:family="paragraph">
      <style:paragraph-properties fo:text-align="justify" fo:line-height="100%"/>
    </style:style>
    <style:style style:name="T7" style:parent-style-name="DefaultParagraphFont" style:family="text">
      <style:text-properties style:font-name="Helvetica Neue" style:font-name-asian="Times New Roman" fo:font-weight="bold" style:font-weight-asian="bold" style:font-weight-complex="bold" fo:color="#000000" fo:font-size="10pt" style:font-size-asian="10pt" style:font-size-complex="10pt"/>
    </style:style>
    <style:style style:name="P8" style:parent-style-name="Standard" style:family="paragraph">
      <style:paragraph-properties fo:text-align="justify" fo:line-height="100%"/>
    </style:style>
    <style:style style:name="T9" style:parent-style-name="DefaultParagraphFont" style:family="text">
      <style:text-properties style:font-name="Helvetica Neue" style:font-name-asian="Times New Roman" fo:font-size="10pt" style:font-size-asian="10pt" style:font-size-complex="10pt"/>
    </style:style>
    <style:style style:name="T10" style:parent-style-name="DefaultParagraphFont" style:family="text">
      <style:text-properties style:font-name="Helvetica Neue" style:font-name-asian="Times New Roman" style:text-position="super 65%" fo:font-size="10pt" style:font-size-asian="10pt" style:font-size-complex="10pt"/>
    </style:style>
    <style:style style:name="T11" style:parent-style-name="DefaultParagraphFont" style:family="text">
      <style:text-properties style:font-name="Helvetica Neue" style:font-name-asian="Times New Roman" fo:font-size="10pt" style:font-size-asian="10pt" style:font-size-complex="10pt"/>
    </style:style>
    <style:style style:name="T12" style:parent-style-name="DefaultParagraphFont" style:family="text">
      <style:text-properties style:font-name="Helvetica Neue" style:font-name-asian="Times New Roman" style:text-position="super 65%" fo:font-size="10pt" style:font-size-asian="10pt" style:font-size-complex="10pt"/>
    </style:style>
    <style:style style:name="T13" style:parent-style-name="DefaultParagraphFont" style:family="text">
      <style:text-properties style:font-name="Helvetica Neue" style:font-name-asian="Times New Roman" fo:font-size="10pt" style:font-size-asian="10pt" style:font-size-complex="10pt"/>
    </style:style>
    <style:style style:name="T14" style:parent-style-name="DefaultParagraphFont" style:family="text">
      <style:text-properties style:font-name="Helvetica Neue" style:font-name-asian="Times New Roman" style:text-position="super 65%" fo:font-size="10pt" style:font-size-asian="10pt" style:font-size-complex="10pt"/>
    </style:style>
    <style:style style:name="T15" style:parent-style-name="DefaultParagraphFont" style:family="text">
      <style:text-properties style:font-name="Helvetica Neue" style:font-name-asian="Times New Roman" fo:font-size="10pt" style:font-size-asian="10pt" style:font-size-complex="10pt"/>
    </style:style>
    <style:style style:name="T16" style:parent-style-name="DefaultParagraphFont" style:family="text">
      <style:text-properties style:font-name="Helvetica Neue" style:font-name-asian="Times New Roman" style:text-position="super 65%" fo:font-size="10pt" style:font-size-asian="10pt" style:font-size-complex="10pt"/>
    </style:style>
    <style:style style:name="T17" style:parent-style-name="DefaultParagraphFont" style:family="text">
      <style:text-properties style:font-name="Helvetica Neue" style:font-name-asian="Times New Roman" fo:font-size="10pt" style:font-size-asian="10pt" style:font-size-complex="10pt"/>
    </style:style>
    <style:style style:name="T18" style:parent-style-name="DefaultParagraphFont" style:family="text">
      <style:text-properties style:font-name="Helvetica Neue" style:font-name-asian="Times New Roman" style:text-position="super 65%" fo:font-size="10pt" style:font-size-asian="10pt" style:font-size-complex="10pt"/>
    </style:style>
    <style:style style:name="T19" style:parent-style-name="DefaultParagraphFont" style:family="text">
      <style:text-properties style:font-name="Helvetica Neue" style:font-name-asian="Times New Roman" fo:font-size="10pt" style:font-size-asian="10pt" style:font-size-complex="10pt"/>
    </style:style>
    <style:style style:name="T20" style:parent-style-name="DefaultParagraphFont" style:family="text">
      <style:text-properties style:font-name="Helvetica Neue" style:font-name-asian="Times New Roman" style:text-position="super 65%" fo:font-size="10pt" style:font-size-asian="10pt" style:font-size-complex="10pt"/>
    </style:style>
    <style:style style:name="T21" style:parent-style-name="DefaultParagraphFont" style:family="text">
      <style:text-properties style:font-name="Helvetica Neue" style:font-name-asian="Times New Roman" fo:font-size="10pt" style:font-size-asian="10pt" style:font-size-complex="10pt"/>
    </style:style>
    <style:style style:name="T22" style:parent-style-name="DefaultParagraphFont" style:family="text">
      <style:text-properties style:font-name="Helvetica Neue" style:font-name-asian="Times New Roman" style:text-position="super 65%" fo:font-size="10pt" style:font-size-asian="10pt" style:font-size-complex="10pt"/>
    </style:style>
    <style:style style:name="T23" style:parent-style-name="DefaultParagraphFont" style:family="text">
      <style:text-properties style:font-name="Helvetica Neue" style:font-name-asian="Times New Roman" fo:font-size="10pt" style:font-size-asian="10pt" style:font-size-complex="10pt"/>
    </style:style>
    <style:style style:name="T24" style:parent-style-name="DefaultParagraphFont" style:family="text">
      <style:text-properties style:font-name="Helvetica Neue" style:font-name-asian="Times New Roman" style:text-position="super 65%" fo:font-size="10pt" style:font-size-asian="10pt" style:font-size-complex="10pt"/>
    </style:style>
    <style:style style:name="T25" style:parent-style-name="DefaultParagraphFont" style:family="text">
      <style:text-properties style:font-name="Helvetica Neue" style:font-name-asian="Times New Roman" fo:font-size="10pt" style:font-size-asian="10pt" style:font-size-complex="10pt"/>
    </style:style>
    <style:style style:name="T26" style:parent-style-name="DefaultParagraphFont" style:family="text">
      <style:text-properties style:font-name="Helvetica Neue" style:font-name-asian="Times New Roman" style:text-position="super 65%" fo:font-size="10pt" style:font-size-asian="10pt" style:font-size-complex="10pt"/>
    </style:style>
    <style:style style:name="P27" style:parent-style-name="Standard" style:family="paragraph">
      <style:paragraph-properties fo:text-align="justify" fo:line-height="100%"/>
      <style:text-properties style:font-name="Helvetica Neue" style:font-name-asian="Times New Roman" fo:font-size="10pt" style:font-size-asian="10pt" style:font-size-complex="10pt"/>
    </style:style>
    <style:style style:name="P28" style:parent-style-name="Standard" style:family="paragraph">
      <style:paragraph-properties fo:text-align="justify" fo:line-height="100%"/>
    </style:style>
    <style:style style:name="T29" style:parent-style-name="DefaultParagraphFont" style:family="text">
      <style:text-properties style:font-name="Helvetica Neue" style:font-name-asian="Times New Roman" fo:color="#000000" fo:font-size="10pt" style:font-size-asian="10pt" style:font-size-complex="10pt"/>
    </style:style>
    <style:style style:name="P30" style:parent-style-name="Standard" style:family="paragraph">
      <style:paragraph-properties fo:text-align="justify" fo:line-height="100%"/>
    </style:style>
    <style:style style:name="T31" style:parent-style-name="DefaultParagraphFont" style:family="text">
      <style:text-properties style:font-name="Helvetica Neue" style:font-name-asian="Times New Roman" fo:color="#000000" fo:font-size="10pt" style:font-size-asian="10pt" style:font-size-complex="10pt"/>
    </style:style>
    <style:style style:name="P32" style:parent-style-name="Standard" style:family="paragraph">
      <style:paragraph-properties fo:text-align="justify" fo:line-height="100%"/>
    </style:style>
    <style:style style:name="T33" style:parent-style-name="DefaultParagraphFont" style:family="text">
      <style:text-properties style:font-name="Helvetica Neue" style:font-name-asian="Times New Roman" fo:color="#000000" fo:font-size="10pt" style:font-size-asian="10pt" style:font-size-complex="10pt"/>
    </style:style>
    <style:style style:name="T34" style:parent-style-name="DefaultParagraphFont" style:family="text">
      <style:text-properties style:font-name="Helvetica Neue" style:font-name-asian="Times New Roman" fo:color="#000000" fo:font-size="10pt" style:font-size-asian="10pt" style:font-size-complex="10pt"/>
    </style:style>
    <style:style style:name="P35" style:parent-style-name="Standard" style:family="paragraph">
      <style:paragraph-properties fo:text-align="justify" fo:line-height="100%"/>
    </style:style>
    <style:style style:name="T36" style:parent-style-name="DefaultParagraphFont" style:family="text">
      <style:text-properties style:font-name="Helvetica Neue" style:font-name-asian="Times New Roman" fo:color="#000000" fo:font-size="10pt" style:font-size-asian="10pt" style:font-size-complex="10pt"/>
    </style:style>
    <style:style style:name="P37" style:parent-style-name="Standard" style:family="paragraph">
      <style:paragraph-properties fo:text-align="justify" fo:line-height="100%"/>
    </style:style>
    <style:style style:name="T38" style:parent-style-name="DefaultParagraphFont" style:family="text">
      <style:text-properties style:font-name="Helvetica Neue" style:font-name-asian="Times New Roman" fo:font-size="10pt" style:font-size-asian="10pt" style:font-size-complex="10pt"/>
    </style:style>
    <style:style style:name="T39" style:parent-style-name="DefaultParagraphFont" style:family="text">
      <style:text-properties style:font-name="Helvetica Neue" style:font-name-asian="Times New Roman" fo:color="#000000" fo:font-size="10pt" style:font-size-asian="10pt" style:font-size-complex="10pt"/>
    </style:style>
    <style:style style:name="P40" style:parent-style-name="Standard" style:family="paragraph">
      <style:paragraph-properties fo:text-align="justify" fo:line-height="100%"/>
    </style:style>
    <style:style style:name="T41" style:parent-style-name="DefaultParagraphFont" style:family="text">
      <style:text-properties style:font-name="Helvetica Neue" style:font-name-asian="Times New Roman" fo:font-size="10pt" style:font-size-asian="10pt" style:font-size-complex="10pt"/>
    </style:style>
    <style:style style:name="T42" style:parent-style-name="DefaultParagraphFont" style:family="text">
      <style:text-properties style:font-name="Helvetica Neue" style:font-name-asian="Times New Roman" fo:color="#000000" fo:font-size="10pt" style:font-size-asian="10pt" style:font-size-complex="10pt"/>
    </style:style>
    <style:style style:name="P43" style:parent-style-name="Standard" style:family="paragraph">
      <style:paragraph-properties fo:text-align="justify" fo:line-height="100%"/>
      <style:text-properties style:font-name="Helvetica Neue" style:font-name-asian="Times New Roman" fo:font-size="10pt" style:font-size-asian="10pt" style:font-size-complex="10pt"/>
    </style:style>
    <style:style style:name="P44" style:parent-style-name="Standard" style:family="paragraph">
      <style:paragraph-properties fo:text-align="justify" fo:line-height="100%"/>
    </style:style>
    <style:style style:name="T45" style:parent-style-name="DefaultParagraphFont" style:family="text">
      <style:text-properties style:font-name="Helvetica Neue" style:font-name-asian="Times New Roman" fo:font-size="10pt" style:font-size-asian="10pt" style:font-size-complex="10pt"/>
    </style:style>
    <style:style style:name="T46" style:parent-style-name="DefaultParagraphFont" style:family="text">
      <style:text-properties style:font-name="Helvetica Neue" style:font-name-asian="Times New Roman" fo:color="#000000" fo:font-size="10pt" style:font-size-asian="10pt" style:font-size-complex="10pt"/>
    </style:style>
    <style:style style:name="P47" style:parent-style-name="Standard" style:family="paragraph">
      <style:paragraph-properties fo:text-align="justify" fo:line-height="100%"/>
    </style:style>
    <style:style style:name="T48" style:parent-style-name="DefaultParagraphFont" style:family="text">
      <style:text-properties style:font-name="Helvetica Neue" style:font-name-asian="Times New Roman" fo:color="#000000" fo:font-size="10pt" style:font-size-asian="10pt" style:font-size-complex="10pt"/>
    </style:style>
    <style:style style:name="T49" style:parent-style-name="Internetlink" style:family="text">
      <style:text-properties style:font-name="Helvetica Neue" style:font-name-asian="Times New Roman" fo:font-size="10pt" style:font-size-asian="10pt" style:font-size-complex="10pt"/>
    </style:style>
    <style:style style:name="P50" style:parent-style-name="Standard" style:family="paragraph">
      <style:paragraph-properties fo:text-align="justify" fo:line-height="100%"/>
    </style:style>
    <style:style style:name="T51" style:parent-style-name="DefaultParagraphFont" style:family="text">
      <style:text-properties style:font-name="Helvetica Neue" fo:font-size="10pt" style:font-size-asian="10pt" style:font-size-complex="10pt"/>
    </style:style>
    <style:style style:name="T52" style:parent-style-name="Internetlink" style:family="text">
      <style:text-properties style:font-name="Helvetica Neue" fo:font-size="10pt" style:font-size-asian="10pt" style:font-size-complex="10pt"/>
    </style:style>
    <style:style style:name="P53" style:parent-style-name="Standard" style:family="paragraph">
      <style:paragraph-properties fo:text-align="justify" fo:line-height="100%"/>
    </style:style>
    <style:style style:name="T54" style:parent-style-name="DefaultParagraphFont" style:family="text">
      <style:text-properties style:font-name="Helvetica Neue" fo:font-size="10pt" style:font-size-asian="10pt" style:font-size-complex="10pt"/>
    </style:style>
    <style:style style:name="T55" style:parent-style-name="Internetlink" style:family="text">
      <style:text-properties style:font-name="Helvetica Neue" fo:font-size="10pt" style:font-size-asian="10pt" style:font-size-complex="10pt"/>
    </style:style>
    <style:style style:name="P56" style:parent-style-name="Standard" style:family="paragraph">
      <style:paragraph-properties fo:text-align="justify" fo:line-height="100%"/>
    </style:style>
    <style:style style:name="T57" style:parent-style-name="DefaultParagraphFont" style:family="text">
      <style:text-properties style:font-name="Helvetica Neue" fo:font-size="10pt" style:font-size-asian="10pt" style:font-size-complex="10pt"/>
    </style:style>
    <style:style style:name="T58" style:parent-style-name="Internetlink" style:family="text">
      <style:text-properties style:font-name="Helvetica Neue" fo:font-size="10pt" style:font-size-asian="10pt" style:font-size-complex="10pt"/>
    </style:style>
    <style:style style:name="P59" style:parent-style-name="Standard" style:family="paragraph">
      <style:paragraph-properties fo:text-align="justify" fo:line-height="100%"/>
    </style:style>
    <style:style style:name="T60" style:parent-style-name="DefaultParagraphFont" style:family="text">
      <style:text-properties style:font-name="Helvetica Neue" fo:font-size="10pt" style:font-size-asian="10pt" style:font-size-complex="10pt"/>
    </style:style>
    <style:style style:name="T61" style:parent-style-name="Internetlink" style:family="text">
      <style:text-properties style:font-name="Helvetica Neue" fo:font-size="10pt" style:font-size-asian="10pt" style:font-size-complex="10pt"/>
    </style:style>
    <style:style style:name="P62" style:parent-style-name="Standard" style:family="paragraph">
      <style:paragraph-properties fo:text-align="justify" fo:line-height="100%"/>
    </style:style>
    <style:style style:name="T63" style:parent-style-name="DefaultParagraphFont" style:family="text">
      <style:text-properties style:font-name="Helvetica Neue" fo:font-size="10pt" style:font-size-asian="10pt" style:font-size-complex="10pt"/>
    </style:style>
    <style:style style:name="T64" style:parent-style-name="Internetlink" style:family="text">
      <style:text-properties style:font-name="Helvetica Neue" fo:font-size="10pt" style:font-size-asian="10pt" style:font-size-complex="10pt"/>
    </style:style>
    <style:style style:name="P65" style:parent-style-name="Standard" style:family="paragraph">
      <style:paragraph-properties fo:text-align="justify" fo:line-height="100%"/>
    </style:style>
    <style:style style:name="T66" style:parent-style-name="DefaultParagraphFont" style:family="text">
      <style:text-properties style:font-name="Helvetica Neue" fo:font-size="10pt" style:font-size-asian="10pt" style:font-size-complex="10pt"/>
    </style:style>
    <style:style style:name="T67" style:parent-style-name="DefaultParagraphFont" style:family="text">
      <style:text-properties style:font-name="Helvetica Neue" fo:font-size="10pt" style:font-size-asian="10pt" style:font-size-complex="10pt"/>
    </style:style>
    <style:style style:name="T68" style:parent-style-name="Internetlink" style:family="text">
      <style:text-properties style:font-name="Helvetica Neue" fo:font-size="10pt" style:font-size-asian="10pt" style:font-size-complex="10pt"/>
    </style:style>
    <style:style style:name="P69" style:parent-style-name="Standard" style:family="paragraph">
      <style:paragraph-properties fo:text-align="justify" fo:line-height="100%"/>
    </style:style>
    <style:style style:name="T70" style:parent-style-name="DefaultParagraphFont" style:family="text">
      <style:text-properties style:font-name="Helvetica Neue" fo:font-size="10pt" style:font-size-asian="10pt" style:font-size-complex="10pt"/>
    </style:style>
    <style:style style:name="T71" style:parent-style-name="DefaultParagraphFont" style:family="text">
      <style:text-properties style:font-name="Helvetica Neue" style:font-name-asian="Times New Roman" fo:color="#000000" fo:font-size="10pt" style:font-size-asian="10pt" style:font-size-complex="10pt"/>
    </style:style>
    <style:style style:name="P72" style:parent-style-name="Standard" style:family="paragraph">
      <style:paragraph-properties fo:text-align="justify" fo:line-height="100%"/>
      <style:text-properties style:font-name="Helvetica Neue" style:font-name-asian="Times New Roman" fo:color="#000000" fo:font-size="10pt" style:font-size-asian="10pt" style:font-size-complex="10pt"/>
    </style:style>
    <style:style style:name="P73" style:parent-style-name="Standard" style:family="paragraph">
      <style:paragraph-properties fo:line-height="100%"/>
      <style:text-properties style:font-name="Helvetica Neue" style:font-name-asian="Times New Roman" fo:font-size="10pt" style:font-size-asian="10pt" style:font-size-complex="10pt"/>
    </style:style>
    <style:style style:name="P74" style:parent-style-name="Standard" style:family="paragraph">
      <style:paragraph-properties fo:text-align="justify" fo:line-height="100%"/>
    </style:style>
    <style:style style:name="T75" style:parent-style-name="DefaultParagraphFont" style:family="text">
      <style:text-properties style:font-name="Helvetica Neue" style:font-name-asian="Times New Roman" fo:font-weight="bold" style:font-weight-asian="bold" style:font-weight-complex="bold" fo:color="#000000" fo:font-size="10pt" style:font-size-asian="10pt" style:font-size-complex="10pt"/>
    </style:style>
    <style:style style:name="T76" style:parent-style-name="DefaultParagraphFont" style:family="text">
      <style:text-properties style:font-name="Helvetica Neue" style:font-name-asian="Times New Roman" fo:color="#000000" fo:font-size="10pt" style:font-size-asian="10pt" style:font-size-complex="10pt"/>
    </style:style>
    <style:style style:name="P77" style:parent-style-name="Standard" style:family="paragraph">
      <style:paragraph-properties fo:text-align="justify" fo:line-height="100%"/>
      <style:text-properties style:font-name="Helvetica Neue" style:font-name-asian="Times New Roman" fo:font-size="10pt" style:font-size-asian="10pt" style:font-size-complex="10pt"/>
    </style:style>
    <style:style style:name="P78" style:parent-style-name="Standard" style:family="paragraph">
      <style:paragraph-properties fo:text-align="justify" fo:line-height="100%"/>
    </style:style>
    <style:style style:name="T79" style:parent-style-name="DefaultParagraphFont" style:family="text">
      <style:text-properties style:font-name="Helvetica Neue" style:font-name-asian="Times New Roman" fo:font-size="10pt" style:font-size-asian="10pt" style:font-size-complex="10pt"/>
    </style:style>
    <style:style style:name="P80" style:parent-style-name="Standard" style:family="paragraph">
      <style:text-properties style:font-name="Helvetica Neue" style:font-name-asian="Times New Roman" fo:font-size="10pt" style:font-size-asian="10pt" style:font-size-complex="10pt"/>
    </style:style>
    <style:style style:name="T81" style:parent-style-name="DefaultParagraphFont" style:family="text">
      <style:text-properties style:font-name="Helvetica Neue" style:font-name-asian="Times New Roman" fo:font-size="10pt" style:font-size-asian="10pt" style:font-size-complex="10pt"/>
    </style:style>
    <style:style style:name="T82" style:parent-style-name="DefaultParagraphFont" style:family="text">
      <style:text-properties style:font-name="Helvetica Neue" fo:font-size="10pt" style:font-size-asian="10pt" style:font-size-complex="10pt"/>
    </style:style>
    <style:style style:name="T83" style:parent-style-name="DefaultParagraphFont" style:family="text">
      <style:text-properties style:font-name="Helvetica Neue" fo:font-size="10pt" style:font-size-asian="10pt" style:font-size-complex="10pt"/>
    </style:style>
    <style:style style:name="T84" style:parent-style-name="DefaultParagraphFont" style:family="text">
      <style:text-properties style:font-name="Helvetica Neue" fo:font-size="10pt" style:font-size-asian="10pt" style:font-size-complex="10pt"/>
    </style:style>
    <style:style style:name="T85" style:parent-style-name="DefaultParagraphFont" style:family="text">
      <style:text-properties style:font-name="Helvetica Neue" fo:font-size="10pt" style:font-size-asian="10pt" style:font-size-complex="10pt"/>
    </style:style>
    <style:style style:name="T86" style:parent-style-name="DefaultParagraphFont" style:family="text">
      <style:text-properties style:font-name="Helvetica Neue" fo:font-size="10pt" style:font-size-asian="10pt" style:font-size-complex="10pt"/>
    </style:style>
    <style:style style:name="P87" style:parent-style-name="Standard" style:family="paragraph">
      <style:paragraph-properties fo:text-align="justify" fo:line-height="100%"/>
      <style:text-properties style:font-name="Helvetica Neue" style:font-name-asian="Times New Roman" fo:font-size="10pt" style:font-size-asian="10pt" style:font-size-complex="10pt"/>
    </style:style>
    <style:style style:name="P88" style:parent-style-name="Standard" style:family="paragraph">
      <style:paragraph-properties fo:text-align="justify" fo:line-height="100%"/>
    </style:style>
    <style:style style:name="T89" style:parent-style-name="DefaultParagraphFont" style:family="text">
      <style:text-properties style:font-name="Helvetica Neue" style:font-name-asian="Times New Roman" fo:font-weight="bold" style:font-weight-asian="bold" style:font-weight-complex="bold" fo:font-size="10pt" style:font-size-asian="10pt" style:font-size-complex="10pt"/>
    </style:style>
    <style:style style:name="T90" style:parent-style-name="DefaultParagraphFont" style:family="text">
      <style:text-properties style:font-name="Helvetica Neue" style:font-name-asian="Times New Roman" fo:font-size="10pt" style:font-size-asian="10pt" style:font-size-complex="10pt"/>
    </style:style>
    <style:style style:name="T91" style:parent-style-name="DefaultParagraphFont" style:family="text">
      <style:text-properties style:font-name="Helvetica Neue" style:font-name-asian="Times New Roman" fo:font-weight="bold" style:font-weight-asian="bold" style:font-weight-complex="bold" fo:font-size="10pt" style:font-size-asian="10pt" style:font-size-complex="10pt"/>
    </style:style>
    <style:style style:name="T92" style:parent-style-name="DefaultParagraphFont" style:family="text">
      <style:text-properties style:font-name="Helvetica Neue" style:font-name-asian="Times New Roman" fo:font-size="10pt" style:font-size-asian="10pt" style:font-size-complex="10pt"/>
    </style:style>
    <style:style style:name="T93" style:parent-style-name="DefaultParagraphFont" style:family="text">
      <style:text-properties style:font-name="Helvetica Neue" style:font-name-asian="Times New Roman" fo:color="#000000" fo:font-size="10pt" style:font-size-asian="10pt" style:font-size-complex="10pt"/>
    </style:style>
    <style:style style:name="P94" style:parent-style-name="Standard" style:family="paragraph">
      <style:paragraph-properties fo:text-align="justify" fo:line-height="100%"/>
      <style:text-properties style:font-name="Helvetica Neue" style:font-name-asian="Times New Roman" fo:font-size="10pt" style:font-size-asian="10pt" style:font-size-complex="10pt"/>
    </style:style>
    <style:style style:name="P95" style:parent-style-name="Standard" style:family="paragraph">
      <style:paragraph-properties fo:text-align="justify" fo:line-height="100%"/>
    </style:style>
    <style:style style:name="T96" style:parent-style-name="DefaultParagraphFont" style:family="text">
      <style:text-properties style:font-name="Helvetica Neue" style:font-name-asian="Times New Roman" fo:font-weight="bold" style:font-weight-asian="bold" style:font-weight-complex="bold" fo:color="#000000" fo:font-size="10pt" style:font-size-asian="10pt" style:font-size-complex="10pt"/>
    </style:style>
    <style:style style:name="P97" style:parent-style-name="Standard" style:family="paragraph">
      <style:paragraph-properties fo:text-align="justify" fo:line-height="100%"/>
      <style:text-properties style:font-name="Helvetica Neue" style:font-name-asian="Times New Roman" fo:font-weight="bold" style:font-weight-asian="bold" style:font-weight-complex="bold" fo:color="#000000" fo:font-size="10pt" style:font-size-asian="10pt" style:font-size-complex="10pt"/>
    </style:style>
    <style:style style:name="P98" style:parent-style-name="Standard" style:family="paragraph">
      <style:paragraph-properties fo:text-align="justify" fo:line-height="100%"/>
    </style:style>
    <style:style style:name="T99" style:parent-style-name="DefaultParagraphFont" style:family="text">
      <style:text-properties style:font-name="Helvetica Neue" style:font-name-asian="Times New Roman" fo:font-weight="bold" style:font-weight-asian="bold" style:font-weight-complex="bold" fo:font-size="10pt" style:font-size-asian="10pt" style:font-size-complex="10pt"/>
    </style:style>
    <style:style style:name="T100" style:parent-style-name="DefaultParagraphFont" style:family="text">
      <style:text-properties style:font-name="Helvetica Neue" style:font-name-asian="Times New Roman" fo:font-size="10pt" style:font-size-asian="10pt" style:font-size-complex="10pt"/>
    </style:style>
    <style:style style:name="T101" style:parent-style-name="DefaultParagraphFont" style:family="text">
      <style:text-properties style:font-name="Helvetica Neue" style:font-name-asian="Times New Roman" fo:font-size="10pt" style:font-size-asian="10pt" style:font-size-complex="10pt"/>
    </style:style>
    <style:style style:name="T102" style:parent-style-name="DefaultParagraphFont" style:family="text">
      <style:text-properties style:font-name="Helvetica Neue" style:font-name-asian="Times New Roman" fo:font-weight="bold" style:font-weight-asian="bold" style:font-weight-complex="bold" fo:font-size="10pt" style:font-size-asian="10pt" style:font-size-complex="10pt"/>
    </style:style>
    <style:style style:name="T103" style:parent-style-name="DefaultParagraphFont" style:family="text">
      <style:text-properties style:font-name="Helvetica Neue" style:font-name-asian="Times New Roman" fo:font-size="10pt" style:font-size-asian="10pt" style:font-size-complex="10pt"/>
    </style:style>
    <style:style style:name="T104" style:parent-style-name="DefaultParagraphFont" style:family="text">
      <style:text-properties style:font-name="Helvetica Neue" style:font-name-asian="Times New Roman" fo:font-weight="bold" style:font-weight-asian="bold" style:font-weight-complex="bold" fo:font-size="10pt" style:font-size-asian="10pt" style:font-size-complex="10pt"/>
    </style:style>
    <style:style style:name="T105" style:parent-style-name="DefaultParagraphFont" style:family="text">
      <style:text-properties style:font-name="Helvetica Neue" style:font-name-asian="Times New Roman" fo:font-size="10pt" style:font-size-asian="10pt" style:font-size-complex="10pt"/>
    </style:style>
    <style:style style:name="T106" style:parent-style-name="DefaultParagraphFont" style:family="text">
      <style:text-properties style:font-name="Helvetica Neue" style:font-name-asian="Times New Roman" fo:font-weight="bold" style:font-weight-asian="bold" style:font-weight-complex="bold" fo:font-size="10pt" style:font-size-asian="10pt" style:font-size-complex="10pt"/>
    </style:style>
    <style:style style:name="T107" style:parent-style-name="DefaultParagraphFont" style:family="text">
      <style:text-properties style:font-name="Helvetica Neue" style:font-name-asian="Times New Roman" fo:font-size="10pt" style:font-size-asian="10pt" style:font-size-complex="10pt"/>
    </style:style>
    <style:style style:name="T108" style:parent-style-name="DefaultParagraphFont" style:family="text">
      <style:text-properties style:font-name="Helvetica Neue" style:font-name-asian="Times New Roman" fo:font-weight="bold" style:font-weight-asian="bold" style:font-weight-complex="bold" fo:font-size="10pt" style:font-size-asian="10pt" style:font-size-complex="10pt"/>
    </style:style>
    <style:style style:name="T109" style:parent-style-name="DefaultParagraphFont" style:family="text">
      <style:text-properties style:font-name="Helvetica Neue" style:font-name-asian="Times New Roman" fo:font-size="10pt" style:font-size-asian="10pt" style:font-size-complex="10pt"/>
    </style:style>
    <style:style style:name="T110" style:parent-style-name="DefaultParagraphFont" style:family="text">
      <style:text-properties style:font-name="Helvetica Neue" style:font-name-asian="Times New Roman" fo:font-weight="bold" style:font-weight-asian="bold" style:font-weight-complex="bold" fo:font-size="10pt" style:font-size-asian="10pt" style:font-size-complex="10pt"/>
    </style:style>
    <style:style style:name="T111" style:parent-style-name="DefaultParagraphFont" style:family="text">
      <style:text-properties style:font-name="Helvetica Neue" style:font-name-asian="Times New Roman" fo:font-size="10pt" style:font-size-asian="10pt" style:font-size-complex="10pt"/>
    </style:style>
    <style:style style:name="T112" style:parent-style-name="DefaultParagraphFont" style:family="text">
      <style:text-properties style:font-name="Helvetica Neue" style:font-name-asian="Times New Roman" fo:font-weight="bold" style:font-weight-asian="bold" style:font-weight-complex="bold" fo:font-size="10pt" style:font-size-asian="10pt" style:font-size-complex="10pt"/>
    </style:style>
    <style:style style:name="T113" style:parent-style-name="DefaultParagraphFont" style:family="text">
      <style:text-properties style:font-name="Helvetica Neue" style:font-name-asian="Times New Roman" fo:font-size="10pt" style:font-size-asian="10pt" style:font-size-complex="10pt"/>
    </style:style>
    <style:style style:name="T114" style:parent-style-name="DefaultParagraphFont" style:family="text">
      <style:text-properties style:font-name="Helvetica Neue" style:font-name-asian="Times New Roman" fo:font-weight="bold" style:font-weight-asian="bold" style:font-weight-complex="bold" fo:font-size="10pt" style:font-size-asian="10pt" style:font-size-complex="10pt"/>
    </style:style>
    <style:style style:name="T115" style:parent-style-name="DefaultParagraphFont" style:family="text">
      <style:text-properties style:font-name="Helvetica Neue" style:font-name-asian="Times New Roman" fo:font-size="10pt" style:font-size-asian="10pt" style:font-size-complex="10pt"/>
    </style:style>
    <style:style style:name="T116" style:parent-style-name="DefaultParagraphFont" style:family="text">
      <style:text-properties style:font-name="Helvetica Neue" style:font-name-asian="Times New Roman" fo:font-weight="bold" style:font-weight-asian="bold" style:font-weight-complex="bold" fo:font-size="10pt" style:font-size-asian="10pt" style:font-size-complex="10pt"/>
    </style:style>
    <style:style style:name="T117" style:parent-style-name="DefaultParagraphFont" style:family="text">
      <style:text-properties style:font-name="Helvetica Neue" style:font-name-asian="Times New Roman" fo:font-size="10pt" style:font-size-asian="10pt" style:font-size-complex="10pt"/>
    </style:style>
    <style:style style:name="T118" style:parent-style-name="DefaultParagraphFont" style:family="text">
      <style:text-properties style:font-name="Helvetica Neue" style:font-name-asian="Times New Roman" fo:font-size="10pt" style:font-size-asian="10pt" style:font-size-complex="10pt"/>
    </style:style>
    <style:style style:name="P119" style:parent-style-name="Standard" style:family="paragraph">
      <style:paragraph-properties fo:text-align="justify" fo:line-height="100%"/>
      <style:text-properties style:font-name-asian="Times New Roman"/>
    </style:style>
    <style:style style:name="P120" style:parent-style-name="Standard" style:family="paragraph">
      <style:paragraph-properties fo:text-align="justify" fo:line-height="100%"/>
      <style:text-properties style:font-name-asian="Times New Roman"/>
    </style:style>
    <style:style style:name="P121" style:parent-style-name="Standard" style:family="paragraph">
      <style:paragraph-properties fo:text-align="justify" fo:line-height="100%"/>
      <style:text-properties style:font-name-asian="Times New Roman"/>
    </style:style>
    <style:style style:name="P122" style:parent-style-name="Standard" style:family="paragraph">
      <style:paragraph-properties fo:text-align="justify" fo:line-height="100%"/>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123" style:parent-style-name="Standard" style:family="paragraph">
      <style:paragraph-properties fo:text-align="justify" fo:line-height="100%"/>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124" style:parent-style-name="Standard" style:family="paragraph">
      <style:paragraph-properties fo:text-align="justify" fo:line-height="100%"/>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125" style:parent-style-name="Standard" style:family="paragraph">
      <style:paragraph-properties fo:text-align="justify" fo:line-height="100%"/>
    </style:style>
    <style:style style:name="T126"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127" style:parent-style-name="Standard" style:family="paragraph">
      <style:paragraph-properties fo:text-align="justify" fo:margin-top="0.125in" fo:margin-bottom="0.125in" fo:line-height="150%"/>
    </style:style>
    <style:style style:name="T128"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129" style:parent-style-name="Standard" style:family="paragraph">
      <style:paragraph-properties fo:text-align="justify" fo:margin-top="0.125in" fo:margin-bottom="0.125in" fo:line-height="150%"/>
    </style:style>
    <style:style style:name="T130"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31"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32"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33"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34"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135" style:parent-style-name="Standard" style:family="paragraph">
      <style:paragraph-properties fo:text-align="justify" fo:margin-top="0.125in" fo:margin-bottom="0.125in" fo:line-height="150%"/>
    </style:style>
    <style:style style:name="T136"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37"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138" style:parent-style-name="Standard" style:family="paragraph">
      <style:paragraph-properties fo:text-align="justify" fo:margin-top="0.125in" fo:margin-bottom="0.125in"/>
    </style:style>
    <style:style style:name="T139"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T140"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141" style:parent-style-name="Standard" style:family="paragraph">
      <style:paragraph-properties fo:margin-top="0.125in" fo:margin-bottom="0.125in" fo:line-height="100%"/>
      <style:text-properties style:font-name="Helvetica Neue" style:font-name-asian="Helvetica Neue" style:font-name-complex="Helvetica Neue" fo:color="#000000"/>
    </style:style>
    <style:style style:name="P142" style:parent-style-name="Standard" style:family="paragraph">
      <style:paragraph-properties fo:margin-top="0.125in" fo:margin-bottom="0.125in" fo:line-height="100%"/>
      <style:text-properties style:font-name="Helvetica Neue" style:font-name-asian="Helvetica Neue" style:font-name-complex="Helvetica Neue" fo:color="#000000"/>
    </style:style>
    <style:style style:name="P143" style:parent-style-name="Standard" style:family="paragraph">
      <style:paragraph-properties fo:margin-top="0.125in" fo:margin-bottom="0.125in" fo:line-height="100%"/>
      <style:text-properties style:font-name="Helvetica Neue" style:font-name-asian="Helvetica Neue" style:font-name-complex="Helvetica Neue" fo:color="#000000"/>
    </style:style>
    <style:style style:name="P144" style:parent-style-name="Standard" style:family="paragraph">
      <style:paragraph-properties fo:margin-top="0.125in" fo:margin-bottom="0.125in" fo:line-height="100%"/>
      <style:text-properties style:font-name="Helvetica Neue" style:font-name-asian="Helvetica Neue" style:font-name-complex="Helvetica Neue" fo:color="#000000"/>
    </style:style>
    <style:style style:name="P145" style:parent-style-name="Standard" style:family="paragraph">
      <style:paragraph-properties fo:margin-top="0.125in" fo:margin-bottom="0.125in" fo:line-height="100%"/>
      <style:text-properties style:font-name="Helvetica Neue" style:font-name-asian="Helvetica Neue" style:font-name-complex="Helvetica Neue" fo:color="#000000"/>
    </style:style>
    <style:style style:name="P146" style:parent-style-name="Standard" style:family="paragraph">
      <style:paragraph-properties fo:margin-top="0.125in" fo:margin-bottom="0.125in" fo:line-height="100%"/>
      <style:text-properties style:font-name="Helvetica Neue" style:font-name-asian="Helvetica Neue" style:font-name-complex="Helvetica Neue" fo:color="#000000"/>
    </style:style>
    <style:style style:name="P147" style:parent-style-name="Standard" style:family="paragraph">
      <style:paragraph-properties fo:margin-top="0.125in" fo:margin-bottom="0.125in" fo:line-height="100%"/>
      <style:text-properties style:font-name="Helvetica Neue" style:font-name-asian="Helvetica Neue" style:font-name-complex="Helvetica Neue" fo:color="#000000"/>
    </style:style>
    <style:style style:name="P148" style:parent-style-name="Standard" style:family="paragraph">
      <style:paragraph-properties fo:margin-top="0.125in" fo:margin-bottom="0.125in" fo:line-height="100%"/>
      <style:text-properties style:font-name="Helvetica Neue" style:font-name-asian="Helvetica Neue" style:font-name-complex="Helvetica Neue" fo:color="#000000"/>
    </style:style>
    <style:style style:name="P149" style:parent-style-name="Standard" style:family="paragraph">
      <style:paragraph-properties fo:margin-top="0.125in" fo:margin-bottom="0.125in" fo:line-height="100%"/>
      <style:text-properties style:font-name="Helvetica Neue" style:font-name-asian="Helvetica Neue" style:font-name-complex="Helvetica Neue" fo:color="#000000"/>
    </style:style>
    <style:style style:name="P150" style:parent-style-name="Standard" style:family="paragraph">
      <style:paragraph-properties fo:keep-with-next="always" fo:keep-together="always" fo:text-align="justify" fo:margin-top="0.25in" fo:margin-bottom="0.0555in"/>
    </style:style>
    <style:style style:name="T151"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152" style:parent-style-name="Standard" style:family="paragraph">
      <style:paragraph-properties fo:text-align="justify" fo:margin-top="0.125in" fo:margin-bottom="0.125in"/>
    </style:style>
    <style:style style:name="T153"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54"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55"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56"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57" style:parent-style-name="DefaultParagraphFont" style:family="text">
      <style:text-properties style:font-name="Helvetica Neue" fo:font-size="10pt" style:font-size-asian="10pt"/>
    </style:style>
    <style:style style:name="T158"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159" style:parent-style-name="Standard" style:family="paragraph">
      <style:paragraph-properties fo:text-align="justify" fo:margin-top="0.125in" fo:margin-bottom="0.125in"/>
    </style:style>
    <style:style style:name="T160"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61"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62"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163" style:parent-style-name="Standard" style:family="paragraph">
      <style:paragraph-properties fo:text-align="justify" fo:margin-top="0.125in" fo:margin-bottom="0.125in"/>
    </style:style>
    <style:style style:name="T164"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65"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66" style:parent-style-name="DefaultParagraphFont" style:family="text">
      <style:text-properties style:font-name="Helvetica Neue" fo:font-size="10pt" style:font-size-asian="10pt"/>
    </style:style>
    <style:style style:name="T167"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68"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69"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70" style:parent-style-name="DefaultParagraphFont" style:family="text">
      <style:text-properties style:font-name="Helvetica Neue" fo:font-size="10pt" style:font-size-asian="10pt"/>
    </style:style>
    <style:style style:name="T171"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72"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173" style:parent-style-name="Standard" style:family="paragraph">
      <style:paragraph-properties fo:text-align="justify" fo:margin-top="0.125in" fo:margin-bottom="0.125in"/>
    </style:style>
    <style:style style:name="T174"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75" style:parent-style-name="DefaultParagraphFont" style:family="text">
      <style:text-properties style:font-name="Helvetica Neue" fo:font-size="10pt" style:font-size-asian="10pt"/>
    </style:style>
    <style:style style:name="T176"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77" style:parent-style-name="DefaultParagraphFont" style:family="text">
      <style:text-properties style:font-name="Helvetica Neue" fo:font-size="10pt" style:font-size-asian="10pt"/>
    </style:style>
    <style:style style:name="T178"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79"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80"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81" style:parent-style-name="DefaultParagraphFont" style:family="text">
      <style:text-properties style:font-name="Helvetica Neue" fo:font-size="10pt" style:font-size-asian="10pt"/>
    </style:style>
    <style:style style:name="T182"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183" style:parent-style-name="Standard" style:family="paragraph">
      <style:paragraph-properties fo:text-align="justify" fo:margin-top="0.125in" fo:margin-bottom="0.125in"/>
    </style:style>
    <style:style style:name="T184"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85"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86" style:parent-style-name="DefaultParagraphFont" style:family="text">
      <style:text-properties style:font-name="Helvetica Neue" fo:font-size="10pt" style:font-size-asian="10pt"/>
    </style:style>
    <style:style style:name="T187"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88" style:parent-style-name="DefaultParagraphFont" style:family="text">
      <style:text-properties style:font-name="Helvetica Neue" fo:font-size="10pt" style:font-size-asian="10pt"/>
    </style:style>
    <style:style style:name="T189"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190" style:parent-style-name="DefaultParagraphFont" style:family="text">
      <style:text-properties style:font-name="Helvetica Neue" fo:font-size="10pt" style:font-size-asian="10pt"/>
    </style:style>
    <style:style style:name="T191"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192" style:parent-style-name="Standard" style:family="paragraph">
      <style:paragraph-properties fo:text-align="justify" fo:margin-top="0.125in" fo:margin-bottom="0.125in"/>
    </style:style>
    <style:style style:name="T193" style:parent-style-name="DefaultParagraphFont" style:family="text">
      <style:text-properties style:font-name="Helvetica Neue" style:font-name-asian="Helvetica Neue" style:font-name-complex="Helvetica Neue" fo:font-size="10pt" style:font-size-asian="10pt" style:font-size-complex="10pt"/>
    </style:style>
    <style:style style:name="T194" style:parent-style-name="DefaultParagraphFont" style:family="text">
      <style:text-properties style:font-name="Helvetica Neue" style:font-name-asian="Helvetica Neue" style:font-name-complex="Helvetica Neue" fo:font-size="10pt" style:font-size-asian="10pt" style:font-size-complex="10pt"/>
    </style:style>
    <style:style style:name="T195" style:parent-style-name="DefaultParagraphFont" style:family="text">
      <style:text-properties style:font-name="Helvetica Neue" style:font-name-asian="Helvetica Neue" style:font-name-complex="Helvetica Neue" fo:font-size="10pt" style:font-size-asian="10pt" style:font-size-complex="10pt"/>
    </style:style>
    <style:style style:name="P196" style:parent-style-name="Standard" style:family="paragraph">
      <style:paragraph-properties fo:keep-with-next="always" fo:keep-together="always" fo:text-align="justify" fo:margin-top="0.25in" fo:margin-bottom="0.0555in" fo:line-height="115%"/>
    </style:style>
    <style:style style:name="T197"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198" style:parent-style-name="Standard" style:family="paragraph">
      <style:paragraph-properties fo:keep-with-next="always" fo:keep-together="always" fo:text-align="justify" fo:margin-top="0.1111in" fo:margin-bottom="0.0555in" fo:line-height="115%"/>
    </style:style>
    <style:style style:name="T199"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200" style:parent-style-name="Standard" style:family="paragraph">
      <style:paragraph-properties fo:text-align="justify"/>
    </style:style>
    <style:style style:name="T201"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T202"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T203"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T204"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T205"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P206" style:parent-style-name="Standard" style:family="paragraph">
      <style:paragraph-properties fo:text-align="justify"/>
      <style:text-properties style:font-name="Helvetica Neue" style:font-name-asian="Helvetica Neue" style:font-name-complex="Helvetica Neue" fo:color="#0E0E0E" fo:font-size="10pt" style:font-size-asian="10pt" style:font-size-complex="10pt"/>
    </style:style>
    <style:style style:name="P207" style:parent-style-name="Standard" style:family="paragraph">
      <style:paragraph-properties fo:text-align="justify"/>
    </style:style>
    <style:style style:name="T208"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T209"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T210" style:parent-style-name="DefaultParagraphFont" style:family="text">
      <style:text-properties style:font-name="Helvetica Neue" style:font-name-asian="Helvetica Neue" style:font-name-complex="Helvetica Neue" fo:font-size="10pt" style:font-size-asian="10pt" style:font-size-complex="10pt"/>
    </style:style>
    <style:style style:name="T211"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T212"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T213" style:parent-style-name="DefaultParagraphFont" style:family="text">
      <style:text-properties style:font-name="Helvetica Neue" fo:font-size="10pt" style:font-size-asian="10pt" style:font-size-complex="10pt"/>
    </style:style>
    <style:style style:name="P214" style:parent-style-name="Standard" style:family="paragraph">
      <style:paragraph-properties fo:keep-with-next="always" fo:keep-together="always" fo:text-align="justify" fo:margin-top="0.1111in" fo:margin-bottom="0.0555in" fo:line-height="115%"/>
    </style:style>
    <style:style style:name="T215"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216" style:parent-style-name="Standard" style:family="paragraph">
      <style:paragraph-properties fo:text-align="justify"/>
    </style:style>
    <style:style style:name="T217"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T218"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P219" style:parent-style-name="Standard" style:family="paragraph">
      <style:paragraph-properties fo:keep-with-next="always" fo:keep-together="always" fo:text-align="justify" fo:margin-top="0.1111in" fo:margin-bottom="0.0555in" fo:line-height="115%"/>
    </style:style>
    <style:style style:name="T220"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221" style:parent-style-name="Standard" style:family="paragraph">
      <style:paragraph-properties fo:text-align="justify"/>
    </style:style>
    <style:style style:name="T222" style:parent-style-name="DefaultParagraphFont" style:family="text">
      <style:text-properties style:font-name="Helvetica Neue" style:font-name-asian="Helvetica Neue" style:font-name-complex="Helvetica Neue" fo:font-size="10pt" style:font-size-asian="10pt" style:font-size-complex="10pt"/>
    </style:style>
    <style:style style:name="T223" style:parent-style-name="DefaultParagraphFont" style:family="text">
      <style:text-properties style:font-name="Helvetica Neue" fo:font-size="10pt" style:font-size-asian="10pt"/>
    </style:style>
    <style:style style:name="T224" style:parent-style-name="DefaultParagraphFont" style:family="text">
      <style:text-properties style:font-name="Helvetica Neue" style:font-name-asian="Helvetica Neue" style:font-name-complex="Helvetica Neue" fo:font-size="10pt" style:font-size-asian="10pt" style:font-size-complex="10pt"/>
    </style:style>
    <style:style style:name="T225" style:parent-style-name="DefaultParagraphFont" style:family="text">
      <style:text-properties style:font-name="Helvetica Neue" style:font-name-asian="Helvetica Neue" style:font-name-complex="Helvetica Neue" fo:font-size="10pt" style:font-size-asian="10pt" style:font-size-complex="10pt"/>
    </style:style>
    <style:style style:name="P226"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27" style:parent-style-name="Standard" style:family="paragraph">
      <style:paragraph-properties fo:text-align="justify"/>
    </style:style>
    <style:style style:name="T228" style:parent-style-name="DefaultParagraphFont" style:family="text">
      <style:text-properties style:font-name="Helvetica Neue" style:font-name-asian="Helvetica Neue" style:font-name-complex="Helvetica Neue" fo:font-size="10pt" style:font-size-asian="10pt" style:font-size-complex="10pt"/>
    </style:style>
    <style:style style:name="P229"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30" style:parent-style-name="Standard" style:family="paragraph">
      <style:paragraph-properties fo:text-align="justify"/>
    </style:style>
    <style:style style:name="T231" style:parent-style-name="DefaultParagraphFont" style:family="text">
      <style:text-properties style:font-name="Helvetica Neue" style:font-name-asian="Helvetica Neue" style:font-name-complex="Helvetica Neue" fo:font-size="10pt" style:font-size-asian="10pt" style:font-size-complex="10pt"/>
    </style:style>
    <style:style style:name="T232" style:parent-style-name="DefaultParagraphFont" style:family="text">
      <style:text-properties style:font-name="Helvetica Neue" style:font-name-asian="Helvetica Neue" style:font-name-complex="Helvetica Neue" fo:font-size="10pt" style:font-size-asian="10pt" style:font-size-complex="10pt"/>
    </style:style>
    <style:style style:name="P233"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34" style:parent-style-name="Standard" style:family="paragraph">
      <style:paragraph-properties fo:text-align="justify"/>
    </style:style>
    <style:style style:name="T235" style:parent-style-name="DefaultParagraphFont" style:family="text">
      <style:text-properties style:font-name="Helvetica Neue" style:font-name-asian="Helvetica Neue" style:font-name-complex="Helvetica Neue" fo:font-size="10pt" style:font-size-asian="10pt" style:font-size-complex="10pt"/>
    </style:style>
    <style:style style:name="T236" style:parent-style-name="DefaultParagraphFont" style:family="text">
      <style:text-properties style:font-name="Helvetica Neue" style:font-name-asian="Helvetica Neue" style:font-name-complex="Helvetica Neue" fo:font-size="10pt" style:font-size-asian="10pt" style:font-size-complex="10pt"/>
    </style:style>
    <style:style style:name="P237" style:parent-style-name="Standard" style:family="paragraph">
      <style:paragraph-properties fo:text-align="justify"/>
      <style:text-properties fo:font-size="12pt" style:font-size-asian="12pt" style:font-size-complex="12pt"/>
    </style:style>
    <style:style style:name="P238"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39" style:parent-style-name="Standard" style:family="paragraph">
      <style:paragraph-properties fo:text-align="justify"/>
    </style:style>
    <style:style style:name="P240" style:parent-style-name="Standard" style:family="paragraph">
      <style:paragraph-properties fo:text-align="justify" fo:line-height="100%"/>
    </style:style>
    <style:style style:name="T241" style:parent-style-name="DefaultParagraphFont" style:family="text">
      <style:text-properties style:font-name="Helvetica Neue" style:font-name-asian="Helvetica Neue" style:font-name-complex="Helvetica Neue" fo:font-size="10pt" style:font-size-asian="10pt" style:font-size-complex="10pt"/>
    </style:style>
    <style:style style:name="T242" style:parent-style-name="DefaultParagraphFont" style:family="text">
      <style:text-properties style:font-name="Helvetica Neue" style:font-name-asian="Helvetica Neue" style:font-name-complex="Helvetica Neue" fo:font-size="9pt" style:font-size-asian="9pt" style:font-size-complex="9pt"/>
    </style:style>
    <style:style style:name="T243" style:parent-style-name="DefaultParagraphFont" style:family="text">
      <style:text-properties style:font-name="Helvetica Neue" style:font-name-asian="Helvetica Neue" style:font-name-complex="Helvetica Neue" fo:font-size="9pt" style:font-size-asian="9pt" style:font-size-complex="9pt"/>
    </style:style>
    <style:style style:name="T244" style:parent-style-name="DefaultParagraphFont" style:family="text">
      <style:text-properties style:font-name="Helvetica Neue" style:font-name-asian="Helvetica Neue" style:font-name-complex="Helvetica Neue" fo:font-size="9pt" style:font-size-asian="9pt" style:font-size-complex="9pt"/>
    </style:style>
    <style:style style:name="P245"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46"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47"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48"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49"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50"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51" style:parent-style-name="Standard" style:family="paragraph">
      <style:paragraph-properties fo:text-align="justify"/>
    </style:style>
    <style:style style:name="P252" style:parent-style-name="Standard" style:family="paragraph">
      <style:paragraph-properties fo:text-align="justify" fo:line-height="100%"/>
    </style:style>
    <style:style style:name="T253" style:parent-style-name="DefaultParagraphFont" style:family="text">
      <style:text-properties style:font-name="Helvetica Neue" style:font-name-asian="Helvetica Neue" style:font-name-complex="Helvetica Neue" fo:font-weight="bold" style:font-weight-asian="bold" style:font-weight-complex="bold" fo:font-size="9pt" style:font-size-asian="9pt" style:font-size-complex="9pt"/>
    </style:style>
    <style:style style:name="T254" style:parent-style-name="DefaultParagraphFont" style:family="text">
      <style:text-properties style:font-name="Arial Unicode MS" style:font-name-asian="Arial Unicode MS" style:font-name-complex="Arial Unicode MS" fo:font-size="9pt" style:font-size-asian="9pt" style:font-size-complex="9pt"/>
    </style:style>
    <style:style style:name="T255" style:parent-style-name="DefaultParagraphFont" style:family="text">
      <style:text-properties style:font-name="Arial Unicode MS" style:font-name-asian="Arial Unicode MS" style:font-name-complex="Arial Unicode MS" fo:font-size="9pt" style:font-size-asian="9pt" style:font-size-complex="9pt"/>
    </style:style>
    <style:style style:name="P256"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57" style:parent-style-name="Standard" style:family="paragraph">
      <style:paragraph-properties fo:keep-with-next="always" fo:keep-together="always" fo:text-align="justify" fo:margin-top="0.1111in" fo:margin-bottom="0.0555in" fo:line-height="115%"/>
    </style:style>
    <style:style style:name="T258"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259" style:parent-style-name="Standard" style:family="paragraph">
      <style:paragraph-properties fo:text-align="justify" fo:margin-top="0.125in" fo:margin-bottom="0.125in" fo:line-height="100%"/>
    </style:style>
    <style:style style:name="T260"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261"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262"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263"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264" style:parent-style-name="Standard" style:family="paragraph">
      <style:paragraph-properties fo:text-align="justify" fo:margin-top="0.125in" fo:margin-bottom="0.125in" fo:line-height="100%"/>
    </style:style>
    <style:style style:name="T265"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266"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267"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268" style:parent-style-name="Standard" style:family="paragraph">
      <style:paragraph-properties fo:keep-with-next="always" fo:keep-together="always" fo:text-align="justify" fo:margin-top="0.1111in" fo:margin-bottom="0.0555in" fo:line-height="115%"/>
    </style:style>
    <style:style style:name="T269"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270" style:parent-style-name="Standard" style:family="paragraph">
      <style:paragraph-properties fo:text-align="justify" fo:margin-top="0.125in" fo:margin-bottom="0.125in" fo:line-height="100%"/>
    </style:style>
    <style:style style:name="T271"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272"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273" style:parent-style-name="Standard" style:family="paragraph">
      <style:paragraph-properties fo:keep-with-next="always" fo:keep-together="always" fo:text-align="justify" fo:margin-top="0.1111in" fo:margin-bottom="0.0555in" fo:line-height="115%"/>
    </style:style>
    <style:style style:name="T274"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T277" style:parent-style-name="DefaultParagraphFont" style:family="text">
      <style:text-properties style:font-name="Helvetica Neue" style:font-name-asian="Helvetica Neue" style:font-name-complex="Helvetica Neue" fo:font-size="10pt" style:font-size-asian="10pt" style:font-size-complex="10pt"/>
    </style:style>
    <style:style style:name="T278" style:parent-style-name="DefaultParagraphFont" style:family="text">
      <style:text-properties style:font-name="Helvetica Neue" style:font-name-asian="Helvetica Neue" style:font-name-complex="Helvetica Neue" fo:font-size="10pt" style:font-size-asian="10pt" style:font-size-complex="10pt"/>
    </style:style>
    <style:style style:name="T279" style:parent-style-name="DefaultParagraphFont" style:family="text">
      <style:text-properties style:font-name="Helvetica Neue" style:font-name-asian="Helvetica Neue" style:font-name-complex="Helvetica Neue" fo:font-size="10pt" style:font-size-asian="10pt" style:font-size-complex="10pt"/>
    </style:style>
    <style:style style:name="T280" style:parent-style-name="DefaultParagraphFont" style:family="text">
      <style:text-properties style:font-name="Helvetica Neue" style:font-name-asian="Helvetica Neue" style:font-name-complex="Helvetica Neue" style:text-position="super 65%" fo:font-size="10pt" style:font-size-asian="10pt" style:font-size-complex="10pt"/>
    </style:style>
    <style:style style:name="T281" style:parent-style-name="DefaultParagraphFont" style:family="text">
      <style:text-properties style:font-name="Helvetica Neue" style:font-name-asian="Helvetica Neue" style:font-name-complex="Helvetica Neue" fo:font-size="10pt" style:font-size-asian="10pt" style:font-size-complex="10pt"/>
    </style:style>
    <style:style style:name="T282" style:parent-style-name="DefaultParagraphFont" style:family="text">
      <style:text-properties style:font-name="Helvetica Neue" style:font-name-asian="Helvetica Neue" style:font-name-complex="Helvetica Neue" fo:font-size="10pt" style:font-size-asian="10pt" style:font-size-complex="10pt"/>
    </style:style>
    <style:style style:name="T283" style:parent-style-name="DefaultParagraphFont" style:family="text">
      <style:text-properties style:font-name="Helvetica Neue" style:font-name-asian="Helvetica Neue" style:font-name-complex="Helvetica Neue" fo:font-size="10pt" style:font-size-asian="10pt" style:font-size-complex="10pt"/>
    </style:style>
    <style:style style:name="T284" style:parent-style-name="DefaultParagraphFont" style:family="text">
      <style:text-properties style:font-name="Helvetica Neue" style:font-name-asian="Helvetica Neue" style:font-name-complex="Helvetica Neue" fo:font-size="10pt" style:font-size-asian="10pt" style:font-size-complex="10pt"/>
    </style:style>
    <style:style style:name="T285" style:parent-style-name="DefaultParagraphFont" style:family="text">
      <style:text-properties style:font-name="Helvetica Neue" style:font-name-asian="Helvetica Neue" style:font-name-complex="Helvetica Neue" fo:font-size="10pt" style:font-size-asian="10pt" style:font-size-complex="10pt"/>
    </style:style>
    <style:style style:name="T286" style:parent-style-name="DefaultParagraphFont" style:family="text">
      <style:text-properties style:font-name="Helvetica Neue" style:font-name-asian="Helvetica Neue" style:font-name-complex="Helvetica Neue" fo:font-size="10pt" style:font-size-asian="10pt" style:font-size-complex="10pt"/>
    </style:style>
    <style:style style:name="P287" style:parent-style-name="Standard" style:family="paragraph">
      <style:paragraph-properties fo:keep-with-next="always" fo:keep-together="always" fo:text-align="justify" fo:margin-top="0.1111in" fo:margin-bottom="0.0555in" fo:line-height="115%"/>
    </style:style>
    <style:style style:name="T288"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289" style:parent-style-name="Standard" style:family="paragraph">
      <style:paragraph-properties fo:text-align="justify"/>
    </style:style>
    <style:style style:name="T290" style:parent-style-name="DefaultParagraphFont" style:family="text">
      <style:text-properties style:font-name="Helvetica Neue" style:font-name-asian="Helvetica Neue" style:font-name-complex="Helvetica Neue" fo:font-size="10pt" style:font-size-asian="10pt" style:font-size-complex="10pt"/>
    </style:style>
    <style:style style:name="T291" style:parent-style-name="DefaultParagraphFont" style:family="text">
      <style:text-properties style:font-name="Helvetica Neue" style:font-name-asian="Helvetica Neue" style:font-name-complex="Helvetica Neue" fo:font-size="10pt" style:font-size-asian="10pt" style:font-size-complex="10pt"/>
    </style:style>
    <style:style style:name="T292" style:parent-style-name="DefaultParagraphFont" style:family="text">
      <style:text-properties style:font-name="Helvetica Neue" style:font-name-asian="Helvetica Neue" style:font-name-complex="Helvetica Neue" fo:font-size="10pt" style:font-size-asian="10pt" style:font-size-complex="10pt"/>
    </style:style>
    <style:style style:name="P293"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94" style:parent-style-name="Standard" style:family="paragraph">
      <style:paragraph-properties fo:text-align="center"/>
    </style:style>
    <style:style style:name="P295"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296" style:parent-style-name="Standard" style:family="paragraph">
      <style:paragraph-properties fo:text-align="justify" fo:margin-top="0.125in" fo:margin-bottom="0.125in" fo:line-height="100%"/>
    </style:style>
    <style:style style:name="T297"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298"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299"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300"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301"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302"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303"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304"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305"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306"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307"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308"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309" style:parent-style-name="Standard" style:family="paragraph">
      <style:paragraph-properties fo:keep-with-next="always" fo:keep-together="always" fo:text-align="justify" fo:margin-top="0.1111in" fo:margin-bottom="0.0555in" fo:line-height="115%"/>
    </style:style>
    <style:style style:name="T310"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311" style:parent-style-name="Standard" style:family="paragraph">
      <style:paragraph-properties fo:text-align="justify"/>
    </style:style>
    <style:style style:name="T312" style:parent-style-name="DefaultParagraphFont" style:family="text">
      <style:text-properties style:font-name="Helvetica Neue" style:font-name-asian="Helvetica Neue" style:font-name-complex="Helvetica Neue" fo:font-size="10pt" style:font-size-asian="10pt" style:font-size-complex="10pt"/>
    </style:style>
    <style:style style:name="T313" style:parent-style-name="DefaultParagraphFont" style:family="text">
      <style:text-properties style:font-name="Helvetica Neue" style:font-name-asian="Helvetica Neue" style:font-name-complex="Helvetica Neue" fo:font-size="10pt" style:font-size-asian="10pt" style:font-size-complex="10pt"/>
    </style:style>
    <style:style style:name="T314" style:parent-style-name="DefaultParagraphFont" style:family="text">
      <style:text-properties style:font-name="Helvetica Neue" fo:font-size="10pt" style:font-size-asian="10pt" style:font-size-complex="10pt"/>
    </style:style>
    <style:style style:name="T315" style:parent-style-name="DefaultParagraphFont" style:family="text">
      <style:text-properties style:font-name="Helvetica Neue" style:font-name-asian="Helvetica Neue" style:font-name-complex="Helvetica Neue" fo:font-size="10pt" style:font-size-asian="10pt" style:font-size-complex="10pt"/>
    </style:style>
    <style:style style:name="T316" style:parent-style-name="DefaultParagraphFont" style:family="text">
      <style:text-properties style:font-name="Helvetica Neue" style:font-name-asian="Helvetica Neue" style:font-name-complex="Helvetica Neue" fo:font-size="10pt" style:font-size-asian="10pt" style:font-size-complex="10pt"/>
    </style:style>
    <style:style style:name="T317" style:parent-style-name="DefaultParagraphFont" style:family="text">
      <style:text-properties style:font-name="Helvetica Neue" fo:font-size="10pt" style:font-size-asian="10pt" style:font-size-complex="10pt"/>
    </style:style>
    <style:style style:name="T318" style:parent-style-name="DefaultParagraphFont" style:family="text">
      <style:text-properties style:font-name="Helvetica Neue" style:font-name-asian="Helvetica Neue" style:font-name-complex="Helvetica Neue" fo:font-size="10pt" style:font-size-asian="10pt" style:font-size-complex="10pt"/>
    </style:style>
    <style:style style:name="P319" style:parent-style-name="Standard" style:family="paragraph">
      <style:paragraph-properties fo:keep-with-next="always" fo:keep-together="always" fo:text-align="justify" fo:margin-top="0.1111in" fo:margin-bottom="0.0555in" fo:line-height="115%"/>
    </style:style>
    <style:style style:name="T320"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321" style:parent-style-name="Standard" style:family="paragraph">
      <style:paragraph-properties fo:text-align="justify"/>
    </style:style>
    <style:style style:name="T322" style:parent-style-name="DefaultParagraphFont" style:family="text">
      <style:text-properties style:font-name="Helvetica Neue" style:font-name-asian="Helvetica Neue" style:font-name-complex="Helvetica Neue" fo:font-size="10pt" style:font-size-asian="10pt" style:font-size-complex="10pt"/>
    </style:style>
    <style:style style:name="T323" style:parent-style-name="DefaultParagraphFont" style:family="text">
      <style:text-properties style:font-name="Helvetica Neue" style:font-name-asian="Helvetica Neue" style:font-name-complex="Helvetica Neue" fo:font-size="10pt" style:font-size-asian="10pt" style:font-size-complex="10pt"/>
    </style:style>
    <style:style style:name="T324" style:parent-style-name="DefaultParagraphFont" style:family="text">
      <style:text-properties style:font-name="Helvetica Neue" style:font-name-asian="Helvetica Neue" style:font-name-complex="Helvetica Neue" fo:font-size="10pt" style:font-size-asian="10pt" style:font-size-complex="10pt"/>
    </style:style>
    <style:style style:name="T325" style:parent-style-name="DefaultParagraphFont" style:family="text">
      <style:text-properties style:font-name="Helvetica Neue" style:font-name-asian="Helvetica Neue" style:font-name-complex="Helvetica Neue" fo:font-size="10pt" style:font-size-asian="10pt" style:font-size-complex="10pt"/>
    </style:style>
    <style:style style:name="P326"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327" style:parent-style-name="Standard" style:family="paragraph">
      <style:paragraph-properties fo:keep-with-next="always" fo:keep-together="always" fo:text-align="justify" fo:margin-top="0.1111in" fo:margin-bottom="0.0555in" fo:line-height="115%"/>
    </style:style>
    <style:style style:name="T328"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329" style:parent-style-name="Standard" style:family="paragraph">
      <style:paragraph-properties fo:text-align="justify" fo:margin-top="0.1111in" fo:margin-bottom="0.0555in" fo:line-height="115%"/>
    </style:style>
    <style:style style:name="T330"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331"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T332" style:parent-style-name="DefaultParagraphFont" style:family="text">
      <style:text-properties style:font-name="Helvetica Neue" style:font-name-asian="Helvetica Neue" style:font-name-complex="Helvetica Neue" fo:color="#000000" fo:font-size="10pt" style:font-size-asian="10pt" style:font-size-complex="10pt"/>
    </style:style>
    <style:style style:name="P333" style:parent-style-name="Standard" style:family="paragraph">
      <style:paragraph-properties fo:keep-with-next="always" fo:keep-together="always" fo:text-align="justify" fo:margin-top="0.1111in" fo:margin-bottom="0.0555in" fo:line-height="115%"/>
    </style:style>
    <style:style style:name="T334"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335" style:parent-style-name="Standard" style:family="paragraph">
      <style:paragraph-properties fo:text-align="justify"/>
    </style:style>
    <style:style style:name="T336" style:parent-style-name="DefaultParagraphFont" style:family="text">
      <style:text-properties style:font-name="Helvetica Neue" style:font-name-asian="Helvetica Neue" style:font-name-complex="Helvetica Neue" fo:font-size="10pt" style:font-size-asian="10pt" style:font-size-complex="10pt"/>
    </style:style>
    <style:style style:name="T337" style:parent-style-name="DefaultParagraphFont" style:family="text">
      <style:text-properties style:font-name="Helvetica Neue" style:font-name-asian="Helvetica Neue" style:font-name-complex="Helvetica Neue" fo:font-size="10pt" style:font-size-asian="10pt" style:font-size-complex="10pt"/>
    </style:style>
    <style:style style:name="T338" style:parent-style-name="DefaultParagraphFont" style:family="text">
      <style:text-properties style:font-name="Helvetica Neue" style:font-name-asian="Helvetica Neue" style:font-name-complex="Helvetica Neue" fo:font-size="10pt" style:font-size-asian="10pt" style:font-size-complex="10pt"/>
    </style:style>
    <style:style style:name="T339" style:parent-style-name="DefaultParagraphFont" style:family="text">
      <style:text-properties style:font-name="Helvetica Neue" style:font-name-asian="Helvetica Neue" style:font-name-complex="Helvetica Neue" fo:font-size="10pt" style:font-size-asian="10pt" style:font-size-complex="10pt"/>
    </style:style>
    <style:style style:name="T340" style:parent-style-name="DefaultParagraphFont" style:family="text">
      <style:text-properties style:font-name="Helvetica Neue" style:font-name-asian="Helvetica Neue" style:font-name-complex="Helvetica Neue" fo:font-size="10pt" style:font-size-asian="10pt" style:font-size-complex="10pt"/>
    </style:style>
    <style:style style:name="P341"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342" style:parent-style-name="Standard" style:family="paragraph">
      <style:paragraph-properties fo:text-align="justify"/>
    </style:style>
    <style:style style:name="P343" style:parent-style-name="Standard" style:family="paragraph">
      <style:paragraph-properties fo:text-align="justify" fo:margin-top="0.125in" fo:margin-bottom="0.125in" fo:line-height="100%"/>
    </style:style>
    <style:style style:name="T344" style:parent-style-name="DefaultParagraphFont" style:family="text">
      <style:text-properties style:font-name="Helvetica Neue" style:font-name-asian="Helvetica Neue" style:font-name-complex="Helvetica Neue" fo:color="#000000" fo:font-size="9pt" style:font-size-asian="9pt" style:font-size-complex="9pt"/>
    </style:style>
    <style:style style:name="T345" style:parent-style-name="DefaultParagraphFont" style:family="text">
      <style:text-properties style:font-name="Helvetica Neue" style:font-name-asian="Helvetica Neue" style:font-name-complex="Helvetica Neue" fo:color="#000000" fo:font-size="9pt" style:font-size-asian="9pt" style:font-size-complex="9pt"/>
    </style:style>
    <style:style style:name="P346"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347" style:parent-style-name="Standard" style:family="paragraph">
      <style:paragraph-properties fo:text-align="justify"/>
    </style:style>
    <style:style style:name="T348" style:parent-style-name="DefaultParagraphFont" style:family="text">
      <style:text-properties style:font-name="Helvetica Neue" style:font-name-asian="Helvetica Neue" style:font-name-complex="Helvetica Neue" fo:font-weight="bold" style:font-weight-asian="bold" style:font-weight-complex="bold" fo:font-size="10pt" style:font-size-asian="10pt" style:font-size-complex="10pt"/>
    </style:style>
    <style:style style:name="P349" style:parent-style-name="Standard" style:family="paragraph">
      <style:paragraph-properties fo:text-align="justify"/>
    </style:style>
    <style:style style:name="T350" style:parent-style-name="DefaultParagraphFont" style:family="text">
      <style:text-properties style:font-name="Helvetica Neue" style:font-name-asian="Helvetica Neue" style:font-name-complex="Helvetica Neue" fo:font-size="10pt" style:font-size-asian="10pt" style:font-size-complex="10pt"/>
    </style:style>
    <style:style style:name="T351" style:parent-style-name="DefaultParagraphFont" style:family="text">
      <style:text-properties style:font-name="Helvetica Neue" style:font-name-asian="Helvetica Neue" style:font-name-complex="Helvetica Neue" fo:font-size="10pt" style:font-size-asian="10pt" style:font-size-complex="10pt"/>
    </style:style>
    <style:style style:name="T352" style:parent-style-name="DefaultParagraphFont" style:family="text">
      <style:text-properties style:font-name="Helvetica Neue" style:font-name-asian="Helvetica Neue" style:font-name-complex="Helvetica Neue" fo:font-size="10pt" style:font-size-asian="10pt" style:font-size-complex="10pt"/>
    </style:style>
    <style:style style:name="P353"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354" style:parent-style-name="Standard" style:family="paragraph">
      <style:paragraph-properties fo:text-align="justify"/>
    </style:style>
    <style:style style:name="T355" style:parent-style-name="DefaultParagraphFont" style:family="text">
      <style:text-properties style:font-name="Helvetica Neue" style:font-name-asian="Helvetica Neue" style:font-name-complex="Helvetica Neue" fo:font-size="10pt" style:font-size-asian="10pt" style:font-size-complex="10pt"/>
    </style:style>
    <style:style style:name="T356" style:parent-style-name="DefaultParagraphFont" style:family="text">
      <style:text-properties style:font-name="Helvetica Neue" style:font-name-asian="Helvetica Neue" style:font-name-complex="Helvetica Neue" fo:font-size="10pt" style:font-size-asian="10pt" style:font-size-complex="10pt"/>
    </style:style>
    <style:style style:name="T357" style:parent-style-name="DefaultParagraphFont" style:family="text">
      <style:text-properties style:font-name="Helvetica Neue" style:font-name-asian="Helvetica Neue" style:font-name-complex="Helvetica Neue" fo:font-size="10pt" style:font-size-asian="10pt" style:font-size-complex="10pt"/>
    </style:style>
    <style:style style:name="T358" style:parent-style-name="DefaultParagraphFont" style:family="text">
      <style:text-properties style:font-name="Helvetica Neue" style:font-name-asian="Helvetica Neue" style:font-name-complex="Helvetica Neue" style:text-position="super 65%" fo:font-size="10pt" style:font-size-asian="10pt" style:font-size-complex="10pt"/>
    </style:style>
    <style:style style:name="T359" style:parent-style-name="DefaultParagraphFont" style:family="text">
      <style:text-properties style:font-name="Helvetica Neue" style:font-name-asian="Helvetica Neue" style:font-name-complex="Helvetica Neue" fo:font-size="10pt" style:font-size-asian="10pt" style:font-size-complex="10pt"/>
    </style:style>
    <style:style style:name="T360" style:parent-style-name="DefaultParagraphFont" style:family="text">
      <style:text-properties style:font-name="Helvetica Neue" style:font-name-asian="Helvetica Neue" style:font-name-complex="Helvetica Neue" fo:font-size="10pt" style:font-size-asian="10pt" style:font-size-complex="10pt"/>
    </style:style>
    <style:style style:name="T361" style:parent-style-name="DefaultParagraphFont" style:family="text">
      <style:text-properties style:font-name="Helvetica Neue" style:font-name-asian="Helvetica Neue" style:font-name-complex="Helvetica Neue" fo:font-size="10pt" style:font-size-asian="10pt" style:font-size-complex="10pt"/>
    </style:style>
    <style:style style:name="T362" style:parent-style-name="DefaultParagraphFont" style:family="text">
      <style:text-properties style:font-name="Helvetica Neue" style:font-name-asian="Helvetica Neue" style:font-name-complex="Helvetica Neue" fo:font-size="10pt" style:font-size-asian="10pt" style:font-size-complex="10pt"/>
    </style:style>
    <style:style style:name="T363" style:parent-style-name="DefaultParagraphFont" style:family="text">
      <style:text-properties style:font-name="Helvetica Neue" style:font-name-asian="Helvetica Neue" style:font-name-complex="Helvetica Neue" fo:font-size="10pt" style:font-size-asian="10pt" style:font-size-complex="10pt"/>
    </style:style>
    <style:style style:name="T364" style:parent-style-name="DefaultParagraphFont" style:family="text">
      <style:text-properties style:font-name="Helvetica Neue" style:font-name-asian="Helvetica Neue" style:font-name-complex="Helvetica Neue" fo:font-size="10pt" style:font-size-asian="10pt" style:font-size-complex="10pt"/>
    </style:style>
    <style:style style:name="T365" style:parent-style-name="DefaultParagraphFont" style:family="text">
      <style:text-properties style:font-name="Helvetica Neue" style:font-name-asian="Helvetica Neue" style:font-name-complex="Helvetica Neue" fo:font-size="10pt" style:font-size-asian="10pt" style:font-size-complex="10pt"/>
    </style:style>
    <style:style style:name="P366"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367" style:parent-style-name="Standard" style:family="paragraph">
      <style:paragraph-properties fo:text-align="justify"/>
    </style:style>
    <style:style style:name="P368" style:parent-style-name="Standard" style:family="paragraph">
      <style:paragraph-properties fo:text-align="justify"/>
      <style:text-properties style:font-name="Helvetica Neue" style:font-name-asian="Helvetica Neue" style:font-name-complex="Helvetica Neue" fo:font-size="9pt" style:font-size-asian="9pt" style:font-size-complex="9pt"/>
    </style:style>
    <style:style style:name="P369" style:parent-style-name="Standard" style:family="paragraph">
      <style:paragraph-properties fo:text-align="justify"/>
    </style:style>
    <style:style style:name="T370" style:parent-style-name="DefaultParagraphFont" style:family="text">
      <style:text-properties style:font-name="Helvetica Neue" style:font-name-asian="Helvetica Neue" style:font-name-complex="Helvetica Neue" fo:font-weight="bold" style:font-weight-asian="bold" style:font-weight-complex="bold" fo:font-size="9pt" style:font-size-asian="9pt" style:font-size-complex="9pt"/>
    </style:style>
    <style:style style:name="T371" style:parent-style-name="DefaultParagraphFont" style:family="text">
      <style:text-properties style:font-name="Helvetica Neue" style:font-name-asian="Helvetica Neue" style:font-name-complex="Helvetica Neue" fo:font-size="9pt" style:font-size-asian="9pt" style:font-size-complex="9pt"/>
    </style:style>
    <style:style style:name="T372" style:parent-style-name="DefaultParagraphFont" style:family="text">
      <style:text-properties style:font-name="Helvetica Neue" style:font-name-asian="Helvetica Neue" style:font-name-complex="Helvetica Neue" fo:font-size="9pt" style:font-size-asian="9pt" style:font-size-complex="9pt"/>
    </style:style>
    <style:style style:name="T373" style:parent-style-name="DefaultParagraphFont" style:family="text">
      <style:text-properties style:font-name="Helvetica Neue" style:font-name-asian="Helvetica Neue" style:font-name-complex="Helvetica Neue" fo:font-size="9pt" style:font-size-asian="9pt" style:font-size-complex="9pt"/>
    </style:style>
    <style:style style:name="T374" style:parent-style-name="DefaultParagraphFont" style:family="text">
      <style:text-properties style:font-name="Helvetica Neue" style:font-name-asian="Helvetica Neue" style:font-name-complex="Helvetica Neue" style:text-position="super 66.6%" fo:font-size="9pt" style:font-size-asian="9pt" style:font-size-complex="9pt"/>
    </style:style>
    <style:style style:name="T375" style:parent-style-name="DefaultParagraphFont" style:family="text">
      <style:text-properties style:font-name="Helvetica Neue" style:font-name-asian="Helvetica Neue" style:font-name-complex="Helvetica Neue" fo:font-size="9pt" style:font-size-asian="9pt" style:font-size-complex="9pt"/>
    </style:style>
    <style:style style:name="T376" style:parent-style-name="DefaultParagraphFont" style:family="text">
      <style:text-properties style:font-name="Helvetica Neue" style:font-name-asian="Helvetica Neue" style:font-name-complex="Helvetica Neue" fo:font-size="9pt" style:font-size-asian="9pt" style:font-size-complex="9pt"/>
    </style:style>
    <style:style style:name="T377" style:parent-style-name="DefaultParagraphFont" style:family="text">
      <style:text-properties style:font-name="Helvetica Neue" style:font-name-asian="Helvetica Neue" style:font-name-complex="Helvetica Neue" fo:font-size="9pt" style:font-size-asian="9pt" style:font-size-complex="9pt"/>
    </style:style>
    <style:style style:name="P378"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379" style:parent-style-name="Standard" style:family="paragraph">
      <style:paragraph-properties fo:keep-with-next="always" fo:keep-together="always" fo:text-align="justify" fo:margin-top="0.1111in" fo:margin-bottom="0.0555in" fo:line-height="115%"/>
    </style:style>
    <style:style style:name="T380"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381" style:parent-style-name="Standard" style:family="paragraph">
      <style:paragraph-properties fo:text-align="justify"/>
    </style:style>
    <style:style style:name="T382" style:parent-style-name="DefaultParagraphFont" style:family="text">
      <style:text-properties style:font-name="Helvetica Neue" style:font-name-asian="Helvetica Neue" style:font-name-complex="Helvetica Neue" fo:font-size="10pt" style:font-size-asian="10pt" style:font-size-complex="10pt"/>
    </style:style>
    <style:style style:name="T383" style:parent-style-name="DefaultParagraphFont" style:family="text">
      <style:text-properties style:font-name="Helvetica Neue" style:font-name-asian="Helvetica Neue" style:font-name-complex="Helvetica Neue" fo:font-size="10pt" style:font-size-asian="10pt" style:font-size-complex="10pt"/>
    </style:style>
    <style:style style:name="T384" style:parent-style-name="DefaultParagraphFont" style:family="text">
      <style:text-properties style:font-name="Helvetica Neue" style:font-name-asian="Helvetica Neue" style:font-name-complex="Helvetica Neue" fo:font-size="10pt" style:font-size-asian="10pt" style:font-size-complex="10pt"/>
    </style:style>
    <style:style style:name="T385" style:parent-style-name="DefaultParagraphFont" style:family="text">
      <style:text-properties style:font-name="Helvetica Neue" style:font-name-asian="Helvetica Neue" style:font-name-complex="Helvetica Neue" fo:font-size="10pt" style:font-size-asian="10pt" style:font-size-complex="10pt"/>
    </style:style>
    <style:style style:name="P386"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387" style:parent-style-name="Standard" style:family="paragraph">
      <style:paragraph-properties fo:text-align="justify"/>
    </style:style>
    <style:style style:name="T388" style:parent-style-name="DefaultParagraphFont" style:family="text">
      <style:text-properties style:font-name="Helvetica Neue" style:font-name-asian="Helvetica Neue" style:font-name-complex="Helvetica Neue" fo:font-size="10pt" style:font-size-asian="10pt" style:font-size-complex="10pt"/>
    </style:style>
    <style:style style:name="T389" style:parent-style-name="DefaultParagraphFont" style:family="text">
      <style:text-properties style:font-name="Helvetica Neue" style:font-name-asian="Helvetica Neue" style:font-name-complex="Helvetica Neue" fo:font-size="10pt" style:font-size-asian="10pt" style:font-size-complex="10pt"/>
    </style:style>
    <style:style style:name="T390" style:parent-style-name="DefaultParagraphFont" style:family="text">
      <style:text-properties style:font-name="Helvetica Neue" style:font-name-asian="Helvetica Neue" style:font-name-complex="Helvetica Neue" fo:color="#0E0E0E" fo:font-size="10pt" style:font-size-asian="10pt" style:font-size-complex="10pt"/>
    </style:style>
    <style:style style:name="T391" style:parent-style-name="DefaultParagraphFont" style:family="text">
      <style:text-properties style:font-name="Helvetica Neue" style:font-name-asian="Helvetica Neue" style:font-name-complex="Helvetica Neue" fo:font-size="10pt" style:font-size-asian="10pt" style:font-size-complex="10pt"/>
    </style:style>
    <style:style style:name="T392" style:parent-style-name="DefaultParagraphFont" style:family="text">
      <style:text-properties style:font-name="Helvetica Neue" style:font-name-asian="Helvetica Neue" style:font-name-complex="Helvetica Neue" fo:font-size="10pt" style:font-size-asian="10pt" style:font-size-complex="10pt"/>
    </style:style>
    <style:style style:name="T393" style:parent-style-name="DefaultParagraphFont" style:family="text">
      <style:text-properties style:font-name="Helvetica Neue" style:font-name-asian="Helvetica Neue" style:font-name-complex="Helvetica Neue" fo:font-size="10pt" style:font-size-asian="10pt" style:font-size-complex="10pt"/>
    </style:style>
    <style:style style:name="P394" style:parent-style-name="Standard" style:family="paragraph">
      <style:paragraph-properties fo:keep-with-next="always" fo:keep-together="always" fo:text-align="justify" fo:margin-top="0.1111in" fo:margin-bottom="0.0555in" fo:line-height="115%"/>
    </style:style>
    <style:style style:name="T395"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396" style:parent-style-name="Standard" style:family="paragraph">
      <style:paragraph-properties fo:text-align="justify"/>
    </style:style>
    <style:style style:name="T397" style:parent-style-name="DefaultParagraphFont" style:family="text">
      <style:text-properties style:font-name="Helvetica Neue" style:font-name-asian="Helvetica Neue" style:font-name-complex="Helvetica Neue" fo:font-size="10pt" style:font-size-asian="10pt" style:font-size-complex="10pt"/>
    </style:style>
    <style:style style:name="T398" style:parent-style-name="DefaultParagraphFont" style:family="text">
      <style:text-properties style:font-name="Helvetica Neue" style:font-name-asian="Helvetica Neue" style:font-name-complex="Helvetica Neue" fo:font-size="10pt" style:font-size-asian="10pt" style:font-size-complex="10pt"/>
    </style:style>
    <style:style style:name="T399" style:parent-style-name="DefaultParagraphFont" style:family="text">
      <style:text-properties style:font-name="Helvetica Neue" style:font-name-asian="Helvetica Neue" style:font-name-complex="Helvetica Neue" fo:font-size="10pt" style:font-size-asian="10pt" style:font-size-complex="10pt"/>
    </style:style>
    <style:style style:name="T400" style:parent-style-name="DefaultParagraphFont" style:family="text">
      <style:text-properties style:font-name="Helvetica Neue" style:font-name-asian="Helvetica Neue" style:font-name-complex="Helvetica Neue" fo:font-size="10pt" style:font-size-asian="10pt" style:font-size-complex="10pt"/>
    </style:style>
    <style:style style:name="P401"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402" style:parent-style-name="Standard" style:family="paragraph">
      <style:paragraph-properties fo:text-align="justify"/>
    </style:style>
    <style:style style:name="T403" style:parent-style-name="DefaultParagraphFont" style:family="text">
      <style:text-properties style:font-name="Helvetica Neue" style:font-name-asian="Helvetica Neue" style:font-name-complex="Helvetica Neue" fo:font-size="10pt" style:font-size-asian="10pt" style:font-size-complex="10pt"/>
    </style:style>
    <style:style style:name="T404" style:parent-style-name="DefaultParagraphFont" style:family="text">
      <style:text-properties style:font-name="Helvetica Neue" style:font-name-asian="Helvetica Neue" style:font-name-complex="Helvetica Neue" fo:font-size="10pt" style:font-size-asian="10pt" style:font-size-complex="10pt"/>
    </style:style>
    <style:style style:name="P405"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406" style:parent-style-name="Standard" style:family="paragraph">
      <style:paragraph-properties fo:text-align="justify"/>
    </style:style>
    <style:style style:name="T407" style:parent-style-name="DefaultParagraphFont" style:family="text">
      <style:text-properties style:font-name="Helvetica Neue" style:font-name-asian="Helvetica Neue" style:font-name-complex="Helvetica Neue" fo:font-size="10pt" style:font-size-asian="10pt" style:font-size-complex="10pt"/>
    </style:style>
    <style:style style:name="T408" style:parent-style-name="DefaultParagraphFont" style:family="text">
      <style:text-properties style:font-name="Helvetica Neue" style:font-name-asian="Helvetica Neue" style:font-name-complex="Helvetica Neue" fo:font-size="10pt" style:font-size-asian="10pt" style:font-size-complex="10pt"/>
    </style:style>
    <style:style style:name="T409" style:parent-style-name="DefaultParagraphFont" style:family="text">
      <style:text-properties style:font-name="Helvetica Neue" style:font-name-asian="Helvetica Neue" style:font-name-complex="Helvetica Neue" fo:font-size="10pt" style:font-size-asian="10pt" style:font-size-complex="10pt"/>
    </style:style>
    <style:style style:name="T410" style:parent-style-name="DefaultParagraphFont" style:family="text">
      <style:text-properties style:font-name="Helvetica Neue" style:font-name-asian="Helvetica Neue" style:font-name-complex="Helvetica Neue" fo:font-size="10pt" style:font-size-asian="10pt" style:font-size-complex="10pt"/>
    </style:style>
    <style:style style:name="P411" style:parent-style-name="Standard" style:family="paragraph">
      <style:paragraph-properties fo:keep-with-next="always" fo:keep-together="always" fo:text-align="justify" fo:margin-top="0.1111in" fo:margin-bottom="0.0555in" fo:line-height="115%"/>
    </style:style>
    <style:style style:name="T412"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413" style:parent-style-name="Standard" style:family="paragraph">
      <style:paragraph-properties fo:text-align="justify"/>
    </style:style>
    <style:style style:name="T414" style:parent-style-name="DefaultParagraphFont" style:family="text">
      <style:text-properties style:font-name="Helvetica Neue" style:font-name-asian="Helvetica Neue" style:font-name-complex="Helvetica Neue" fo:font-size="10pt" style:font-size-asian="10pt" style:font-size-complex="10pt"/>
    </style:style>
    <style:style style:name="T415" style:parent-style-name="DefaultParagraphFont" style:family="text">
      <style:text-properties style:font-name="Helvetica Neue" style:font-name-asian="Helvetica Neue" style:font-name-complex="Helvetica Neue" fo:font-size="10pt" style:font-size-asian="10pt" style:font-size-complex="10pt"/>
    </style:style>
    <style:style style:name="T416" style:parent-style-name="DefaultParagraphFont" style:family="text">
      <style:text-properties style:font-name="Helvetica Neue" style:font-name-asian="Helvetica Neue" style:font-name-complex="Helvetica Neue" fo:font-size="10pt" style:font-size-asian="10pt" style:font-size-complex="10pt"/>
    </style:style>
    <style:style style:name="T417" style:parent-style-name="DefaultParagraphFont" style:family="text">
      <style:text-properties style:font-name="Helvetica Neue" style:font-name-asian="Helvetica Neue" style:font-name-complex="Helvetica Neue" fo:font-size="10pt" style:font-size-asian="10pt" style:font-size-complex="10pt"/>
    </style:style>
    <style:style style:name="T418" style:parent-style-name="DefaultParagraphFont" style:family="text">
      <style:text-properties style:font-name="Helvetica Neue" style:font-name-asian="Helvetica Neue" style:font-name-complex="Helvetica Neue" fo:font-size="10pt" style:font-size-asian="10pt" style:font-size-complex="10pt"/>
    </style:style>
    <style:style style:name="T419" style:parent-style-name="DefaultParagraphFont" style:family="text">
      <style:text-properties style:font-name="Helvetica Neue" style:font-name-asian="Helvetica Neue" style:font-name-complex="Helvetica Neue" fo:font-size="10pt" style:font-size-asian="10pt" style:font-size-complex="10pt"/>
    </style:style>
    <style:style style:name="T420" style:parent-style-name="DefaultParagraphFont" style:family="text">
      <style:text-properties style:font-name="Helvetica Neue" style:font-name-asian="Helvetica Neue" style:font-name-complex="Helvetica Neue" fo:font-size="10pt" style:font-size-asian="10pt" style:font-size-complex="10pt"/>
    </style:style>
    <style:style style:name="T421" style:parent-style-name="DefaultParagraphFont" style:family="text">
      <style:text-properties style:font-name="Helvetica Neue" style:font-name-asian="Helvetica Neue" style:font-name-complex="Helvetica Neue" fo:font-size="10pt" style:font-size-asian="10pt" style:font-size-complex="10pt"/>
    </style:style>
    <style:style style:name="T422" style:parent-style-name="DefaultParagraphFont" style:family="text">
      <style:text-properties style:font-name="Helvetica Neue" style:font-name-asian="Helvetica Neue" style:font-name-complex="Helvetica Neue" fo:font-size="10pt" style:font-size-asian="10pt" style:font-size-complex="10pt"/>
    </style:style>
    <style:style style:name="T423" style:parent-style-name="DefaultParagraphFont" style:family="text">
      <style:text-properties style:font-name="Helvetica Neue" style:font-name-asian="Helvetica Neue" style:font-name-complex="Helvetica Neue" fo:font-size="10pt" style:font-size-asian="10pt" style:font-size-complex="10pt"/>
    </style:style>
    <style:style style:name="T424" style:parent-style-name="DefaultParagraphFont" style:family="text">
      <style:text-properties style:font-name="Helvetica Neue" style:font-name-asian="Helvetica Neue" style:font-name-complex="Helvetica Neue" fo:font-size="10pt" style:font-size-asian="10pt" style:font-size-complex="10pt"/>
    </style:style>
    <style:style style:name="T425" style:parent-style-name="DefaultParagraphFont" style:family="text">
      <style:text-properties style:font-name="Helvetica Neue" style:font-name-asian="Helvetica Neue" style:font-name-complex="Helvetica Neue" fo:font-size="10pt" style:font-size-asian="10pt" style:font-size-complex="10pt"/>
    </style:style>
    <style:style style:name="T426" style:parent-style-name="DefaultParagraphFont" style:family="text">
      <style:text-properties style:font-name="Helvetica Neue" style:font-name-asian="Helvetica Neue" style:font-name-complex="Helvetica Neue" fo:font-size="10pt" style:font-size-asian="10pt" style:font-size-complex="10pt"/>
    </style:style>
    <style:style style:name="P427"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428" style:parent-style-name="Standard" style:family="paragraph">
      <style:paragraph-properties fo:keep-with-next="always" fo:keep-together="always" fo:text-align="justify" fo:margin-top="0.1111in" fo:margin-bottom="0.0555in" fo:line-height="115%"/>
    </style:style>
    <style:style style:name="T429"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430" style:parent-style-name="Standard" style:family="paragraph">
      <style:paragraph-properties fo:text-align="justify"/>
    </style:style>
    <style:style style:name="T431" style:parent-style-name="DefaultParagraphFont" style:family="text">
      <style:text-properties style:font-name="Helvetica Neue" style:font-name-asian="Helvetica Neue" style:font-name-complex="Helvetica Neue" fo:font-size="10pt" style:font-size-asian="10pt" style:font-size-complex="10pt"/>
    </style:style>
    <style:style style:name="T432" style:parent-style-name="DefaultParagraphFont" style:family="text">
      <style:text-properties style:font-name="Helvetica Neue" style:font-name-asian="Helvetica Neue" style:font-name-complex="Helvetica Neue" fo:font-size="10pt" style:font-size-asian="10pt" style:font-size-complex="10pt"/>
    </style:style>
    <style:style style:name="T433" style:parent-style-name="DefaultParagraphFont" style:family="text">
      <style:text-properties style:font-name="Helvetica Neue" style:font-name-asian="Helvetica Neue" style:font-name-complex="Helvetica Neue" fo:font-size="10pt" style:font-size-asian="10pt" style:font-size-complex="10pt"/>
    </style:style>
    <style:style style:name="T434" style:parent-style-name="DefaultParagraphFont" style:family="text">
      <style:text-properties style:font-name="Helvetica Neue" style:font-name-asian="Helvetica Neue" style:font-name-complex="Helvetica Neue" fo:font-size="10pt" style:font-size-asian="10pt" style:font-size-complex="10pt"/>
    </style:style>
    <style:style style:name="T435" style:parent-style-name="DefaultParagraphFont" style:family="text">
      <style:text-properties style:font-name="Helvetica Neue" style:font-name-asian="Helvetica Neue" style:font-name-complex="Helvetica Neue" fo:font-size="10pt" style:font-size-asian="10pt" style:font-size-complex="10pt"/>
    </style:style>
    <style:style style:name="P436"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437" style:parent-style-name="Standard" style:family="paragraph">
      <style:paragraph-properties fo:text-align="justify"/>
    </style:style>
    <style:style style:name="P438" style:parent-style-name="Standard" style:family="paragraph">
      <style:paragraph-properties fo:text-align="justify" fo:line-height="100%"/>
    </style:style>
    <style:style style:name="T439" style:parent-style-name="DefaultParagraphFont" style:family="text">
      <style:text-properties style:font-name="Helvetica Neue" style:font-name-asian="Helvetica Neue" style:font-name-complex="Helvetica Neue" fo:font-size="10pt" style:font-size-asian="10pt" style:font-size-complex="10pt"/>
    </style:style>
    <style:style style:name="T440" style:parent-style-name="DefaultParagraphFont" style:family="text">
      <style:text-properties style:font-name="Helvetica Neue" style:font-name-asian="Helvetica Neue" style:font-name-complex="Helvetica Neue" fo:font-size="10pt" style:font-size-asian="10pt" style:font-size-complex="10pt"/>
    </style:style>
    <style:style style:name="T441" style:parent-style-name="DefaultParagraphFont" style:family="text">
      <style:text-properties style:font-name="Helvetica Neue" style:font-name-asian="Helvetica Neue" style:font-name-complex="Helvetica Neue" fo:font-size="10pt" style:font-size-asian="10pt" style:font-size-complex="10pt"/>
    </style:style>
    <style:style style:name="T442" style:parent-style-name="DefaultParagraphFont" style:family="text">
      <style:text-properties style:font-name="Helvetica Neue" style:font-name-asian="Helvetica Neue" style:font-name-complex="Helvetica Neue" fo:font-size="10pt" style:font-size-asian="10pt" style:font-size-complex="10pt"/>
    </style:style>
    <style:style style:name="T443" style:parent-style-name="DefaultParagraphFont" style:family="text">
      <style:text-properties style:font-name="Helvetica Neue" style:font-name-asian="Helvetica Neue" style:font-name-complex="Helvetica Neue" fo:font-size="10pt" style:font-size-asian="10pt" style:font-size-complex="10pt"/>
    </style:style>
    <style:style style:name="P444"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445"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446" style:parent-style-name="Standard" style:family="paragraph">
      <style:paragraph-properties fo:keep-with-next="always" fo:keep-together="always" fo:margin-top="0.25in" fo:margin-bottom="0.0555in" fo:line-height="115%"/>
    </style:style>
    <style:style style:name="T447"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448" style:parent-style-name="Standard" style:family="paragraph">
      <style:paragraph-properties fo:keep-with-next="always" fo:keep-together="always" fo:margin-top="0.1111in" fo:margin-bottom="0.0555in" fo:line-height="115%"/>
    </style:style>
    <style:style style:name="T449" style:parent-style-name="DefaultParagraphFont" style:family="text">
      <style:text-properties style:font-name="Helvetica Neue" style:font-name-asian="Helvetica Neue" style:font-name-complex="Helvetica Neue" fo:font-size="10pt" style:font-size-asian="10pt" style:font-size-complex="10pt"/>
    </style:style>
    <style:style style:name="T450" style:parent-style-name="DefaultParagraphFont" style:family="text">
      <style:text-properties style:font-name="Helvetica Neue" style:font-name-asian="Helvetica Neue" style:font-name-complex="Helvetica Neue" fo:font-size="10pt" style:font-size-asian="10pt" style:font-size-complex="10pt"/>
    </style:style>
    <style:style style:name="P451" style:parent-style-name="Standard" style:family="paragraph">
      <style:paragraph-properties fo:keep-with-next="always" fo:keep-together="always" fo:margin-top="0.1111in" fo:margin-bottom="0.0555in" fo:line-height="115%"/>
    </style:style>
    <style:style style:name="T452"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T453" style:parent-style-name="DefaultParagraphFont" style:family="text">
      <style:text-properties style:font-name="Helvetica Neue" style:font-name-asian="Helvetica Neue" style:font-name-complex="Helvetica Neue" fo:font-weight="bold" style:font-weight-asian="bold" style:font-weight-complex="bold" fo:font-size="10pt" style:font-size-asian="10pt" style:font-size-complex="10pt"/>
    </style:style>
    <style:style style:name="P454" style:parent-style-name="Standard" style:family="paragraph">
      <style:paragraph-properties fo:text-align="justify" fo:margin-top="0.1666in" fo:margin-bottom="0.1666in"/>
    </style:style>
    <style:style style:name="T455" style:parent-style-name="DefaultParagraphFont" style:family="text">
      <style:text-properties style:font-name="Helvetica Neue" style:font-name-asian="Helvetica Neue" style:font-name-complex="Helvetica Neue" fo:font-size="10pt" style:font-size-asian="10pt" style:font-size-complex="10pt"/>
    </style:style>
    <style:style style:name="T456" style:parent-style-name="DefaultParagraphFont" style:family="text">
      <style:text-properties style:font-name="Helvetica Neue" style:font-name-asian="Helvetica Neue" style:font-name-complex="Helvetica Neue" fo:font-size="10pt" style:font-size-asian="10pt" style:font-size-complex="10pt"/>
    </style:style>
    <style:style style:name="T457" style:parent-style-name="DefaultParagraphFont" style:family="text">
      <style:text-properties style:font-name="Helvetica Neue" fo:font-size="10pt" style:font-size-asian="10pt"/>
    </style:style>
    <style:style style:name="T458" style:parent-style-name="DefaultParagraphFont" style:family="text">
      <style:text-properties style:font-name="Helvetica Neue" style:font-name-asian="Helvetica Neue" style:font-name-complex="Helvetica Neue" fo:font-size="10pt" style:font-size-asian="10pt" style:font-size-complex="10pt"/>
    </style:style>
    <style:style style:name="T459" style:parent-style-name="DefaultParagraphFont" style:family="text">
      <style:text-properties style:font-name="Helvetica Neue" style:font-name-asian="Helvetica Neue" style:font-name-complex="Helvetica Neue" fo:font-size="10pt" style:font-size-asian="10pt" style:font-size-complex="10pt"/>
    </style:style>
    <style:style style:name="P460" style:parent-style-name="Standard" style:family="paragraph">
      <style:paragraph-properties fo:text-align="justify" fo:margin-top="0.1666in" fo:margin-bottom="0.1666in"/>
    </style:style>
    <style:style style:name="T461" style:parent-style-name="DefaultParagraphFont" style:family="text">
      <style:text-properties style:font-name="Helvetica Neue" style:font-name-asian="Helvetica Neue" style:font-name-complex="Helvetica Neue" fo:font-size="10pt" style:font-size-asian="10pt" style:font-size-complex="10pt"/>
    </style:style>
    <style:style style:name="T462" style:parent-style-name="DefaultParagraphFont" style:family="text">
      <style:text-properties style:font-name="Helvetica Neue" style:font-name-asian="Helvetica Neue" style:font-name-complex="Helvetica Neue" fo:font-size="10pt" style:font-size-asian="10pt" style:font-size-complex="10pt"/>
    </style:style>
    <style:style style:name="P463" style:parent-style-name="Standard" style:family="paragraph">
      <style:paragraph-properties fo:keep-with-next="always" fo:keep-together="always" fo:text-align="justify" fo:margin-top="0.1111in" fo:margin-bottom="0.0555in" fo:line-height="115%"/>
    </style:style>
    <style:style style:name="T464"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465" style:parent-style-name="Standard" style:family="paragraph">
      <style:paragraph-properties fo:text-align="justify"/>
      <style:text-properties fo:font-size="10pt" style:font-size-asian="10pt" style:font-size-complex="10pt"/>
    </style:style>
    <style:style style:name="P466" style:parent-style-name="Standard" style:family="paragraph">
      <style:paragraph-properties fo:text-align="justify" fo:margin-bottom="0.1666in"/>
    </style:style>
    <style:style style:name="T467" style:parent-style-name="DefaultParagraphFont" style:family="text">
      <style:text-properties fo:font-size="10pt" style:font-size-asian="10pt" style:font-size-complex="10pt"/>
    </style:style>
    <style:style style:name="T468" style:parent-style-name="DefaultParagraphFont" style:family="text">
      <style:text-properties style:font-name="Helvetica Neue" style:font-name-asian="Helvetica Neue" style:font-name-complex="Helvetica Neue" fo:font-size="10pt" style:font-size-asian="10pt" style:font-size-complex="10pt"/>
    </style:style>
    <style:style style:name="T469" style:parent-style-name="DefaultParagraphFont" style:family="text">
      <style:text-properties style:font-name="Helvetica Neue" style:font-name-asian="Helvetica Neue" style:font-name-complex="Helvetica Neue" style:text-position="super 65%" fo:font-size="10pt" style:font-size-asian="10pt" style:font-size-complex="10pt"/>
    </style:style>
    <style:style style:name="T470" style:parent-style-name="DefaultParagraphFont" style:family="text">
      <style:text-properties fo:font-size="10pt" style:font-size-asian="10pt" style:font-size-complex="10pt"/>
    </style:style>
    <style:style style:name="T471" style:parent-style-name="DefaultParagraphFont" style:family="text">
      <style:text-properties style:font-name="Helvetica Neue" style:font-name-asian="Helvetica Neue" style:font-name-complex="Helvetica Neue" fo:font-size="10pt" style:font-size-asian="10pt" style:font-size-complex="10pt"/>
    </style:style>
    <style:style style:name="T472" style:parent-style-name="DefaultParagraphFont" style:family="text">
      <style:text-properties style:font-name="Helvetica Neue" style:font-name-asian="Helvetica Neue" style:font-name-complex="Helvetica Neue" fo:font-size="10pt" style:font-size-asian="10pt" style:font-size-complex="10pt"/>
    </style:style>
    <style:style style:name="T473" style:parent-style-name="DefaultParagraphFont" style:family="text">
      <style:text-properties fo:font-size="10pt" style:font-size-asian="10pt" style:font-size-complex="10pt"/>
    </style:style>
    <style:style style:name="T474" style:parent-style-name="DefaultParagraphFont" style:family="text">
      <style:text-properties fo:font-size="10pt" style:font-size-asian="10pt" style:font-size-complex="10pt"/>
    </style:style>
    <style:style style:name="T475" style:parent-style-name="DefaultParagraphFont" style:family="text">
      <style:text-properties fo:font-size="10pt" style:font-size-asian="10pt"/>
    </style:style>
    <style:style style:name="T476" style:parent-style-name="DefaultParagraphFont" style:family="text">
      <style:text-properties fo:font-size="10pt" style:font-size-asian="10pt" style:font-size-complex="10pt"/>
    </style:style>
    <style:style style:name="T477" style:parent-style-name="DefaultParagraphFont" style:family="text">
      <style:text-properties fo:font-size="10pt" style:font-size-asian="10pt"/>
    </style:style>
    <style:style style:name="T478" style:parent-style-name="DefaultParagraphFont" style:family="text">
      <style:text-properties fo:font-size="10pt" style:font-size-asian="10pt" style:font-size-complex="10pt"/>
    </style:style>
    <style:style style:name="T479" style:parent-style-name="DefaultParagraphFont" style:family="text">
      <style:text-properties fo:font-size="10pt" style:font-size-asian="10pt" style:font-size-complex="10pt"/>
    </style:style>
    <style:style style:name="T480" style:parent-style-name="DefaultParagraphFont" style:family="text">
      <style:text-properties fo:font-size="10pt" style:font-size-asian="10pt" style:font-size-complex="10pt"/>
    </style:style>
    <style:style style:name="T481" style:parent-style-name="DefaultParagraphFont" style:family="text">
      <style:text-properties style:font-size-complex="10pt"/>
    </style:style>
    <style:style style:name="T482" style:parent-style-name="DefaultParagraphFont" style:family="text">
      <style:text-properties fo:font-size="10pt" style:font-size-asian="10pt" style:font-size-complex="10pt"/>
    </style:style>
    <style:style style:name="T483" style:parent-style-name="DefaultParagraphFont" style:family="text">
      <style:text-properties fo:font-size="10pt" style:font-size-asian="10pt" style:font-size-complex="10pt"/>
    </style:style>
    <style:style style:name="T484" style:parent-style-name="DefaultParagraphFont" style:family="text">
      <style:text-properties style:font-name="Helvetica Neue" style:font-name-asian="Helvetica Neue" style:font-name-complex="Helvetica Neue" fo:font-size="10pt" style:font-size-asian="10pt" style:font-size-complex="10pt"/>
    </style:style>
    <style:style style:name="T485" style:parent-style-name="DefaultParagraphFont" style:family="text">
      <style:text-properties style:font-name="Helvetica Neue" style:font-name-asian="Helvetica Neue" style:font-name-complex="Helvetica Neue" fo:font-size="10pt" style:font-size-asian="10pt" style:font-size-complex="10pt"/>
    </style:style>
    <style:style style:name="T486" style:parent-style-name="DefaultParagraphFont" style:family="text">
      <style:text-properties fo:font-size="10pt" style:font-size-asian="10pt" style:font-size-complex="10pt"/>
    </style:style>
    <style:style style:name="P487" style:parent-style-name="Standard" style:family="paragraph">
      <style:text-properties fo:font-size="10pt" style:font-size-asian="10pt" style:font-size-complex="10pt"/>
    </style:style>
    <style:style style:name="P488" style:parent-style-name="Standard" style:family="paragraph">
      <style:paragraph-properties fo:text-align="justify" fo:margin-bottom="0.1666in"/>
    </style:style>
    <style:style style:name="T489" style:parent-style-name="DefaultParagraphFont" style:family="text">
      <style:text-properties fo:font-size="10pt" style:font-size-asian="10pt" style:font-size-complex="10pt"/>
    </style:style>
    <style:style style:name="T490" style:parent-style-name="DefaultParagraphFont" style:family="text">
      <style:text-properties fo:font-size="10pt" style:font-size-asian="10pt" style:font-size-complex="10pt"/>
    </style:style>
    <style:style style:name="T491" style:parent-style-name="DefaultParagraphFont" style:family="text">
      <style:text-properties fo:font-size="10pt" style:font-size-asian="10pt" style:font-size-complex="10pt"/>
    </style:style>
    <style:style style:name="T492" style:parent-style-name="DefaultParagraphFont" style:family="text">
      <style:text-properties fo:font-size="10pt" style:font-size-asian="10pt" style:font-size-complex="10pt"/>
    </style:style>
    <style:style style:name="T493" style:parent-style-name="DefaultParagraphFont" style:family="text">
      <style:text-properties fo:font-size="10pt" style:font-size-asian="10pt" style:font-size-complex="10pt"/>
    </style:style>
    <style:style style:name="P494" style:parent-style-name="Standard" style:family="paragraph">
      <style:paragraph-properties fo:keep-with-next="always" fo:keep-together="always" fo:text-align="justify" fo:margin-top="0.1111in" fo:margin-bottom="0.0555in" fo:line-height="115%"/>
    </style:style>
    <style:style style:name="T495"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496" style:parent-style-name="Standard" style:family="paragraph">
      <style:paragraph-properties fo:text-align="justify" fo:margin-top="0.1666in" fo:margin-bottom="0.1666in"/>
    </style:style>
    <style:style style:name="T497" style:parent-style-name="DefaultParagraphFont" style:family="text">
      <style:text-properties style:font-name="Helvetica Neue" style:font-name-asian="Helvetica Neue" style:font-name-complex="Helvetica Neue" fo:font-size="10pt" style:font-size-asian="10pt" style:font-size-complex="10pt"/>
    </style:style>
    <style:style style:name="T498" style:parent-style-name="DefaultParagraphFont" style:family="text">
      <style:text-properties style:font-name="Helvetica Neue" style:font-name-asian="Helvetica Neue" style:font-name-complex="Helvetica Neue" fo:font-size="10pt" style:font-size-asian="10pt" style:font-size-complex="10pt"/>
    </style:style>
    <style:style style:name="T499" style:parent-style-name="DefaultParagraphFont" style:family="text">
      <style:text-properties style:font-name="Helvetica Neue" fo:font-size="10pt" style:font-size-asian="10pt"/>
    </style:style>
    <style:style style:name="T500" style:parent-style-name="DefaultParagraphFont" style:family="text">
      <style:text-properties style:font-name="Helvetica Neue" style:font-name-asian="Helvetica Neue" style:font-name-complex="Helvetica Neue" fo:font-size="10pt" style:font-size-asian="10pt" style:font-size-complex="10pt"/>
    </style:style>
    <style:style style:name="T501" style:parent-style-name="DefaultParagraphFont" style:family="text">
      <style:text-properties style:font-name="Helvetica Neue" style:font-name-asian="Helvetica Neue" style:font-name-complex="Helvetica Neue" fo:font-size="10pt" style:font-size-asian="10pt" style:font-size-complex="10pt"/>
    </style:style>
    <style:style style:name="P502" style:parent-style-name="Standard" style:family="paragraph">
      <style:paragraph-properties fo:text-align="justify" fo:margin-top="0.1666in" fo:margin-bottom="0.1666in"/>
    </style:style>
    <style:style style:name="T503" style:parent-style-name="DefaultParagraphFont" style:family="text">
      <style:text-properties style:font-name="Helvetica Neue" style:font-name-asian="Helvetica Neue" style:font-name-complex="Helvetica Neue" fo:font-size="10pt" style:font-size-asian="10pt" style:font-size-complex="10pt"/>
    </style:style>
    <style:style style:name="T504" style:parent-style-name="DefaultParagraphFont" style:family="text">
      <style:text-properties style:font-name="Helvetica Neue" style:font-name-asian="Helvetica Neue" style:font-name-complex="Helvetica Neue" fo:font-size="10pt" style:font-size-asian="10pt" style:font-size-complex="10pt"/>
    </style:style>
    <style:style style:name="T505" style:parent-style-name="DefaultParagraphFont" style:family="text">
      <style:text-properties style:font-name="Helvetica Neue" style:font-name-asian="Helvetica Neue" style:font-name-complex="Helvetica Neue" fo:font-size="10pt" style:font-size-asian="10pt" style:font-size-complex="10pt"/>
    </style:style>
    <style:style style:name="T506" style:parent-style-name="DefaultParagraphFont" style:family="text">
      <style:text-properties style:font-name="Helvetica Neue" style:font-name-asian="Helvetica Neue" style:font-name-complex="Helvetica Neue" fo:font-size="10pt" style:font-size-asian="10pt" style:font-size-complex="10pt"/>
    </style:style>
    <style:style style:name="T507" style:parent-style-name="DefaultParagraphFont" style:family="text">
      <style:text-properties style:font-name="Helvetica Neue" style:font-name-asian="Helvetica Neue" style:font-name-complex="Helvetica Neue" fo:font-size="10pt" style:font-size-asian="10pt" style:font-size-complex="10pt"/>
    </style:style>
    <style:style style:name="T508" style:parent-style-name="DefaultParagraphFont" style:family="text">
      <style:text-properties style:font-name="Helvetica Neue" style:font-name-asian="Helvetica Neue" style:font-name-complex="Helvetica Neue" fo:font-size="10pt" style:font-size-asian="10pt" style:font-size-complex="10pt"/>
    </style:style>
    <style:style style:name="P509" style:parent-style-name="Standard" style:family="paragraph">
      <style:paragraph-properties fo:keep-with-next="always" fo:keep-together="always" fo:text-align="justify" fo:margin-top="0.1111in" fo:margin-bottom="0.0555in" fo:line-height="115%"/>
    </style:style>
    <style:style style:name="T510"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511" style:parent-style-name="Standard" style:family="paragraph">
      <style:paragraph-properties fo:text-align="justify"/>
    </style:style>
    <style:style style:name="T512" style:parent-style-name="DefaultParagraphFont" style:family="text">
      <style:text-properties style:font-name="Helvetica Neue" style:font-name-asian="Helvetica Neue" style:font-name-complex="Helvetica Neue" fo:font-size="10pt" style:font-size-asian="10pt" style:font-size-complex="10pt"/>
    </style:style>
    <style:style style:name="T513" style:parent-style-name="DefaultParagraphFont" style:family="text">
      <style:text-properties style:font-name="Helvetica Neue" style:font-name-asian="Helvetica Neue" style:font-name-complex="Helvetica Neue" fo:font-size="10pt" style:font-size-asian="10pt" style:font-size-complex="10pt"/>
    </style:style>
    <style:style style:name="T514" style:parent-style-name="DefaultParagraphFont" style:family="text">
      <style:text-properties style:font-name="Helvetica Neue" style:font-name-asian="Helvetica Neue" style:font-name-complex="Helvetica Neue" fo:font-size="10pt" style:font-size-asian="10pt" style:font-size-complex="10pt"/>
    </style:style>
    <style:style style:name="T515" style:parent-style-name="DefaultParagraphFont" style:family="text">
      <style:text-properties style:font-name="Helvetica Neue" style:font-name-asian="Helvetica Neue" style:font-name-complex="Helvetica Neue" fo:font-size="10pt" style:font-size-asian="10pt" style:font-size-complex="10pt"/>
    </style:style>
    <style:style style:name="T516" style:parent-style-name="DefaultParagraphFont" style:family="text">
      <style:text-properties style:font-name="Helvetica Neue" style:font-name-asian="Helvetica Neue" style:font-name-complex="Helvetica Neue" fo:font-size="10pt" style:font-size-asian="10pt" style:font-size-complex="10pt"/>
    </style:style>
    <style:style style:name="T517" style:parent-style-name="DefaultParagraphFont" style:family="text">
      <style:text-properties style:font-name="Helvetica Neue" style:font-name-asian="Helvetica Neue" style:font-name-complex="Helvetica Neue" fo:font-size="10pt" style:font-size-asian="10pt" style:font-size-complex="10pt"/>
    </style:style>
    <style:style style:name="T518" style:parent-style-name="DefaultParagraphFont" style:family="text">
      <style:text-properties style:font-name="Helvetica Neue" style:font-name-asian="Helvetica Neue" style:font-name-complex="Helvetica Neue" fo:font-size="10pt" style:font-size-asian="10pt" style:font-size-complex="10pt"/>
    </style:style>
    <style:style style:name="T519" style:parent-style-name="DefaultParagraphFont" style:family="text">
      <style:text-properties style:font-name="Helvetica Neue" style:font-name-asian="Helvetica Neue" style:font-name-complex="Helvetica Neue" fo:font-size="10pt" style:font-size-asian="10pt" style:font-size-complex="10pt"/>
    </style:style>
    <style:style style:name="P520"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521" style:parent-style-name="Standard" style:family="paragraph">
      <style:paragraph-properties fo:text-align="justify"/>
    </style:style>
    <style:style style:name="T522" style:parent-style-name="DefaultParagraphFont" style:family="text">
      <style:text-properties style:font-name="Helvetica Neue" style:font-name-asian="Helvetica Neue" style:font-name-complex="Helvetica Neue" fo:font-size="10pt" style:font-size-asian="10pt" style:font-size-complex="10pt"/>
    </style:style>
    <style:style style:name="T523" style:parent-style-name="DefaultParagraphFont" style:family="text">
      <style:text-properties style:font-name="Helvetica Neue" style:font-name-asian="Helvetica Neue" style:font-name-complex="Helvetica Neue" fo:font-size="10pt" style:font-size-asian="10pt" style:font-size-complex="10pt"/>
    </style:style>
    <style:style style:name="P524" style:parent-style-name="Standard" style:family="paragraph">
      <style:paragraph-properties fo:text-align="justify" fo:margin-top="0.1666in" fo:margin-bottom="0.1666in"/>
    </style:style>
    <style:style style:name="T525" style:parent-style-name="DefaultParagraphFont" style:family="text">
      <style:text-properties style:font-name="Helvetica Neue" style:font-name-asian="Helvetica Neue" style:font-name-complex="Helvetica Neue" fo:font-size="10pt" style:font-size-asian="10pt" style:font-size-complex="10pt"/>
    </style:style>
    <style:style style:name="T526" style:parent-style-name="DefaultParagraphFont" style:family="text">
      <style:text-properties style:font-name="Helvetica Neue" style:font-name-asian="Helvetica Neue" style:font-name-complex="Helvetica Neue" fo:font-size="10pt" style:font-size-asian="10pt" style:font-size-complex="10pt"/>
    </style:style>
    <style:style style:name="T527" style:parent-style-name="DefaultParagraphFont" style:family="text">
      <style:text-properties style:font-name="Helvetica Neue" fo:font-size="10pt" style:font-size-asian="10pt" style:font-size-complex="10pt"/>
    </style:style>
    <style:style style:name="T528" style:parent-style-name="DefaultParagraphFont" style:family="text">
      <style:text-properties style:font-name="Helvetica Neue" fo:font-size="10pt" style:font-size-asian="10pt" style:font-size-complex="10pt"/>
    </style:style>
    <style:style style:name="T529" style:parent-style-name="DefaultParagraphFont" style:family="text">
      <style:text-properties style:font-name="Helvetica Neue" fo:font-size="10pt" style:font-size-asian="10pt" style:font-size-complex="10pt"/>
    </style:style>
    <style:style style:name="T530" style:parent-style-name="DefaultParagraphFont" style:family="text">
      <style:text-properties style:font-name="Helvetica Neue" fo:font-size="10pt" style:font-size-asian="10pt" style:font-size-complex="10pt"/>
    </style:style>
    <style:style style:name="T531" style:parent-style-name="DefaultParagraphFont" style:family="text">
      <style:text-properties style:font-name="Helvetica Neue" fo:font-size="10pt" style:font-size-asian="10pt" style:font-size-complex="10pt"/>
    </style:style>
    <style:style style:name="T532" style:parent-style-name="DefaultParagraphFont" style:family="text">
      <style:text-properties style:font-name="Helvetica Neue" fo:font-size="10pt" style:font-size-asian="10pt" style:font-size-complex="10pt"/>
    </style:style>
    <style:style style:name="T533" style:parent-style-name="DefaultParagraphFont" style:family="text">
      <style:text-properties style:font-name="Helvetica Neue" fo:font-size="10pt" style:font-size-asian="10pt" style:font-size-complex="10pt"/>
    </style:style>
    <style:style style:name="P534" style:parent-style-name="Standard" style:family="paragraph">
      <style:paragraph-properties fo:text-align="justify"/>
    </style:style>
    <style:style style:name="T535" style:parent-style-name="DefaultParagraphFont" style:family="text">
      <style:text-properties style:font-name="Helvetica Neue" style:font-name-asian="Helvetica Neue" style:font-name-complex="Helvetica Neue" fo:font-size="10pt" style:font-size-asian="10pt" style:font-size-complex="10pt"/>
    </style:style>
    <style:style style:name="T536" style:parent-style-name="DefaultParagraphFont" style:family="text">
      <style:text-properties style:font-name="Helvetica Neue" fo:font-size="10pt" style:font-size-asian="10pt" style:font-size-complex="10pt"/>
    </style:style>
    <style:style style:name="T537" style:parent-style-name="DefaultParagraphFont" style:family="text">
      <style:text-properties style:font-name="Helvetica Neue" style:font-name-asian="Helvetica Neue" style:font-name-complex="Helvetica Neue" fo:font-size="10pt" style:font-size-asian="10pt" style:font-size-complex="10pt"/>
    </style:style>
    <style:style style:name="T538" style:parent-style-name="DefaultParagraphFont" style:family="text">
      <style:text-properties style:font-name="Helvetica Neue" fo:font-size="10pt" style:font-size-asian="10pt" style:font-size-complex="10pt"/>
    </style:style>
    <style:style style:name="T539" style:parent-style-name="DefaultParagraphFont" style:family="text">
      <style:text-properties style:font-name="Helvetica Neue" fo:font-size="10pt" style:font-size-asian="10pt" style:font-size-complex="10pt"/>
    </style:style>
    <style:style style:name="T540" style:parent-style-name="DefaultParagraphFont" style:family="text">
      <style:text-properties style:font-name="Helvetica Neue" fo:font-size="10pt" style:font-size-asian="10pt" style:font-size-complex="10pt"/>
    </style:style>
    <style:style style:name="T541" style:parent-style-name="DefaultParagraphFont" style:family="text">
      <style:text-properties style:font-name="Helvetica Neue" fo:font-size="10pt" style:font-size-asian="10pt" style:font-size-complex="10pt"/>
    </style:style>
    <style:style style:name="P542"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543"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544" style:parent-style-name="Standard" style:family="paragraph">
      <style:paragraph-properties fo:text-align="justify"/>
    </style:style>
    <style:style style:name="T545" style:parent-style-name="DefaultParagraphFont" style:family="text">
      <style:text-properties style:font-name="Helvetica Neue" style:font-name-asian="Helvetica Neue" style:font-name-complex="Helvetica Neue" fo:font-weight="bold" style:font-weight-asian="bold" fo:font-size="10pt" style:font-size-asian="10pt" style:font-size-complex="10pt"/>
    </style:style>
    <style:style style:name="P546" style:parent-style-name="Standard" style:family="paragraph">
      <style:paragraph-properties fo:text-align="justify"/>
    </style:style>
    <style:style style:name="T547" style:parent-style-name="DefaultParagraphFont" style:family="text">
      <style:text-properties style:font-name="Helvetica Neue" style:font-name-asian="Helvetica Neue" style:font-name-complex="Helvetica Neue" fo:font-size="10pt" style:font-size-asian="10pt" style:font-size-complex="10pt"/>
    </style:style>
    <style:style style:name="T548" style:parent-style-name="DefaultParagraphFont" style:family="text">
      <style:text-properties style:font-name="Helvetica Neue" style:font-name-asian="Helvetica Neue" style:font-name-complex="Helvetica Neue" fo:font-size="10pt" style:font-size-asian="10pt" style:font-size-complex="10pt"/>
    </style:style>
    <style:style style:name="T549" style:parent-style-name="DefaultParagraphFont" style:family="text">
      <style:text-properties style:font-name="Helvetica Neue" style:font-name-asian="Helvetica Neue" style:font-name-complex="Helvetica Neue" fo:font-size="10pt" style:font-size-asian="10pt" style:font-size-complex="10pt"/>
    </style:style>
    <style:style style:name="T550" style:parent-style-name="DefaultParagraphFont" style:family="text">
      <style:text-properties style:font-name="Helvetica Neue" style:font-name-asian="Helvetica Neue" style:font-name-complex="Helvetica Neue" fo:font-size="10pt" style:font-size-asian="10pt" style:font-size-complex="10pt"/>
    </style:style>
    <style:style style:name="P551" style:parent-style-name="Standard" style:family="paragraph">
      <style:paragraph-properties fo:text-align="justify"/>
      <style:text-properties style:font-name="Helvetica Neue" style:font-name-asian="Helvetica Neue" style:font-name-complex="Helvetica Neue" fo:font-size="10pt" style:font-size-asian="10pt" style:font-size-complex="10pt"/>
    </style:style>
    <style:style style:name="P552" style:parent-style-name="Standard" style:family="paragraph">
      <style:paragraph-properties fo:keep-with-next="always" fo:keep-together="always" fo:text-align="justify" fo:margin-top="0.25in" fo:margin-bottom="0.0555in" fo:line-height="115%"/>
    </style:style>
    <style:style style:name="T553" style:parent-style-name="DefaultParagraphFont" style:family="text">
      <style:text-properties style:font-name="Helvetica Neue" style:font-name-asian="Helvetica Neue" style:font-name-complex="Helvetica Neue" fo:font-weight="bold" style:font-weight-asian="bold" style:font-weight-complex="bold" fo:color="#000000" fo:font-size="10pt" style:font-size-asian="10pt" style:font-size-complex="10pt"/>
    </style:style>
    <style:style style:name="P554" style:parent-style-name="Standard" style:family="paragraph">
      <style:paragraph-properties fo:margin-bottom="0.1666in"/>
    </style:style>
    <style:style style:name="T555" style:parent-style-name="DefaultParagraphFont" style:family="text">
      <style:text-properties style:font-name="Helvetica Neue" fo:font-size="10pt" style:font-size-asian="10pt" style:font-size-complex="10pt"/>
    </style:style>
    <style:style style:name="T556" style:parent-style-name="DefaultParagraphFont" style:family="text">
      <style:text-properties style:font-name="Helvetica Neue" fo:font-size="10pt" style:font-size-asian="10pt" style:font-size-complex="10pt"/>
    </style:style>
    <style:style style:name="T557" style:parent-style-name="DefaultParagraphFont" style:family="text">
      <style:text-properties style:font-name="Helvetica Neue" fo:font-size="10pt" style:font-size-asian="10pt" style:font-size-complex="10pt"/>
    </style:style>
    <style:style style:name="T558" style:parent-style-name="DefaultParagraphFont" style:family="text">
      <style:text-properties style:font-name="Helvetica Neue" style:font-name-asian="Helvetica Neue" style:font-name-complex="Helvetica Neue" fo:font-size="10pt" style:font-size-asian="10pt" style:font-size-complex="10pt"/>
    </style:style>
    <style:style style:name="T559" style:parent-style-name="DefaultParagraphFont" style:family="text">
      <style:text-properties style:font-name="Helvetica Neue" style:font-name-asian="Helvetica Neue" style:font-name-complex="Helvetica Neue" fo:font-size="10pt" style:font-size-asian="10pt" style:font-size-complex="10pt"/>
    </style:style>
    <style:style style:name="T560" style:parent-style-name="DefaultParagraphFont" style:family="text">
      <style:text-properties style:font-name="Helvetica Neue" fo:font-size="10pt" style:font-size-asian="10pt" style:font-size-complex="10pt"/>
    </style:style>
    <style:style style:name="P561" style:parent-style-name="Standard" style:family="paragraph">
      <style:paragraph-properties fo:margin-bottom="0.1666in"/>
    </style:style>
    <style:style style:name="T562" style:parent-style-name="DefaultParagraphFont" style:family="text">
      <style:text-properties style:font-name="Helvetica Neue" fo:font-size="10pt" style:font-size-asian="10pt" style:font-size-complex="10pt"/>
    </style:style>
    <style:style style:name="T563" style:parent-style-name="DefaultParagraphFont" style:family="text">
      <style:text-properties style:font-name="Helvetica Neue" fo:font-size="10pt" style:font-size-asian="10pt" style:font-size-complex="10pt"/>
    </style:style>
    <style:style style:name="T564" style:parent-style-name="DefaultParagraphFont" style:family="text">
      <style:text-properties fo:font-weight="bold" style:font-weight-asian="bold" style:font-weight-complex="bold"/>
    </style:style>
    <style:style style:name="P565" style:parent-style-name="Standard" style:family="paragraph">
      <style:text-properties fo:font-weight="bold" style:font-weight-asian="bold" style:font-weight-complex="bold"/>
    </style:style>
    <style:style style:name="P566" style:parent-style-name="Standard" style:family="paragraph">
      <style:paragraph-properties fo:margin-bottom="0.1666in"/>
    </style:style>
    <style:style style:name="T567" style:parent-style-name="DefaultParagraphFont" style:family="text">
      <style:text-properties style:font-name="Helvetica Neue" fo:font-size="10pt" style:font-size-asian="10pt" style:font-size-complex="10pt"/>
    </style:style>
    <style:style style:name="P568" style:parent-style-name="Standard" style:family="paragraph">
      <style:paragraph-properties fo:keep-with-next="always" fo:keep-together="always" fo:margin-top="0.25in" fo:margin-bottom="0.0555in" fo:line-height="115%"/>
    </style:style>
    <style:style style:name="T569" style:parent-style-name="DefaultParagraphFont" style:family="text">
      <style:text-properties style:font-name="Helvetica Neue" style:font-name-asian="Helvetica Neue" style:font-name-complex="Helvetica Neue" fo:color="#000000" fo:font-size="20pt" style:font-size-asian="20pt" style:font-size-complex="20pt"/>
    </style:style>
    <style:style style:name="T570" style:parent-style-name="DefaultParagraphFont" style:family="text">
      <style:text-properties fo:font-style="italic" style:font-style-asian="italic"/>
    </style:style>
    <style:style style:name="T571" style:parent-style-name="DefaultParagraphFont" style:family="text">
      <style:text-properties fo:font-style="italic" style:font-style-asian="italic"/>
    </style:style>
    <style:style style:name="T572" style:parent-style-name="DefaultParagraphFont" style:family="text">
      <style:text-properties fo:font-style="italic" style:font-style-asian="italic"/>
    </style:style>
    <style:style style:name="T573" style:parent-style-name="DefaultParagraphFont" style:family="text">
      <style:text-properties fo:font-style="italic" style:font-style-asian="italic"/>
    </style:style>
    <style:style style:name="T574" style:parent-style-name="DefaultParagraphFont" style:family="text">
      <style:text-properties fo:font-style="italic" style:font-style-asian="italic"/>
    </style:style>
    <style:style style:name="T575" style:parent-style-name="DefaultParagraphFont" style:family="text">
      <style:text-properties fo:font-style="italic" style:font-style-asian="italic"/>
    </style:style>
    <style:style style:name="T576" style:parent-style-name="DefaultParagraphFont" style:family="text">
      <style:text-properties fo:font-style="italic" style:font-style-asian="italic"/>
    </style:style>
    <style:style style:name="T577" style:parent-style-name="DefaultParagraphFont" style:family="text">
      <style:text-properties fo:font-style="italic" style:font-style-asian="italic"/>
    </style:style>
    <style:style style:name="T578" style:parent-style-name="DefaultParagraphFont" style:family="text">
      <style:text-properties fo:font-style="italic" style:font-style-asian="italic"/>
    </style:style>
    <style:style style:name="T579" style:parent-style-name="DefaultParagraphFont" style:family="text">
      <style:text-properties fo:font-style="italic" style:font-style-asian="italic"/>
    </style:style>
    <style:style style:name="T580" style:parent-style-name="DefaultParagraphFont" style:family="text">
      <style:text-properties fo:font-style="italic" style:font-style-asian="italic"/>
    </style:style>
    <style:style style:name="T581" style:parent-style-name="DefaultParagraphFont" style:family="text">
      <style:text-properties fo:font-style="italic" style:font-style-asian="italic"/>
    </style:style>
    <style:style style:name="T582" style:parent-style-name="DefaultParagraphFont" style:family="text">
      <style:text-properties fo:font-style="italic" style:font-style-asian="italic"/>
    </style:style>
    <style:style style:name="T583" style:parent-style-name="DefaultParagraphFont" style:family="text">
      <style:text-properties fo:font-style="italic" style:font-style-asian="italic"/>
    </style:style>
    <style:style style:name="T584" style:parent-style-name="DefaultParagraphFont" style:family="text">
      <style:text-properties fo:font-style="italic" style:font-style-asian="italic"/>
    </style:style>
    <style:style style:name="T585" style:parent-style-name="DefaultParagraphFont" style:family="text">
      <style:text-properties fo:font-style="italic" style:font-style-asian="italic"/>
    </style:style>
    <style:style style:name="T586" style:parent-style-name="DefaultParagraphFont" style:family="text">
      <style:text-properties fo:font-style="italic" style:font-style-asian="italic"/>
    </style:style>
    <style:style style:name="T587" style:parent-style-name="DefaultParagraphFont" style:family="text">
      <style:text-properties fo:font-style="italic" style:font-style-asian="italic"/>
    </style:style>
    <style:style style:name="T588" style:parent-style-name="DefaultParagraphFont" style:family="text">
      <style:text-properties fo:font-style="italic" style:font-style-asian="italic"/>
    </style:style>
    <style:style style:name="T589" style:parent-style-name="DefaultParagraphFont" style:family="text">
      <style:text-properties fo:font-style="italic" style:font-style-asian="italic"/>
    </style:style>
    <style:style style:name="T590" style:parent-style-name="DefaultParagraphFont" style:family="text">
      <style:text-properties fo:font-style="italic" style:font-style-asian="italic"/>
    </style:style>
    <style:style style:name="T591" style:parent-style-name="DefaultParagraphFont" style:family="text">
      <style:text-properties fo:font-style="italic" style:font-style-asian="italic"/>
    </style:style>
    <style:style style:name="T592" style:parent-style-name="DefaultParagraphFont" style:family="text">
      <style:text-properties fo:font-style="italic" style:font-style-asian="italic"/>
    </style:style>
    <style:style style:name="T593" style:parent-style-name="DefaultParagraphFont" style:family="text">
      <style:text-properties fo:font-style="italic" style:font-style-asian="italic"/>
    </style:style>
    <style:style style:name="T594" style:parent-style-name="DefaultParagraphFont" style:family="text">
      <style:text-properties fo:font-style="italic" style:font-style-asian="italic"/>
    </style:style>
    <style:style style:name="T595" style:parent-style-name="DefaultParagraphFont" style:family="text">
      <style:text-properties fo:font-style="italic" style:font-style-asian="italic"/>
    </style:style>
    <style:style style:name="T596" style:parent-style-name="DefaultParagraphFont" style:family="text">
      <style:text-properties fo:font-style="italic" style:font-style-asian="italic"/>
    </style:style>
    <style:style style:name="T597" style:parent-style-name="DefaultParagraphFont" style:family="text">
      <style:text-properties fo:font-style="italic" style:font-style-asian="italic"/>
    </style:style>
    <style:style style:name="T598" style:parent-style-name="DefaultParagraphFont" style:family="text">
      <style:text-properties fo:font-style="italic" style:font-style-asian="italic"/>
    </style:style>
    <style:style style:name="T599" style:parent-style-name="DefaultParagraphFont" style:family="text">
      <style:text-properties fo:font-style="italic" style:font-style-asian="italic"/>
    </style:style>
    <style:style style:name="T600" style:parent-style-name="DefaultParagraphFont" style:family="text">
      <style:text-properties fo:font-style="italic" style:font-style-asian="italic"/>
    </style:style>
    <style:style style:name="T601" style:parent-style-name="DefaultParagraphFont" style:family="text">
      <style:text-properties fo:font-style="italic" style:font-style-asian="italic"/>
    </style:style>
    <style:style style:name="T602" style:parent-style-name="DefaultParagraphFont" style:family="text">
      <style:text-properties fo:font-style="italic" style:font-style-asian="italic"/>
    </style:style>
    <style:style style:name="T603" style:parent-style-name="DefaultParagraphFont" style:family="text">
      <style:text-properties fo:font-style="italic" style:font-style-asian="italic"/>
    </style:style>
    <style:style style:name="T604" style:parent-style-name="DefaultParagraphFont" style:family="text">
      <style:text-properties fo:font-style="italic" style:font-style-asian="italic"/>
    </style:style>
    <style:style style:name="T605" style:parent-style-name="DefaultParagraphFont" style:family="text">
      <style:text-properties fo:font-style="italic" style:font-style-asian="italic"/>
    </style:style>
    <style:style style:name="T606" style:parent-style-name="DefaultParagraphFont" style:family="text">
      <style:text-properties fo:font-style="italic" style:font-style-asian="italic"/>
    </style:style>
    <style:style style:name="T607" style:parent-style-name="DefaultParagraphFont" style:family="text">
      <style:text-properties fo:font-style="italic" style:font-style-asian="italic"/>
    </style:style>
    <style:style style:name="T608" style:parent-style-name="DefaultParagraphFont" style:family="text">
      <style:text-properties fo:font-style="italic" style:font-style-asian="italic"/>
    </style:style>
    <style:style style:name="T609" style:parent-style-name="DefaultParagraphFont" style:family="text">
      <style:text-properties fo:font-style="italic" style:font-style-asian="italic"/>
    </style:style>
    <style:style style:name="T610" style:parent-style-name="DefaultParagraphFont" style:family="text">
      <style:text-properties fo:font-style="italic" style:font-style-asian="italic"/>
    </style:style>
    <style:style style:name="T611" style:parent-style-name="DefaultParagraphFont" style:family="text">
      <style:text-properties fo:font-style="italic" style:font-style-asian="italic"/>
    </style:style>
    <style:style style:name="T612" style:parent-style-name="DefaultParagraphFont" style:family="text">
      <style:text-properties fo:font-style="italic" style:font-style-asian="italic"/>
    </style:style>
    <style:style style:name="T613" style:parent-style-name="DefaultParagraphFont" style:family="text">
      <style:text-properties fo:font-style="italic" style:font-style-asian="italic"/>
    </style:style>
    <style:style style:name="T614" style:parent-style-name="DefaultParagraphFont" style:family="text">
      <style:text-properties fo:font-style="italic" style:font-style-asian="italic"/>
    </style:style>
    <style:style style:name="T615" style:parent-style-name="DefaultParagraphFont" style:family="text">
      <style:text-properties fo:font-style="italic" style:font-style-asian="italic"/>
    </style:style>
    <style:style style:name="T616" style:parent-style-name="DefaultParagraphFont" style:family="text">
      <style:text-properties fo:font-style="italic" style:font-style-asian="italic"/>
    </style:style>
    <style:style style:name="T617" style:parent-style-name="DefaultParagraphFont" style:family="text">
      <style:text-properties fo:font-style="italic" style:font-style-asian="italic"/>
    </style:style>
    <style:style style:name="T618" style:parent-style-name="DefaultParagraphFont" style:family="text">
      <style:text-properties fo:font-style="italic" style:font-style-asian="italic"/>
    </style:style>
    <style:style style:name="T619" style:parent-style-name="DefaultParagraphFont" style:family="text">
      <style:text-properties fo:font-style="italic" style:font-style-asian="italic"/>
    </style:style>
    <style:style style:name="T620" style:parent-style-name="DefaultParagraphFont" style:family="text">
      <style:text-properties fo:font-style="italic" style:font-style-asian="italic"/>
    </style:style>
    <style:style style:name="T621" style:parent-style-name="DefaultParagraphFont" style:family="text">
      <style:text-properties fo:font-style="italic" style:font-style-asian="italic"/>
    </style:style>
    <style:style style:name="T622" style:parent-style-name="DefaultParagraphFont" style:family="text">
      <style:text-properties fo:font-style="italic" style:font-style-asian="italic"/>
    </style:style>
    <style:style style:name="T623" style:parent-style-name="DefaultParagraphFont" style:family="text">
      <style:text-properties fo:font-style="italic" style:font-style-asian="italic"/>
    </style:style>
    <style:style style:name="T624" style:parent-style-name="DefaultParagraphFont" style:family="text">
      <style:text-properties fo:font-style="italic" style:font-style-asian="italic"/>
    </style:style>
    <style:style style:name="T625" style:parent-style-name="DefaultParagraphFont" style:family="text">
      <style:text-properties fo:font-style="italic" style:font-style-asian="italic"/>
    </style:style>
    <style:style style:name="T626" style:parent-style-name="DefaultParagraphFont" style:family="text">
      <style:text-properties fo:font-style="italic" style:font-style-asian="italic"/>
    </style:style>
    <style:style style:name="T627" style:parent-style-name="DefaultParagraphFont" style:family="text">
      <style:text-properties fo:font-style="italic" style:font-style-asian="italic"/>
    </style:style>
    <style:style style:name="T628" style:parent-style-name="DefaultParagraphFont" style:family="text">
      <style:text-properties fo:font-style="italic" style:font-style-asian="italic"/>
    </style:style>
    <style:style style:name="T629" style:parent-style-name="DefaultParagraphFont" style:family="text">
      <style:text-properties fo:font-style="italic" style:font-style-asian="italic"/>
    </style:style>
    <style:style style:name="T630" style:parent-style-name="DefaultParagraphFont" style:family="text">
      <style:text-properties fo:font-style="italic" style:font-style-asian="italic"/>
    </style:style>
    <style:style style:name="T631" style:parent-style-name="DefaultParagraphFont" style:family="text">
      <style:text-properties fo:font-style="italic" style:font-style-asian="italic"/>
    </style:style>
    <style:style style:name="T632" style:parent-style-name="DefaultParagraphFont" style:family="text">
      <style:text-properties fo:font-style="italic" style:font-style-asian="italic"/>
    </style:style>
    <style:style style:name="T633" style:parent-style-name="DefaultParagraphFont" style:family="text">
      <style:text-properties fo:font-style="italic" style:font-style-asian="italic"/>
    </style:style>
    <style:style style:name="T634" style:parent-style-name="DefaultParagraphFont" style:family="text">
      <style:text-properties fo:font-style="italic" style:font-style-asian="italic"/>
    </style:style>
    <style:style style:name="T635" style:parent-style-name="DefaultParagraphFont" style:family="text">
      <style:text-properties fo:font-style="italic" style:font-style-asian="italic"/>
    </style:style>
    <style:style style:name="T636" style:parent-style-name="DefaultParagraphFont" style:family="text">
      <style:text-properties fo:font-style="italic" style:font-style-asian="italic"/>
    </style:style>
    <style:style style:name="T637" style:parent-style-name="DefaultParagraphFont" style:family="text">
      <style:text-properties fo:font-style="italic" style:font-style-asian="italic"/>
    </style:style>
    <style:style style:name="T638" style:parent-style-name="DefaultParagraphFont" style:family="text">
      <style:text-properties fo:font-style="italic" style:font-style-asian="italic"/>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style:style>
    <style:style style:name="P645" style:parent-style-name="Standard" style:family="paragraph">
      <style:paragraph-properties fo:line-height="200%" fo:margin-left="0.5in" fo:text-indent="-0.5in">
        <style:tab-stops/>
      </style:paragraph-properties>
      <style:text-properties style:font-name="Helvetica Neue" style:font-name-asian="Helvetica Neue" style:font-name-complex="Helvetica Neue" fo:color="#000000"/>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20">
      <style:graphic-properties style:vertical-pos="middle"/>
    </style:style>
    <style:style style:family="graphic" style:name="a59">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0">
      <style:graphic-properties style:vertical-pos="middle"/>
    </style:style>
    <style:style style:family="graphic" style:name="a65">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66">
      <style:graphic-properties style:vertical-pos="middle"/>
    </style:style>
    <style:style style:family="graphic" style:name="a3">
      <style:graphic-properties style:vertical-pos="middle"/>
    </style:style>
    <style:style style:family="graphic" style:name="a67">
      <style:graphic-properties style:vertical-pos="middle"/>
    </style:style>
    <style:style style:family="graphic" style:name="a30">
      <style:graphic-properties style:vertical-pos="middle"/>
    </style:style>
    <style:style style:family="graphic" style:name="a68">
      <style:graphic-properties style:vertical-pos="middle"/>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31">
      <style:graphic-properties style:vertical-pos="middle"/>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32">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7">
      <style:graphic-properties style:vertical-pos="middle"/>
    </style:style>
    <style:style style:family="graphic" style:name="a34" style:parent-style-name="Graphics">
      <style:graphic-properties fo:border="0.01042in none" fo:background-color="transparent" fo:clip="rect(0in, 0.00195in, 0in, 0in)" draw:luminance="0%" draw:contrast="0%" draw:image-opacity="100%"/>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40">
      <style:graphic-properties style:vertical-pos="middle"/>
    </style:style>
    <style:style style:family="graphic" style:name="a78">
      <style:graphic-properties style:vertical-pos="middle"/>
    </style:style>
    <style:style style:family="graphic" style:name="a41">
      <style:graphic-properties style:vertical-pos="middle"/>
    </style:style>
    <style:style style:family="graphic" style:name="a79">
      <style:graphic-properties style:vertical-pos="middle"/>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10">
      <style:graphic-properties style:vertical-pos="middle"/>
    </style:style>
    <style:style style:family="graphic" style:name="a48">
      <style:graphic-properties style:vertical-pos="middle"/>
    </style:style>
    <style:style style:family="graphic" style:name="a11">
      <style:graphic-properties style:vertical-pos="middle"/>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office:automatic-styles>
  <office:body>
    <office:text text:use-soft-page-breaks="true">
      <text:p text:style-name="P1"><text:span text:style-name="T3">Title:<text:s/></text:span><text:span text:style-name="T4">Social Prediction Error Signals During the Trust Game in Patients with Schizophrenia: An fMRI Study</text:span></text:p>
      <text:p text:style-name="P5"/>
      <text:p text:style-name="P6"><text:span text:style-name="T7">Authors’ Information:</text:span></text:p>
      <text:p text:style-name="P8"><text:span text:style-name="T9">Elif Ozge Aktas</text:span><text:span text:style-name="T10">1</text:span><text:span text:style-name="T11">, Kaan Keskin</text:span><text:span text:style-name="T12">1</text:span><text:span text:style-name="T13">, Cemre Candemir</text:span><text:span text:style-name="T14">1,2</text:span><text:span text:style-name="T15">, Aslıhan Uyar</text:span><text:span text:style-name="T16">1,3</text:span><text:span text:style-name="T17">, İbrahim Sungur</text:span><text:span text:style-name="T18">1</text:span><text:span text:style-name="T19">, Kaya Oguz</text:span><text:span text:style-name="T20">1,4,5</text:span><text:span text:style-name="T21">, Yigit Erdogan</text:span><text:span text:style-name="T22">1</text:span><text:span text:style-name="T23">, Omer Kitis</text:span><text:span text:style-name="T24">1,6</text:span><text:span text:style-name="T25">, Ali Saffet Gonul</text:span><text:span text:style-name="T26">1</text:span></text:p>
      <text:p text:style-name="P27"/>
      <text:p text:style-name="P28"><text:span text:style-name="T29">1 SoCAT Lab, Department of Psychiatry, Ege University, Izmir, Turkey</text:span></text:p>
      <text:p text:style-name="P30"><text:span text:style-name="T31">2 International Computer Institute, Ege University, Izmir, Turkey</text:span></text:p>
      <text:p text:style-name="P32"><text:span text:style-name="T33">3 Department of Psychiatry, Mugla Sitki Kocman University Training and Research Hospital,<text:s/></text:span><text:span text:style-name="T34">Mugla, Turkey</text:span></text:p>
      <text:p text:style-name="P35"><text:span text:style-name="T36">4 School of Engineering, Applied Science and Technology, Canadian University, Dubai</text:span></text:p>
      <text:p text:style-name="P37"><text:span text:style-name="T38">5 Department of Computer<text:s/></text:span><text:span text:style-name="T39">Engineering, Izmir University of Economics, Izmir, Turkey</text:span></text:p>
      <text:p text:style-name="P40"><text:span text:style-name="T41">6 Department of Radiology, School of Medicine,<text:s/></text:span><text:span text:style-name="T42">Ege University, Izmir, Turkey</text:span></text:p>
      <text:p text:style-name="P43"/>
      <text:p text:style-name="P44"><text:span text:style-name="T45">Elif Ozge Aktas’<text:s/></text:span><text:span text:style-name="T46">e-mail address: elifozgeaktas@gmail.com</text:span></text:p>
      <text:p text:style-name="P47"><text:span text:style-name="T48">Kaan Keskin’s Academic e-mail address:<text:s/></text:span><text:a xlink:href="mailto:kaanka5312@gmail.com" office:target-frame-name="_top" xlink:show="replace"><text:span text:style-name="T49">kaanka5312@gmail.com</text:span></text:a></text:p>
      <text:p text:style-name="P50"><text:span text:style-name="T51">Cemre Candemir’s Academic e-mail address:<text:s/></text:span><text:a xlink:href="mailto:cemre.candemir@ege.edu.tr" office:target-frame-name="_top" xlink:show="replace"><text:span text:style-name="T52">cemre.candemir@ege.edu.tr</text:span></text:a></text:p>
      <text:p text:style-name="P53"><text:span text:style-name="T54">Aslıhan Uyar’s e-mail address:<text:s/></text:span><text:a xlink:href="mailto:aslihanuyar48@gmail.com" office:target-frame-name="_top" xlink:show="replace"><text:span text:style-name="T55">aslihanuyar48@gmail.com</text:span></text:a></text:p>
      <text:p text:style-name="P56"><text:span text:style-name="T57">İbrahim Sungur’s e-mail address:<text:s/></text:span><text:a xlink:href="mailto:sunguribrahim97@gmail.com" office:target-frame-name="_top" xlink:show="replace"><text:span text:style-name="T58">sunguribrahim97@gmail.com</text:span></text:a></text:p>
      <text:p text:style-name="P59"><text:span text:style-name="T60">Kaya Oğuz’s e-mail address:<text:s/></text:span><text:a xlink:href="mailto:kaya.oguz@cud.ac.ae" office:target-frame-name="_top" xlink:show="replace"><text:span text:style-name="T61">kaya.oguz@cud.ac.ae</text:span></text:a></text:p>
      <text:p text:style-name="P62"><text:span text:style-name="T63">Yiğit Erdogan’s e-mail address:<text:s/></text:span><text:a xlink:href="mailto:yigiterdogan@gmail.com" office:target-frame-name="_top" xlink:show="replace"><text:span text:style-name="T64">yigiterdogan@gmail.com</text:span></text:a></text:p>
      <text:p text:style-name="P65"><text:span text:style-name="T66">Omer Kitis’ e-mail address:</text:span><text:span text:style-name="T67"><text:s/></text:span><text:a xlink:href="mailto:omer.kitis@ege.edu.tr" office:target-frame-name="_top" xlink:show="replace"><text:span text:style-name="T68">omer.kitis@ege.edu.tr</text:span></text:a></text:p>
      <text:p text:style-name="P69"><text:span text:style-name="T70">Ali Saffet Gonul’s e-mail address:<text:s/></text:span><text:span text:style-name="T71">ali.saffet.gonul@ege.edu.tr</text:span></text:p>
      <text:p text:style-name="P72"/>
      <text:p text:style-name="P73"/>
      <text:p text:style-name="P74"><text:span text:style-name="T75">Corresponding author:</text:span><text:span text:style-name="T76"> </text:span></text:p>
      <text:p text:style-name="P77"/>
      <text:p text:style-name="P78"><text:span text:style-name="T79">Ali Saffet Gonul, MD</text:span></text:p>
      <text:p text:style-name="P80"/>
      <text:p text:style-name="Standard"><text:span text:style-name="T81">Address:</text:span></text:p>
      <text:p text:style-name="Standard"><text:span text:style-name="T82">Ege University School of Medicine Department of Psychiatry</text:span></text:p>
      <text:p text:style-name="Standard"><text:span text:style-name="T83">SoCAT Lab<text:s/></text:span><text:span text:style-name="T84"><text:line-break/></text:span><text:span text:style-name="T85">Bornova</text:span></text:p>
      <text:p text:style-name="Standard"><text:span text:style-name="T86">Izmir Turkey</text:span></text:p>
      <text:p text:style-name="P87"/>
      <text:p text:style-name="P88"><text:span text:style-name="T89">Phone:</text:span><text:span text:style-name="T90"><text:s/>+90 542 412 4684,<text:s/></text:span><text:span text:style-name="T91">E-mail</text:span><text:span text:style-name="T92">:<text:s/></text:span><text:span text:style-name="T93">ali.saffet.gonul@ege.edu.tr</text:span></text:p>
      <text:p text:style-name="P94"/>
      <text:p text:style-name="P95"><text:span text:style-name="T96">CRediT authorship contribution statement:</text:span></text:p>
      <text:p text:style-name="P97"/>
      <text:p text:style-name="P98"><text:span text:style-name="T99">Elif Ozge Aktas:</text:span><text:span text:style-name="T100"><text:s/>Writing – review &amp; editing, Writing – original draft, Visualization, Validation, Methodology,<text:s/></text:span><text:span text:style-name="T101">Investigation, Formal analysis, Conceptualization.<text:s/></text:span><text:span text:style-name="T102">Kaan Keskin:<text:s/></text:span><text:span text:style-name="T103">Writing – review &amp; editing, Methodology, Investigation, Formal analysis, Software.<text:s/></text:span><text:span text:style-name="T104">Cemre Kandemir:<text:s/></text:span><text:span text:style-name="T105">Software, Formal Analysis.<text:s/></text:span><text:span text:style-name="T106">Aslıhan Uyar:</text:span><text:span text:style-name="T107"><text:s/>Investigation.<text:s/></text:span><text:span text:style-name="T108">İbrahim Sungur</text:span><text:span text:style-name="T109">: Investigation.<text:s/></text:span><text:span text:style-name="T110">Kaya Oguz:</text:span><text:span text:style-name="T111"><text:s/>Software.<text:s/></text:span><text:span text:style-name="T112">Yigit Erdogan:<text:s/></text:span><text:span text:style-name="T113">Project administration.<text:s/></text:span><text:span text:style-name="T114">Omer Kitis:</text:span><text:span text:style-name="T115"><text:s/>Formal Analysis, Data Curation.<text:s/></text:span><text:span text:style-name="T116">Ali Saffet Gonul:</text:span><text:span text:style-name="T117"><text:s text:c="2"/>Writing – review &amp; editing, Writing – original draft, Supervision, Methodology, Conceptualization, Project administration, Funding<text:s/></text:span><text:span text:style-name="T118">acquisition, Resources.</text:span></text:p>
      <text:p text:style-name="P119"/>
      <text:p text:style-name="P120"/>
      <text:p text:style-name="P121"/>
      <text:p text:style-name="P122"/>
      <text:p text:style-name="P123"/>
      <text:p text:style-name="P124"/>
      <text:p text:style-name="P125"><text:span text:style-name="T126">Abstract</text:span></text:p>
      <text:soft-page-break/>
      <text:p text:style-name="P127"><text:span text:style-name="T128">Schizophrenia (SZ) is characterized by marked deficits in social cognition, yet the computational and neural mechanisms underlying social reinforcement learning remain poorly understood. We investigated dynamic social learning in patients with SZ (N = 29) and healthy controls (N = 45) during an iterative Trust Game performed under functional magnetic resonance imaging (fMRI).</text:span></text:p>
      <text:p text:style-name="P129"><text:span text:style-name="T130">Participant behavior was modeled using a Rescorla–Wagner framework to estimate learning rate</text:span><text:span text:style-name="T131"><text:s/></text:span><draw:frame draw:style-name="a0" text:anchor-type="as-char" svg:x="0in" svg:y="0in" svg:width="0.15833in" svg:height="0.175in" style:rel-width="scale" style:rel-height="scale"><draw:object xlink:href="Object 1/" xlink:type="simple" xlink:show="embed" xlink:actuate="onLoad"/></draw:frame><text:span text:style-name="T132">) and decision precision (inverse temperature,<text:s/></text:span><draw:frame draw:style-name="a1" text:anchor-type="as-char" svg:x="0in" svg:y="0in" svg:width="0.1in" svg:height="0.175in" style:rel-width="scale" style:rel-height="scale"><draw:object xlink:href="Object 2/" xlink:type="simple" xlink:show="embed" xlink:actuate="onLoad"/></draw:frame><text:span text:style-name="T133">), alongside trial-by-trial prediction errors (PEs) for neural analyses. Behaviorally, patients exhibited a marked impairment in utilizing positive social feedback, reflected in reduced win–stay behavior, significantly lower learning rates, and diminished model fit. Critically, patient behavior was best explained by a null model, indicating a failure to consistently integrate feedback into decision-making. At the computational level, reduced decision precision</text:span><text:span text:style-name="T134"><text:s/>(lower β) was significantly associated with positive symptom severity, suggesting a link between stochastic choice behavior and psychosis. Neuronally, while healthy controls showed robust PE-related activation in canonical reward and visual processing regions, patients exhibited significantly attenuated PE signaling, particularly within the left lateral occipital cortex and fusiform gyrus.</text:span></text:p>
      <text:p text:style-name="P135"><text:span text:style-name="T136">These findings indicate a fundamental disruption in precision-weighted social belief updating in schizophrenia,<text:s/></text:span><text:span text:style-name="T137">characterized by stochastic decision-making and degraded neural encoding of prediction errors. This supports predictive coding accounts of psychosis, in which impaired precision assignment to sensory feedback undermines adaptive learning and contributes to positive symptoms.</text:span></text:p>
      <text:p text:style-name="P138"><text:span text:style-name="T139">Keywords:</text:span><text:span text:style-name="T140"><text:s/>Schizophrenia, Social Dysfunction, Trust Game, Reinforcement Learning</text:span></text:p>
      <text:p text:style-name="P141"/>
      <text:p text:style-name="P142"/>
      <text:p text:style-name="P143"/>
      <text:p text:style-name="P144"/>
      <text:p text:style-name="P145"/>
      <text:p text:style-name="P146"/>
      <text:p text:style-name="P147"/>
      <text:p text:style-name="P148"/>
      <text:p text:style-name="P149"/>
      <text:list text:style-name="WWNum1">
        <text:list-item text:start-value="1">
          <text:p text:style-name="P150"><text:span text:style-name="T151">Introduction</text:span></text:p>
        </text:list-item>
      </text:list>
      <text:p text:style-name="P152"><text:span text:style-name="T153">Social cognitive dysfunction, particularly impairments in emotion recognition and interpersonal reciprocity, is a core feature of<text:s/></text:span><text:span text:style-name="T154">schizophrenia (SZ) that critically contributes to social isolation, relapse risk, and poor functional outcomes<text:s/></text:span><text:bookmark-start text:name="ZOTERO_BREF_tziNZT7vNfUx"/>(1–6)<text:bookmark-end text:name="ZOTERO_BREF_tziNZT7vNfUx"/><text:span text:style-name="T155">. These deficits reflect a fundamental disturbance in how individuals learn from<text:s/></text:span><text:soft-page-break/><text:span text:style-name="T156">and adapt to dynamic social environments, where successful interaction depends on continuously updating expectations about others based on feedback<text:s/></text:span><text:bookmark-start text:name="ZOTERO_BREF_FrwCU2eguzOI"/><text:span text:style-name="T157">(7,8)</text:span><text:bookmark-end text:name="ZOTERO_BREF_FrwCU2eguzOI"/><text:span text:style-name="T158">.</text:span></text:p>
      <text:p text:style-name="P159"><text:span text:style-name="T160">To navigate such environments, the brain must compute prediction errors (PEs), the discrepancy between expected and observed outcomes, which serve as the core<text:s/></text:span><text:span text:style-name="T161">signals for updating internal models<text:s/></text:span><text:bookmark-start text:name="ZOTERO_BREF_AfXx41MC4mFG"/>(9–11)<text:bookmark-end text:name="ZOTERO_BREF_AfXx41MC4mFG"/><text:span text:style-name="T162">. Within social contexts, these signals allow individuals to refine expectations about others’ intentions and adjust behavior accordingly. Although PE signaling has been classically linked to dopaminergic activity and ventral striatum, converging evidence demonstrates that it is implemented across distributed neural systems, including striatal, frontal, cingulate, and sensory processing regions<text:s/></text:span><text:bookmark-start text:name="ZOTERO_BREF_XorhVnzmJMdU"/>(12–14)<text:bookmark-end text:name="ZOTERO_BREF_XorhVnzmJMdU"/>.</text:p>
      <text:p text:style-name="P163"><text:span text:style-name="T164">Computational psychiatry provides a mechanistic framework to<text:s/></text:span><text:span text:style-name="T165">formalize these processes by decomposing behavior into latent parameters derived from reinforcement learning models<text:s/></text:span><text:bookmark-start text:name="ZOTERO_BREF_ZFcbEabjNrdo"/><text:span text:style-name="T166">(15,16)</text:span><text:bookmark-end text:name="ZOTERO_BREF_ZFcbEabjNrdo"/><text:span text:style-name="T167">. In this framework, the learning rate (</text:span><draw:frame draw:style-name="a2" text:anchor-type="as-char" svg:x="0in" svg:y="0in" svg:width="0.1in" svg:height="0.175in" style:rel-width="scale" style:rel-height="scale"><draw:object xlink:href="Object 3/" xlink:type="simple" xlink:show="embed" xlink:actuate="onLoad"/></draw:frame><text:span text:style-name="T168">) determines how rapidly expectations are updated in response to PEs, while the inverse temperature (</text:span><draw:frame draw:style-name="a3" text:anchor-type="as-char" svg:x="0in" svg:y="0in" svg:width="0.1in" svg:height="0.175in" style:rel-width="scale" style:rel-height="scale"><draw:object xlink:href="Object 4/" xlink:type="simple" xlink:show="embed" xlink:actuate="onLoad"/></draw:frame><text:span text:style-name="T169">) reflects the precision, or stochasticity, of the decision-making process<text:s/></text:span><text:bookmark-start text:name="ZOTERO_BREF_v7XhDHRgUi2T"/><text:span text:style-name="T170">(17,18)</text:span><text:bookmark-end text:name="ZOTERO_BREF_v7XhDHRgUi2T"/><text:span text:style-name="T171">. This approach enables dissociation between impairments in belief updating and deficits in the implementation of learned values into behavior, offering a powerful<text:s/></text:span><text:span text:style-name="T172">tool to characterize abnormalities in psychiatric disorders.</text:span></text:p>
      <text:p text:style-name="P173"><text:span text:style-name="T174">Within this framework, schizophrenia is associated with profound disruptions in PE processing and reinforcement learning<text:s/></text:span><text:bookmark-start text:name="ZOTERO_BREF_fUOMCUPHMs8y"/><text:span text:style-name="T175">(19,20)</text:span><text:bookmark-end text:name="ZOTERO_BREF_fUOMCUPHMs8y"/><text:span text:style-name="T176">. Behaviorally, individuals with SZ fail to effectively implement adaptive strategies such as “win–stay/loss–shift,” showing reduced sensitivity to positive social feedback despite relatively preserved responses to negative outcomes<text:s/></text:span><text:bookmark-start text:name="ZOTERO_BREF_yLEBg2tSihNx"/><text:span text:style-name="T177">(21)</text:span><text:bookmark-end text:name="ZOTERO_BREF_yLEBg2tSihNx"/><text:span text:style-name="T178">. At the neural level, functional imaging studies have revealed aberrant PE-related<text:s/></text:span><text:span text:style-name="T179">activity across frontal and cingulate regions, alongside dysregulated dopaminergic signaling that contributes to abnormal salience attribution<text:s/></text:span><text:bookmark-start text:name="ZOTERO_BREF_dey9aJGCzUVt"/>(22–25)<text:bookmark-end text:name="ZOTERO_BREF_dey9aJGCzUVt"/><text:span text:style-name="T180">. These disturbances have been directly linked to the emergence of positive symptoms, including delusions, which may arise from inappropriate updating of beliefs based on unreliable prediction signals<text:s/></text:span><text:bookmark-start text:name="ZOTERO_BREF_NrCWC69PW6vh"/><text:span text:style-name="T181">(26,27)</text:span><text:bookmark-end text:name="ZOTERO_BREF_NrCWC69PW6vh"/><text:span text:style-name="T182">.</text:span></text:p>
      <text:p text:style-name="P183"><text:span text:style-name="T184">Importantly, these abnormalities extend beyond canonical reward circuitry. Disruptions in fronto-striatal systems are accompanied by altered<text:s/></text:span><text:span text:style-name="T185">connectivity with temporal and extrastriate visual regions, including the fusiform gyrus<text:s/></text:span><text:bookmark-start text:name="ZOTERO_BREF_VtGfB1hyoacB"/><text:span text:style-name="T186">(28,29)</text:span><text:bookmark-end text:name="ZOTERO_BREF_VtGfB1hyoacB"/><text:span text:style-name="T187">; suggesting that impairments in social learning may also reflect degraded processing of socially relevant sensory information<text:s/></text:span><text:bookmark-start text:name="ZOTERO_BREF_t79Ep6ZnIRLZ"/><text:span text:style-name="T188">(19,30)</text:span><text:bookmark-end text:name="ZOTERO_BREF_t79Ep6ZnIRLZ"/><text:span text:style-name="T189">. From a predictive coding perspective, such deficits may arise from impaired precision-weighting of incoming sensory signals, leading to unreliable integration of external feedback and increased reliance on internally generated beliefs<text:s/></text:span><text:bookmark-start text:name="ZOTERO_BREF_VS3b1Ox3icy3"/><text:span text:style-name="T190">(31)</text:span><text:bookmark-end text:name="ZOTERO_BREF_VS3b1Ox3icy3"/><text:span text:style-name="T191">.</text:span></text:p>
      <text:p text:style-name="P192"><text:span text:style-name="T193">To address remaining gaps in<text:s/></text:span><text:span text:style-name="T194">understanding social reinforcement learning within interactive contexts, we employed an iterative Trust Game with fMRI and computational modeling. We hypothesized that SZ patients would exhibit impaired utilization of positive social feedback, reflected in reduced learning rates and/or increased desicion stochasticity, alongside blunted neural PE encoding in fronto-striatal and occipito-temporal networks. Furthermore, we predicted these abnormalities would correlate with positive symptom severity, linking<text:s/></text:span><text:span text:style-name="T195">aberrant learning to the phenomenology of psychosis.</text:span></text:p>
      <text:list text:style-name="WWNum1" text:continue-numbering="true">
        <text:list-item>
          <text:p text:style-name="P196"><text:span text:style-name="T197">Methods</text:span></text:p>
        </text:list-item>
      </text:list>
      <text:p text:style-name="P198"><text:span text:style-name="T199">2.1 Participants</text:span></text:p>
      <text:p text:style-name="P200"><text:span text:style-name="T201">Thirty-three clinically stable, right-handed individuals with schizophrenia were recruited from the Ege University Department of Psychiatry outpatient clinic. All SZ participants had been on a stable pharmacological regimen for at least six months prior to enrollment, with no changes in treatment during this period. <text:s/>A total of 49 right-handed healthy controls (HC) were recruited via advertisements and social media platforms. The<text:s/></text:span><text:span text:style-name="T202">HC group was matched to the SZ group at he group level. The equivalence between<text:s/></text:span><text:soft-page-break/><text:span text:style-name="T203">groups in terms of age, sex and years of education was confirmed using independent samples t-tests for continuous variables and Pearson</text:span><text:span text:style-name="T204">’s chi-square test for categorical variables, ensuring no significant differences (all p&gt;0.05).</text:span><text:span text:style-name="T205"><text:s/>The study was conducted in accordance with the Declaration of Helsinki, and all participants provided written informed consent.</text:span></text:p>
      <text:p text:style-name="P206"/>
      <text:p text:style-name="P207"><text:span text:style-name="T208">Patients with current depressive episodes, substance use disorders, or<text:s/></text:span><text:span text:style-name="T209">significant medical comorbid conditions affecting cerebral blood flow such as diabetes, hypertension and morbid obesity were excluded. Healthy controls were recruited through community advertisements and had no history of psychiatric disorders and no family history of schizophrenia. Demographic characteristics of all participants are presented in Table 1.</text:span><text:span text:style-name="T210"><text:s/></text:span><text:span text:style-name="T211">Four SZ and 3 HC subjects were excluded due to excessive head motion (&gt;0.3 mm) in more than 20% of all TR, continued analysis with total of 29 SZ (SZ,<text:s/></text:span><text:span text:style-name="T212">mean age ± SD: 39.86 ± 11.03 years) and 46 HC participants.<text:s/></text:span><text:span text:style-name="T213">The mean duration of illness for the SZ group was 13.72 ± 10.23 years (see Table 1). The clinical sample consisted of individuals with a chronic course of the illness, and no first-episode patients were included.</text:span></text:p>
      <text:p text:style-name="P214"><text:span text:style-name="T215">2.2 Psychometric Assessment</text:span></text:p>
      <text:p text:style-name="P216"><text:span text:style-name="T217">Schizophrenia diagnoses were confirmed by using the Structured Clinical Interview for DSM-5 (SCID-5). The Positive and Negative Syndrome Symptom Scale (PANSS), a semi-structured assessment, was administered to<text:s/></text:span><text:span text:style-name="T218">evaluate symptom severity and patient functionality. Cognitive and social functioning were evaluated with the Schizophrenia Cognition Rating Scale (SCoRS). Healthy controls (HC) were similarly evaluated using the SCID-5 to rule out any current or lifetime psychiatric diagnose</text:span></text:p>
      <text:p text:style-name="P219"><text:span text:style-name="T220">2.3 Task Paradigm</text:span></text:p>
      <text:p text:style-name="P221"><text:span text:style-name="T222">Participants completed 60 trials of an iterative Trust Game during fMRI<text:s/></text:span><text:bookmark-start text:name="ZOTERO_BREF_2eosskXErdi9"/><text:span text:style-name="T223">(32)</text:span><text:bookmark-end text:name="ZOTERO_BREF_2eosskXErdi9"/><text:span text:style-name="T224">. To enhance ecological validity, participants briefly met the "trustee" prior to scanning, though the trustee’s reciprocal or deceptive<text:s/></text:span><text:span text:style-name="T225">responses were preprogrammed.</text:span></text:p>
      <text:p text:style-name="P226"/>
      <text:p text:style-name="P227"><text:span text:style-name="T228">On each trial, participants received 40 Turkish Lira (TL) (~2 USD at the time of study) and chose to either "keep" or "invest." Keeping the money resulted in an even split (20 TL each). Investing tripled the endowment (120 TL), allowing the trustee to either share the money equally or keep the entire amount (see Figure 1).</text:span></text:p>
      <text:p text:style-name="P229"/>
      <text:p text:style-name="P230"><text:span text:style-name="T231">Each 24-second trial comprised a standardized sequence (Figure 1): a 6-second decision-making phase featuring the trustee's photograph, a 3-second response</text:span><text:span text:style-name="T232"><text:s/>window, a 3-second anticipation phase, and an outcome phase displaying the trustee’s choice. Trials were separated by a variable, jittered inter-trial interval (3-6s) to optimize event-related BOLD signal estimation. Total task duration of approximately 24 minutes and 54 seconds (See Figure 2). This design allows trial-by-trial estimation of prediction errors and value updating during social decision-making.</text:span></text:p>
      <text:p text:style-name="P233"/>
      <text:p text:style-name="P234"><text:span text:style-name="T235">The simulated trustee’s responses were predetermined to manipulate participants' beliefs about<text:s/></text:span><text:span text:style-name="T236">trustworthiness across three blocks of 20 trials each (totaling 60 trials). Specifically, the trustee shared the tripled amount in 80% of the trials in the first block (Block 1), 50% in the second block (Block 2), and again 80% in the third block (Block 3). While the proportion of trustee responses was fixed per block, the order of outcomes was randomized for each participant.</text:span></text:p>
      <text:p text:style-name="P237"/>
      <text:p text:style-name="P238"/>
      <text:soft-page-break/>
      <text:p text:style-name="P239"><draw:frame draw:style-name="a4" draw:name="image2.png" text:anchor-type="as-char" svg:x="0in" svg:y="0in" svg:width="6.5in" svg:height="5.60709in" style:rel-width="scale" style:rel-height="scale"><draw:image xlink:href="media/image1.png" xlink:type="simple" xlink:show="embed" xlink:actuate="onLoad"/><svg:title/><svg:desc>A diagram of a group of individuals

AI-generated content may be incorrect.</svg:desc></draw:frame></text:p>
      <text:p text:style-name="P240"><text:span text:style-name="T241">Figure 1.<text:s/></text:span><text:span text:style-name="T242">Single-trial timeline of the Trust Game. At the start of each trial, the participant receives an endowment of 40<text:s/></text:span><text:span text:style-name="T243">Turkish Lira (TL) and chooses to Keep or Invest (transfer to a trustee). If they Keep, the 40 TL is split evenly (20 TL each). If they Invest, the transfer is tripled to 120 TL; the trustee then either shares it equally (60 TL each) or keeps the entire 120 TL. The six panels illustrate the standardized sequence of screens presented on every trial—from endowment and choice to trustee decision and outcome feedback. The task comprised three blocks of 20 trials (60 trials total), with the core decision on each<text:s/></text:span><text:span text:style-name="T244">trial being whether to trust the trustee.</text:span></text:p>
      <text:p text:style-name="P245"/>
      <text:p text:style-name="P246"/>
      <text:p text:style-name="P247"/>
      <text:p text:style-name="P248"/>
      <text:p text:style-name="P249"/>
      <text:p text:style-name="P250"/>
      <text:soft-page-break/>
      <text:p text:style-name="P251"><draw:frame draw:style-name="a5" draw:name="image5.png" text:anchor-type="as-char" svg:x="0in" svg:y="0in" svg:width="6.5in" svg:height="3.6563in" style:rel-width="scale" style:rel-height="scale"><draw:image xlink:href="media/image2.png" xlink:type="simple" xlink:show="embed" xlink:actuate="onLoad"/><svg:title/><svg:desc/></draw:frame></text:p>
      <text:p text:style-name="P252"><text:span text:style-name="T253">Figure 2.</text:span><text:span text:style-name="T254"><text:s/>Trial screens and timing in the Trust Game. fMRI task model for each trial. Each participant plays the game as sets of 20 trials, i.e., 60 trials in total. (1) Decision/anticipation (6 s): trustee photo + 40 TL endowment shown; no response required. (2) Choice confirmation (≤3 s): participants confirm Keep vs Invest via button press; no response yields 0 TL for that trial; five missed responses (consecutive or not) terminate the task. (3)<text:s/></text:span><text:span text:style-name="T255">Anticipation (3 s): waiting for trustee’s decision. (4) Outcome (3 s): trustee’s choice display share the tripled investment (120 TL, 60 TL each) or keep all—along with participant earnings. (E) Jittered ITI (blank) 3–6 s. (F) Fixation 3–6 s, adjusted to yield a fixed 9 s total inter-trial interval. Durations in seconds unless noted.</text:span></text:p>
      <text:p text:style-name="P256"/>
      <text:p text:style-name="P257"><text:span text:style-name="T258">2.4. Computational Learning Model Based on Rescorla-Wagner</text:span></text:p>
      <text:p text:style-name="P259"><text:span text:style-name="T260">Choice behavior was fit to a standard Rescorla-Wagner (RW) reinforcement learning model utilizing a SoftMax decision</text:span><text:span text:style-name="T261"><text:s/>rule to estimate learning rate (</text:span><draw:frame draw:style-name="a6" text:anchor-type="as-char" svg:x="0in" svg:y="0in" svg:width="0.1in" svg:height="0.175in" style:rel-width="scale" style:rel-height="scale"><draw:object xlink:href="Object 5/" xlink:type="simple" xlink:show="embed" xlink:actuate="onLoad"/></draw:frame><text:span text:style-name="T262">) and inverse temperature (</text:span><draw:frame draw:style-name="a7" text:anchor-type="as-char" svg:x="0in" svg:y="0in" svg:width="0.1in" svg:height="0.175in" style:rel-width="scale" style:rel-height="scale"><draw:object xlink:href="Object 6/" xlink:type="simple" xlink:show="embed" xlink:actuate="onLoad"/></draw:frame><text:span text:style-name="T263">). Subject-level parameters were estimated using Maximum A Posteriori (MAP) estimation to ensure robust fits. Optimization routines and prior distributions are detailed in the Supplementary Material. We performed control analysis for model selection, comparing simple RW model to alternative models such as adaptive learning, dual alpha and null model. Full mathematical model formulations are provided in the Supplementary Material.</text:span></text:p>
      <text:p text:style-name="P264"><text:span text:style-name="T265">Model-free<text:s/></text:span><text:span text:style-name="T266">behavior was quantified using Win-Stay/Loss-Shift (WSLS) probabilities. A 'Win' was defined as a trial where the trustee reciprocated (shared the investment), and a 'Loss' as a trial where the trustee kept the investment. 'Win-Stay' was calculated as the probability of investing in trial<text:s/></text:span><draw:frame draw:style-name="a8" text:anchor-type="as-char" svg:x="0in" svg:y="0in" svg:width="0.23333in" svg:height="0.175in" style:rel-width="scale" style:rel-height="scale"><draw:object xlink:href="Object 7/" xlink:type="simple" xlink:show="embed" xlink:actuate="onLoad"/></draw:frame><text:span text:style-name="T267"><text:s/>given a win in trial<text:s/></text:span><draw:frame draw:style-name="a9" text:anchor-type="as-char" svg:x="0in" svg:y="0in" svg:width="0.09167in" svg:height="0.175in" style:rel-width="scale" style:rel-height="scale"><draw:object xlink:href="Object 8/" xlink:type="simple" xlink:show="embed" xlink:actuate="onLoad"/></draw:frame></text:p>
      <text:p text:style-name="P268"><text:span text:style-name="T269">2.4.1 Model validation and Parameter Recovery</text:span></text:p>
      <text:p text:style-name="P270"><text:span text:style-name="T271">To ensure the mathematical reliability of our computational framework, we conducted extensive parameter recovery simulations and predictive checks. These</text:span><text:span text:style-name="T272"><text:s/>analyses confirmed confident parameter identifiability for both learning rate and inverse temperature and demonstrated that the simple RW model reliably captured empirical choice trajectories (significantly outperforming chance). Full simulation methodologies and recovery statistics are detailed in the Supplementary Material.</text:span></text:p>
      <text:p text:style-name="P273"><text:span text:style-name="T274">2.4.2 Statistical Analysis of Computational Parameters</text:span></text:p>
      <text:p text:style-name="P275"/>
      <text:soft-page-break/>
      <text:p text:style-name="P276"><text:span text:style-name="T277">Group differences in the computational parameters (</text:span><draw:frame draw:style-name="a10" text:anchor-type="as-char" svg:x="0in" svg:y="0in" svg:width="0.1in" svg:height="0.175in" style:rel-width="scale" style:rel-height="scale"><draw:object xlink:href="Object 9/" xlink:type="simple" xlink:show="embed" xlink:actuate="onLoad"/></draw:frame><text:span text:style-name="T278">,<text:s/></text:span><draw:frame draw:style-name="a11" text:anchor-type="as-char" svg:x="0in" svg:y="0in" svg:width="0.1in" svg:height="0.175in" style:rel-width="scale" style:rel-height="scale"><draw:object xlink:href="Object 10/" xlink:type="simple" xlink:show="embed" xlink:actuate="onLoad"/></draw:frame><text:span text:style-name="T279">, Pseudo-R</text:span><text:span text:style-name="T280">2</text:span><text:span text:style-name="T281">) were evaluated using non-parametric permutation tests (10,000</text:span><text:span text:style-name="T282"><text:s/>iterations). To robustly account for the non-normal distribution of the estimates, the difference in group medians was computed through the methodological resampling of group labels. Following the assessment of main group effects, we investigated the relationship between these computational parameters and clinical symptomatology using Ordinary Least Squares (OLS) regression. Prior to these regression analyses, a log transformation was applied specifically to the inverse temperature parameter (</text:span><draw:frame draw:style-name="a12" text:anchor-type="as-char" svg:x="0in" svg:y="0in" svg:width="0.075in" svg:height="0.175in" style:rel-width="scale" style:rel-height="scale"><draw:object xlink:href="Object 11/" xlink:type="simple" xlink:show="embed" xlink:actuate="onLoad"/></draw:frame><text:span text:style-name="T283">). Because<text:s/></text:span><draw:frame draw:style-name="a13" text:anchor-type="as-char" svg:x="0in" svg:y="0in" svg:width="0.075in" svg:height="0.175in" style:rel-width="scale" style:rel-height="scale"><draw:object xlink:href="Object 12/" xlink:type="simple" xlink:show="embed" xlink:actuate="onLoad"/></draw:frame><text:span text:style-name="T284"><text:s/></text:span><text:span text:style-name="T285">is theoretically unbounded at the upper end, its raw values exhibited a strong positive skew that violated the OLS assumption of normally distributed residuals. Log-transforming this parameter corrected the skew and stabilized the variance, ensuring robust model fits, whereas the naturally bounded learning rate (</text:span><draw:frame draw:style-name="a14" text:anchor-type="as-char" svg:x="0in" svg:y="0in" svg:width="0.1in" svg:height="0.175in" style:rel-width="scale" style:rel-height="scale"><draw:object xlink:href="Object 13/" xlink:type="simple" xlink:show="embed" xlink:actuate="onLoad"/></draw:frame><text:span text:style-name="T286">) required no such transformation.</text:span></text:p>
      <text:p text:style-name="P287"><text:span text:style-name="T288">2.4.3 Analysis of Trial-by-Trial Prediction Errors</text:span></text:p>
      <text:p text:style-name="P289"><text:span text:style-name="T290">To investigate dynamic changes in surprise magnitude across the Trust Game, we analyzed the absolute value of<text:s/></text:span><text:span text:style-name="T291">trial-by-trial prediction errors (</text:span><draw:frame draw:style-name="a15" text:anchor-type="as-char" svg:x="0in" svg:y="0in" svg:width="0.29167in" svg:height="0.175in" style:rel-width="scale" style:rel-height="scale"><draw:object xlink:href="Object 14/" xlink:type="simple" xlink:show="embed" xlink:actuate="onLoad"/></draw:frame><text:span text:style-name="T292">) extracted from the winning computational model. We employed a Linear Mixed-Effects Model (LMM) to account for the nested, repeated-measures structure of the data (i.e., multiple trials nested within individual subjects).</text:span></text:p>
      <text:p text:style-name="P293"/>
      <text:p text:style-name="P294"><draw:frame draw:style-name="a16" text:anchor-type="as-char" svg:x="0in" svg:y="0in" svg:width="5.75in" svg:height="0.20833in" style:rel-width="scale" style:rel-height="scale"><draw:object xlink:href="Object 15/" xlink:type="simple" xlink:show="embed" xlink:actuate="onLoad"/></draw:frame></text:p>
      <text:p text:style-name="P295"/>
      <text:p text:style-name="P296"><text:span text:style-name="T297">The dependent variable was the trial-specific<text:s/></text:span><draw:frame draw:style-name="a17" text:anchor-type="as-char" svg:x="0in" svg:y="0in" svg:width="0.18333in" svg:height="0.175in" style:rel-width="scale" style:rel-height="scale"><draw:object xlink:href="Object 16/" xlink:type="simple" xlink:show="embed" xlink:actuate="onLoad"/></draw:frame><text:span text:style-name="T298"><text:s/>absolute prediction errors (</text:span><draw:frame draw:style-name="a18" text:anchor-type="as-char" svg:x="0in" svg:y="0in" svg:width="0.29167in" svg:height="0.175in" style:rel-width="scale" style:rel-height="scale"><draw:object xlink:href="Object 17/" xlink:type="simple" xlink:show="embed" xlink:actuate="onLoad"/></draw:frame><text:span text:style-name="T299">) for the subject<text:s/></text:span><draw:frame draw:style-name="a19" text:anchor-type="as-char" svg:x="0in" svg:y="0in" svg:width="0.05in" svg:height="0.175in" style:rel-width="scale" style:rel-height="scale"><draw:object xlink:href="Object 18/" xlink:type="simple" xlink:show="embed" xlink:actuate="onLoad"/></draw:frame><text:span text:style-name="T300">. The model included categorical fixed main effects for diagnostic<text:s/></text:span><draw:frame draw:style-name="a20" text:anchor-type="as-char" svg:x="0in" svg:y="0in" svg:width="0.425in" svg:height="0.175in" style:rel-width="scale" style:rel-height="scale"><draw:object xlink:href="Object 19/" xlink:type="simple" xlink:show="embed" xlink:actuate="onLoad"/></draw:frame><text:span text:style-name="T301"><text:s/>(HC vs SZ), Task Block (</text:span><draw:frame draw:style-name="a21" text:anchor-type="as-char" svg:x="0in" svg:y="0in" svg:width="0.39167in" svg:height="0.175in" style:rel-width="scale" style:rel-height="scale"><draw:object xlink:href="Object 20/" xlink:type="simple" xlink:show="embed" xlink:actuate="onLoad"/></draw:frame><text:span text:style-name="T302">, Trials 1-20, 21-40 and 41-60), and their interaction (</text:span><draw:frame draw:style-name="a22" text:anchor-type="as-char" svg:x="0in" svg:y="0in" svg:width="0.99167in" svg:height="0.175in" style:rel-width="scale" style:rel-height="scale"><draw:object xlink:href="Object 21/" xlink:type="simple" xlink:show="embed" xlink:actuate="onLoad"/></draw:frame><text:span text:style-name="T303">). To<text:s/></text:span><text:span text:style-name="T304">control for potential demographic confounding, participants<text:s/></text:span><draw:frame draw:style-name="a23" text:anchor-type="as-char" svg:x="0in" svg:y="0in" svg:width="0.24167in" svg:height="0.175in" style:rel-width="scale" style:rel-height="scale"><draw:object xlink:href="Object 22/" xlink:type="simple" xlink:show="embed" xlink:actuate="onLoad"/></draw:frame><text:span text:style-name="T305"><text:s/>and standardized<text:s/></text:span><draw:frame draw:style-name="a24" text:anchor-type="as-char" svg:x="0in" svg:y="0in" svg:width="0.26667in" svg:height="0.175in" style:rel-width="scale" style:rel-height="scale"><draw:object xlink:href="Object 23/" xlink:type="simple" xlink:show="embed" xlink:actuate="onLoad"/></draw:frame><text:span text:style-name="T306"><text:s/>(z-scored) were included as fixed-effect covariates. To appropriately model within-subject correlation and baseline individual differences in surprise, a random intercept for Subject (</text:span><draw:frame draw:style-name="a25" text:anchor-type="as-char" svg:x="0in" svg:y="0in" svg:width="0.26667in" svg:height="0.175in" style:rel-width="scale" style:rel-height="scale"><draw:object xlink:href="Object 24/" xlink:type="simple" xlink:show="embed" xlink:actuate="onLoad"/></draw:frame><text:span text:style-name="T307"><text:s/>was specified. Prior to analysis,<text:s/></text:span><draw:frame draw:style-name="a26" text:anchor-type="as-char" svg:x="0in" svg:y="0in" svg:width="0.29167in" svg:height="0.175in" style:rel-width="scale" style:rel-height="scale"><draw:object xlink:href="Object 25/" xlink:type="simple" xlink:show="embed" xlink:actuate="onLoad"/></draw:frame><text:span text:style-name="T308"><text:s/>values were standardized (z-scored) within the sample to ensure optimizer convergence and stabilize variance estimates.</text:span></text:p>
      <text:p text:style-name="P309"><text:span text:style-name="T310">2.5 fMRI Data Acquisition and Preprocessing</text:span></text:p>
      <text:p text:style-name="P311"><text:span text:style-name="T312">Functional imaging (fMRI) was performed using a</text:span><text:span text:style-name="T313"><text:s/>3.0-Tesla scanner</text:span><text:span text:style-name="T314">(Siemens Magnetom Verio, Erlangen, Germany) equipped with a 12-channel head coil. A 24-minute and 54-second task- based fMRI scan (utilizing the Trust Game paradigm) was acquired with the following core parameters: repetition time (TR) = 3000 ms, echo time (TE) = 30 ms, flip angle (FA) = 90°, voxel size 3x3x3 mm, matrix = 64x64, and the field of view (FOV) = 192x192 mm.<text:s/></text:span><text:span text:style-name="T315">Full acquisition parameters are detailed in the Supplementary Material. Standard preprocessing was conducted using SPM</text:span><text:span text:style-name="T316"><text:s/></text:span><text:span text:style-name="T317">Standard preprocessing was conducted using the recent 2025 release of SPM</text:span><text:span text:style-name="T318">, including spatial realignment, normalization to MNI space, spatial smoothing and offline motion parameter regression (see Supplementary Material).</text:span></text:p>
      <text:p text:style-name="P319"><text:span text:style-name="T320">2.6 fMRI Statistical Analysis</text:span></text:p>
      <text:p text:style-name="P321"><text:span text:style-name="T322">First-level General Linear Models (GLM) captured task-related BOLD responses. Crucially, trial-by-trial Prediction Errors (PE) were entered as an orthogonalized parametric modulator on the feedback onset to isolate computational learning signals. Second-level<text:s/></text:span><text:span text:style-name="T323">analyses evaluated group differences (Healthy Controls (HC) vs Schizophrenia (SZ)) via two sample t-tests. Whole-brain statistical maps were thresholded at an uncorrected<text:s/></text:span><draw:frame draw:style-name="a27" text:anchor-type="as-char" svg:x="0in" svg:y="0in" svg:width="0.65833in" svg:height="0.175in" style:rel-width="scale" style:rel-height="scale"><draw:object xlink:href="Object 26/" xlink:type="simple" xlink:show="embed" xlink:actuate="onLoad"/></draw:frame><text:span text:style-name="T324">, followed by cluster-level FEW correction (</text:span><draw:frame draw:style-name="a28" text:anchor-type="as-char" svg:x="0in" svg:y="0in" svg:width="0.825in" svg:height="0.175in" style:rel-width="scale" style:rel-height="scale"><draw:object xlink:href="Object 27/" xlink:type="simple" xlink:show="embed" xlink:actuate="onLoad"/></draw:frame><text:span text:style-name="T325">). Complete GLM construction and design matrix details are provided in the Supplementary Material.</text:span></text:p>
      <text:p text:style-name="P326"/>
      <text:soft-page-break/>
      <text:p text:style-name="P327"><text:span text:style-name="T328">3. Results</text:span></text:p>
      <text:p text:style-name="P329"><text:span text:style-name="T330">Statistical results are reported as Mean (</text:span><draw:frame draw:style-name="a29" text:anchor-type="as-char" svg:x="0in" svg:y="0in" svg:width="0.13333in" svg:height="0.175in" style:rel-width="scale" style:rel-height="scale"><draw:object xlink:href="Object 28/" xlink:type="simple" xlink:show="embed" xlink:actuate="onLoad"/></draw:frame><text:span text:style-name="T331">) and Standard Deviation (</text:span><draw:frame draw:style-name="a30" text:anchor-type="as-char" svg:x="0in" svg:y="0in" svg:width="0.375in" svg:height="0.175in" style:rel-width="scale" style:rel-height="scale"><draw:object xlink:href="Object 29/" xlink:type="simple" xlink:show="embed" xlink:actuate="onLoad"/></draw:frame><text:span text:style-name="T332">).</text:span></text:p>
      <text:p text:style-name="P333"><text:span text:style-name="T334">3.1 Model Free Behavioral Strategies</text:span></text:p>
      <text:p text:style-name="P335"><text:span text:style-name="T336">Permutation-based analyses (10,000 resamples) revealed a significant group<text:s/></text:span><text:span text:style-name="T337">difference in Win–Stay behavior. Individuals with SZ exhibited a significantly lower probability of repeating investment (</text:span><draw:frame draw:style-name="a31" text:anchor-type="as-char" svg:x="0in" svg:y="0in" svg:width="1.20833in" svg:height="0.175in" style:rel-width="scale" style:rel-height="scale"><draw:object xlink:href="Object 30/" xlink:type="simple" xlink:show="embed" xlink:actuate="onLoad"/></draw:frame><text:span text:style-name="T338">) following a cooperative outcome compared to HC (</text:span><draw:frame draw:style-name="a32" text:anchor-type="as-char" svg:x="0in" svg:y="0in" svg:width="1.85833in" svg:height="0.175in" style:rel-width="scale" style:rel-height="scale"><draw:object xlink:href="Object 31/" xlink:type="simple" xlink:show="embed" xlink:actuate="onLoad"/></draw:frame><text:span text:style-name="T339">), indicating impaired utilization of positive social feedback. In contrast, Loss–Shift behavior did not differ significantly between groups, suggesting relatively preserved responses to negative outcomes. (</text:span><draw:frame draw:style-name="a33" text:anchor-type="as-char" svg:x="0in" svg:y="0in" svg:width="3.04167in" svg:height="0.175in" style:rel-width="scale" style:rel-height="scale"><draw:object xlink:href="Object 32/" xlink:type="simple" xlink:show="embed" xlink:actuate="onLoad"/></draw:frame><text:span text:style-name="T340">).</text:span></text:p>
      <text:p text:style-name="P341"/>
      <text:p text:style-name="P342"><draw:frame draw:style-name="a34" draw:name="image3.png" text:anchor-type="as-char" svg:x="0in" svg:y="0in" svg:width="3.54291in" svg:height="1.47638in" style:rel-width="scale" style:rel-height="scale"><draw:image xlink:href="media/image3.png" xlink:type="simple" xlink:show="embed" xlink:actuate="onLoad"/><svg:title/><svg:desc/></draw:frame></text:p>
      <text:p text:style-name="P343"><text:span text:style-name="T344">Figure 3. Group differences in Win-Stay and Loss-Shift behavior. Probability of utilizing Win-Stay and Loss-Shift heuristics<text:s/></text:span><text:span text:style-name="T345">for Healthy Controls (HC) and Schizophrenia (SZ) patients. SZ patients demonstrated a significantly lower probability of applying the Win-Stay strategy compared to HC, whereas Loss-Shift behavior remained intact across both groups. Colored markers represent individual participants, overlaid on box plots displaying the data distribution and median (permutation test).</text:span></text:p>
      <text:p text:style-name="P346"/>
      <text:p text:style-name="P347"><text:span text:style-name="T348">3.2 Computational Modeling Results</text:span></text:p>
      <text:p text:style-name="P349"><text:span text:style-name="T350">Model comparison demonstrated that the standard Rescorla–Wagner (RW) model provided the best overall fit<text:s/></text:span><text:span text:style-name="T351">at the group level, yielding the lowest Bayesian Information Criterion (BIC) relative to alternative models, including dual-learning-rate and null models (Supplementary Table S1). Accordingly, the RW model was used to estimate individual learning parameters. Despite this group-level fit, a critical observation emerged at the individual level: for a substantial proportion of SZ participants, choice behavior was better explained by a null model than by reinforcement learning models, indicating a failure to<text:s/></text:span><text:span text:style-name="T352">systematically incorporate feedback into decision-making.</text:span></text:p>
      <text:p text:style-name="P353"/>
      <text:p text:style-name="P354"><text:span text:style-name="T355">Permutation tests (10,000 resamples) revealed that SZ participants exhibited significantly reduced learning rates (α) compared to HC (Median = 0.051) compared to HC (Median = 0.197; respectively, p = .010, surviving Bonferroni correction), indicating impaired updating of expected value based on feedback. There was a trend-level difference in inverse temperature (</text:span><draw:frame draw:style-name="a35" text:anchor-type="as-char" svg:x="0in" svg:y="0in" svg:width="0.1in" svg:height="0.175in" style:rel-width="scale" style:rel-height="scale"><draw:object xlink:href="Object 33/" xlink:type="simple" xlink:show="embed" xlink:actuate="onLoad"/></draw:frame><text:span text:style-name="T356">) between groups (</text:span><draw:frame draw:style-name="a36" text:anchor-type="as-char" svg:x="0in" svg:y="0in" svg:width="3.16667in" svg:height="0.175in" style:rel-width="scale" style:rel-height="scale"><draw:object xlink:href="Object 34/" xlink:type="simple" xlink:show="embed" xlink:actuate="onLoad"/></draw:frame><text:span text:style-name="T357">). Furthermore, overall model fit (Pseudo-R</text:span><text:span text:style-name="T358">2</text:span><text:span text:style-name="T359">) was significantly lower</text:span><text:span text:style-name="T360"><text:s/>in patients (</text:span><draw:frame draw:style-name="a37" text:anchor-type="as-char" svg:x="0in" svg:y="0in" svg:width="1.08333in" svg:height="0.175in" style:rel-width="scale" style:rel-height="scale"><draw:object xlink:href="Object 35/" xlink:type="simple" xlink:show="embed" xlink:actuate="onLoad"/></draw:frame><text:span text:style-name="T361">) than controls (</text:span><draw:frame draw:style-name="a38" text:anchor-type="as-char" svg:x="0in" svg:y="0in" svg:width="1.89167in" svg:height="0.175in" style:rel-width="scale" style:rel-height="scale"><draw:object xlink:href="Object 36/" xlink:type="simple" xlink:show="embed" xlink:actuate="onLoad"/></draw:frame><text:span text:style-name="T362">, surviving Bonferroni correction at<text:s/></text:span><draw:frame draw:style-name="a39" text:anchor-type="as-char" svg:x="0in" svg:y="0in" svg:width="1.29167in" svg:height="0.175in" style:rel-width="scale" style:rel-height="scale"><draw:object xlink:href="Object 37/" xlink:type="simple" xlink:show="embed" xlink:actuate="onLoad"/></draw:frame><text:span text:style-name="T363">) (</text:span><draw:frame draw:style-name="a40" text:anchor-type="as-char" svg:x="0in" svg:y="0in" svg:width="1.08333in" svg:height="0.175in" style:rel-width="scale" style:rel-height="scale"><draw:object xlink:href="Object 38/" xlink:type="simple" xlink:show="embed" xlink:actuate="onLoad"/></draw:frame><text:span text:style-name="T364">) compared to HC (</text:span><draw:frame draw:style-name="a41" text:anchor-type="as-char" svg:x="0in" svg:y="0in" svg:width="1.71667in" svg:height="0.175in" style:rel-width="scale" style:rel-height="scale"><draw:object xlink:href="Object 39/" xlink:type="simple" xlink:show="embed" xlink:actuate="onLoad"/></draw:frame><text:span text:style-name="T365">, surviving Bonferroni correction.</text:span></text:p>
      <text:p text:style-name="P366"/>
      <text:soft-page-break/>
      <text:p text:style-name="P367"><draw:frame draw:style-name="a42" draw:name="image1.png" text:anchor-type="as-char" svg:x="0in" svg:y="0in" svg:width="3.54291in" svg:height="1.47638in" style:rel-width="scale" style:rel-height="scale"><draw:image xlink:href="media/image4.png" xlink:type="simple" xlink:show="embed" xlink:actuate="onLoad"/><svg:title/><svg:desc/></draw:frame></text:p>
      <text:p text:style-name="P368"/>
      <text:p text:style-name="P369"><text:span text:style-name="T370">Figure 4.</text:span><text:span text:style-name="T371"><text:s/>Group differences in computational learning parameters. Distributions of learning rate (</text:span><draw:frame draw:style-name="a43" text:anchor-type="as-char" svg:x="0in" svg:y="0in" svg:width="0.1in" svg:height="0.175in" style:rel-width="scale" style:rel-height="scale"><draw:object xlink:href="Object 40/" xlink:type="simple" xlink:show="embed" xlink:actuate="onLoad"/></draw:frame><text:span text:style-name="T372">), inverse temperature<text:s/></text:span><draw:frame draw:style-name="a44" text:anchor-type="as-char" svg:x="0in" svg:y="0in" svg:width="0.15833in" svg:height="0.175in" style:rel-width="scale" style:rel-height="scale"><draw:object xlink:href="Object 41/" xlink:type="simple" xlink:show="embed" xlink:actuate="onLoad"/></draw:frame><text:span text:style-name="T373">), and pseudo-R</text:span><text:span text:style-name="T374">2</text:span><text:span text:style-name="T375"><text:s/>for Healthy Controls (HC) and Schizophrenia (SZ) patients. SZ patients demonstrated significantly reduced learning rates and poorer overall model fits compared to HC, while differences in inverse temperature (</text:span><draw:frame draw:style-name="a45" text:anchor-type="as-char" svg:x="0in" svg:y="0in" svg:width="0.1in" svg:height="0.175in" style:rel-width="scale" style:rel-height="scale"><draw:object xlink:href="Object 42/" xlink:type="simple" xlink:show="embed" xlink:actuate="onLoad"/></draw:frame><text:span text:style-name="T376">) were non-significant. Individual<text:s/></text:span><text:span text:style-name="T377">parameter estimates are overlaid on violin plots showing the data distribution and interquartile range (black bar) (permutation tests, Bonferroni-corrected).</text:span></text:p>
      <text:p text:style-name="P378"/>
      <text:p text:style-name="P379"><text:span text:style-name="T380">3.4 Clinical Correlates of Computational Parameters</text:span></text:p>
      <text:p text:style-name="P381"><text:span text:style-name="T382">Within the SZ group (N = 27), multiple linear regression analyses were conducted to assess associations between computational parameters and clinical variables. The model predicting learning rate (α) was not statistically significant (</text:span><draw:frame draw:style-name="a46" text:anchor-type="as-char" svg:x="0in" svg:y="0in" svg:width="1.625in" svg:height="0.175in" style:rel-width="scale" style:rel-height="scale"><draw:object xlink:href="Object 43/" xlink:type="simple" xlink:show="embed" xlink:actuate="onLoad"/></draw:frame><text:span text:style-name="T383">). However, the model predicting log-transformed inverse<text:s/></text:span><text:span text:style-name="T384">temperature (β) was significant (</text:span><draw:frame draw:style-name="a47" text:anchor-type="as-char" svg:x="0in" svg:y="0in" svg:width="2.33333in" svg:height="0.18333in" style:rel-width="scale" style:rel-height="scale"><draw:object xlink:href="Object 44/" xlink:type="simple" xlink:show="embed" xlink:actuate="onLoad"/></draw:frame><text:span text:style-name="T385">).</text:span></text:p>
      <text:p text:style-name="P386"/>
      <text:p text:style-name="P387"><text:span text:style-name="T388">Specifically, greater positive symptom severity (PANSS positive z-score) was associated with lower β, indicating increased decision stochasticity in patients with more severe positive symptoms<text:s/></text:span><draw:frame draw:style-name="a48" text:anchor-type="as-char" svg:x="0in" svg:y="0in" svg:width="1.15in" svg:height="0.175in" style:rel-width="scale" style:rel-height="scale"><draw:object xlink:href="Object 45/" xlink:type="simple" xlink:show="embed" xlink:actuate="onLoad"/></draw:frame><text:span text:style-name="T389">. In contrast, duration of illness, negative symptom severity and<text:s/></text:span><text:span text:style-name="T390">SCoRS</text:span><text:span text:style-name="T391"><text:s/>scores were not significantly associated with either<text:s/></text:span><draw:frame draw:style-name="a49" text:anchor-type="as-char" svg:x="0in" svg:y="0in" svg:width="0.1in" svg:height="0.175in" style:rel-width="scale" style:rel-height="scale"><draw:object xlink:href="Object 46/" xlink:type="simple" xlink:show="embed" xlink:actuate="onLoad"/></draw:frame><text:span text:style-name="T392"><text:s/>or<text:s/></text:span><draw:frame draw:style-name="a50" text:anchor-type="as-char" svg:x="0in" svg:y="0in" svg:width="0.1in" svg:height="0.175in" style:rel-width="scale" style:rel-height="scale"><draw:object xlink:href="Object 47/" xlink:type="simple" xlink:show="embed" xlink:actuate="onLoad"/></draw:frame><text:span text:style-name="T393">.</text:span></text:p>
      <text:p text:style-name="P394"><text:span text:style-name="T395">3.5 Trial-by-Trial Prediction Error Magnitudes</text:span></text:p>
      <text:p text:style-name="P396"><text:span text:style-name="T397">To characterize the temporal dynamics of learning, we examined the magnitude of absolute prediction<text:s/></text:span><text:span text:style-name="T398">errors (|PE|) across task blocks using a linear mixed-effects model, controlling for age and sex. Neither age (</text:span><draw:frame draw:style-name="a51" text:anchor-type="as-char" svg:x="0in" svg:y="0in" svg:width="0.575in" svg:height="0.175in" style:rel-width="scale" style:rel-height="scale"><draw:object xlink:href="Object 48/" xlink:type="simple" xlink:show="embed" xlink:actuate="onLoad"/></draw:frame><text:span text:style-name="T399">) nor sex (</text:span><draw:frame draw:style-name="a52" text:anchor-type="as-char" svg:x="0in" svg:y="0in" svg:width="0.575in" svg:height="0.175in" style:rel-width="scale" style:rel-height="scale"><draw:object xlink:href="Object 49/" xlink:type="simple" xlink:show="embed" xlink:actuate="onLoad"/></draw:frame><text:span text:style-name="T400">predicted |PE|.</text:span></text:p>
      <text:p text:style-name="P401"/>
      <text:p text:style-name="P402"><text:span text:style-name="T403">At the group level, there was no significant main effect of diagnosis at baseline. However, a significant main effect of task block was observed: HC participants exhibited increased |PE| during the second (volatile) block relative to the initial block, consistent with adaptive sensitivity to environmental uncertainty (</text:span><draw:frame draw:style-name="a53" text:anchor-type="as-char" svg:x="0in" svg:y="0in" svg:width="2.625in" svg:height="0.175in" style:rel-width="scale" style:rel-height="scale"><draw:object xlink:href="Object 50/" xlink:type="simple" xlink:show="embed" xlink:actuate="onLoad"/></draw:frame><text:span text:style-name="T404">).</text:span></text:p>
      <text:p text:style-name="P405"/>
      <text:p text:style-name="P406"><text:span text:style-name="T407">Critically, a significant group × block<text:s/></text:span><text:span text:style-name="T408">interaction emerged during this volatile phase (</text:span><draw:frame draw:style-name="a54" text:anchor-type="as-char" svg:x="0in" svg:y="0in" svg:width="2.85in" svg:height="0.175in" style:rel-width="scale" style:rel-height="scale"><draw:object xlink:href="Object 51/" xlink:type="simple" xlink:show="embed" xlink:actuate="onLoad"/></draw:frame><text:span text:style-name="T409">). While HC participants showed the expected increase in |PE|, SZ participants exhibited a blunted response, failing to scale prediction error magnitude in response to increased environmental unpredictability. No significant group differences were observed in the final block, indicating stabilization of learning signals (</text:span><draw:frame draw:style-name="a55" text:anchor-type="as-char" svg:x="0in" svg:y="0in" svg:width="0.575in" svg:height="0.175in" style:rel-width="scale" style:rel-height="scale"><draw:object xlink:href="Object 52/" xlink:type="simple" xlink:show="embed" xlink:actuate="onLoad"/></draw:frame><text:span text:style-name="T410">).</text:span></text:p>
      <text:p text:style-name="P411"><text:span text:style-name="T412">3.6 Neural Correlates of Prediction Error</text:span></text:p>
      <text:p text:style-name="P413"><text:span text:style-name="T414">To identify the neural substrates of computational learning, we first examined BOLD signals<text:s/></text:span><text:span text:style-name="T415">parametrically modulated by normalized trial-by-trial prediction errors (PE) at the onset of trustee feedback. Within the HC group, whole-brain analysis (height threshold<text:s/></text:span><draw:frame draw:style-name="a56" text:anchor-type="as-char" svg:x="0in" svg:y="0in" svg:width="0.65833in" svg:height="0.175in" style:rel-width="scale" style:rel-height="scale"><draw:object xlink:href="Object 53/" xlink:type="simple" xlink:show="embed" xlink:actuate="onLoad"/></draw:frame><text:span text:style-name="T416"><text:s/>uncorrected; cluster extent FWE-corrected<text:s/></text:span><draw:frame draw:style-name="a57" text:anchor-type="as-char" svg:x="0in" svg:y="0in" svg:width="0.575in" svg:height="0.175in" style:rel-width="scale" style:rel-height="scale"><draw:object xlink:href="Object 54/" xlink:type="simple" xlink:show="embed" xlink:actuate="onLoad"/></draw:frame><text:span text:style-name="T417">) revealed robust activation tracking PE. The most prominent cluster (</text:span><draw:frame draw:style-name="a58" text:anchor-type="as-char" svg:x="0in" svg:y="0in" svg:width="0.625in" svg:height="0.175in" style:rel-width="scale" style:rel-height="scale"><draw:object xlink:href="Object 55/" xlink:type="simple" xlink:show="embed" xlink:actuate="onLoad"/></draw:frame><text:span text:style-name="T418">voxels) peaked in the left visual/occipital cortex (MNI: [-42, -67, -7],<text:s/></text:span><draw:frame draw:style-name="a59" text:anchor-type="as-char" svg:x="0in" svg:y="0in" svg:width="0.575in" svg:height="0.175in" style:rel-width="scale" style:rel-height="scale"><draw:object xlink:href="Object 56/" xlink:type="simple" xlink:show="embed" xlink:actuate="onLoad"/></draw:frame><text:span text:style-name="T419">, peak<text:s/></text:span><draw:frame draw:style-name="a60" text:anchor-type="as-char" svg:x="0in" svg:y="0in" svg:width="0.90833in" svg:height="0.175in" style:rel-width="scale" style:rel-height="scale"><draw:object xlink:href="Object 57/" xlink:type="simple" xlink:show="embed" xlink:actuate="onLoad"/></draw:frame><text:span text:style-name="T420">). A second significant cluster (</text:span><draw:frame draw:style-name="a61" text:anchor-type="as-char" svg:x="0in" svg:y="0in" svg:width="0.54167in" svg:height="0.175in" style:rel-width="scale" style:rel-height="scale"><draw:object xlink:href="Object 58/" xlink:type="simple" xlink:show="embed" xlink:actuate="onLoad"/></draw:frame><text:span text:style-name="T421"><text:s/>voxels) was identified in the caudate/nucleus accumbens regions (MNI: [12, 20, -1],<text:s/></text:span><draw:frame draw:style-name="a62" text:anchor-type="as-char" svg:x="0in" svg:y="0in" svg:width="0.575in" svg:height="0.175in" style:rel-width="scale" style:rel-height="scale"><draw:object xlink:href="Object 59/" xlink:type="simple" xlink:show="embed" xlink:actuate="onLoad"/></draw:frame><text:span text:style-name="T422">, peak<text:s/></text:span><draw:frame draw:style-name="a63" text:anchor-type="as-char" svg:x="0in" svg:y="0in" svg:width="0.90833in" svg:height="0.175in" style:rel-width="scale" style:rel-height="scale"><draw:object xlink:href="Object 60/" xlink:type="simple" xlink:show="embed" xlink:actuate="onLoad"/></draw:frame><text:span text:style-name="T423">). Lastly, a smaller<text:s/></text:span><text:span text:style-name="T424">cluster (k=27) was significant at right ventral striatum (Peak MNI: [15, -7, -13],<text:s/></text:span><draw:frame draw:style-name="a64" text:anchor-type="as-char" svg:x="0in" svg:y="0in" svg:width="0.575in" svg:height="0.175in" style:rel-width="scale" style:rel-height="scale"><draw:object xlink:href="Object 61/" xlink:type="simple" xlink:show="embed" xlink:actuate="onLoad"/></draw:frame><text:span text:style-name="T425">, peak<text:s/></text:span><draw:frame draw:style-name="a65" text:anchor-type="as-char" svg:x="0in" svg:y="0in" svg:width="0.90833in" svg:height="0.175in" style:rel-width="scale" style:rel-height="scale"><draw:object xlink:href="Object 62/" xlink:type="simple" xlink:show="embed" xlink:actuate="onLoad"/></draw:frame><text:span text:style-name="T426">). These findings confirm that healthy participants exhibited reliable neural encoding prediction errors across both reward-related and sensory-processing regions.</text:span></text:p>
      <text:p text:style-name="P427"/>
      <text:p text:style-name="P428"><text:span text:style-name="T429">3.7 Group Differences in Prediction Error Signaling</text:span></text:p>
      <text:p text:style-name="P430"><text:span text:style-name="T431">Direct comparison between groups (HC &gt; SZ) revealed a significant reduction in PE-related neural activation in the SZ cohort. Specifically, SZ participants exhibited attenuated BOLD responses within a<text:s/></text:span><text:span text:style-name="T432">large cluster encompassing the left lateral occipital cortex and middle occipital gyrus, extending into the fusiform gyrus. (MNI: [-27, -70, -1], cluster size<text:s/></text:span><draw:frame draw:style-name="a66" text:anchor-type="as-char" svg:x="0in" svg:y="0in" svg:width="0.54167in" svg:height="0.175in" style:rel-width="scale" style:rel-height="scale"><draw:object xlink:href="Object 63/" xlink:type="simple" xlink:show="embed" xlink:actuate="onLoad"/></draw:frame><text:span text:style-name="T433"><text:s/>voxels, peak<text:s/></text:span><draw:frame draw:style-name="a67" text:anchor-type="as-char" svg:x="0in" svg:y="0in" svg:width="0.575in" svg:height="0.175in" style:rel-width="scale" style:rel-height="scale"><draw:object xlink:href="Object 64/" xlink:type="simple" xlink:show="embed" xlink:actuate="onLoad"/></draw:frame><text:span text:style-name="T434">, peak<text:s/></text:span><draw:frame draw:style-name="a68" text:anchor-type="as-char" svg:x="0in" svg:y="0in" svg:width="0.34167in" svg:height="0.175in" style:rel-width="scale" style:rel-height="scale"><draw:object xlink:href="Object 65/" xlink:type="simple" xlink:show="embed" xlink:actuate="onLoad"/></draw:frame><text:span text:style-name="T435"><text:s/>= 0.001). No regions showed significantly greater PE-related activation in the SZ group compared to HC.</text:span></text:p>
      <text:p text:style-name="P436"/>
      <text:p text:style-name="P437"><draw:frame draw:style-name="a69" draw:name="image4.png" text:anchor-type="as-char" svg:x="0in" svg:y="0in" svg:width="5.51181in" svg:height="2.56654in" style:rel-width="scale" style:rel-height="scale"><draw:image xlink:href="media/image5.png" xlink:type="simple" xlink:show="embed" xlink:actuate="onLoad"/><svg:title/><svg:desc>A close-up of a brain

AI-generated content may be incorrect.</svg:desc></draw:frame></text:p>
      <text:p text:style-name="P438"><text:span text:style-name="T439">Figure 5. Neural correlates of social prediction error and group differences. Whole-brain parametric modulation analysis of BOLD signals tracking trial-by-trial prediction errors (PE) at the time of trustee feedback. (A)<text:s/></text:span><text:span text:style-name="T440">Within the Healthy Control (HC) group, positive PEs significantly engaged a network including the bilateral visual/occipital cortex, right caudate/nucleus accumbens, and right ventral striatum. (B) A two-sample t-test (HC &gt; SZ) revealed that patients with schizophrenia exhibited significantly blunted PE-related activation compared to controls, specifically within the left lateral occipital cortex and middle occipital gyrus extending into the fusiform gyrus. Statistical maps are thresholded at<text:s/></text:span><draw:frame draw:style-name="a70" text:anchor-type="as-char" svg:x="0in" svg:y="0in" svg:width="0.65833in" svg:height="0.175in" style:rel-width="scale" style:rel-height="scale"><draw:object xlink:href="Object 66/" xlink:type="simple" xlink:show="embed" xlink:actuate="onLoad"/></draw:frame><text:span text:style-name="T441"><text:s/>(uncorrected)</text:span><text:span text:style-name="T442"><text:s/>at the voxel level and FWE-corrected at<text:s/></text:span><draw:frame draw:style-name="a71" text:anchor-type="as-char" svg:x="0in" svg:y="0in" svg:width="0.575in" svg:height="0.175in" style:rel-width="scale" style:rel-height="scale"><draw:object xlink:href="Object 67/" xlink:type="simple" xlink:show="embed" xlink:actuate="onLoad"/></draw:frame><text:span text:style-name="T443"><text:s/>at the cluster level. Color bars represent Z-statistics.</text:span></text:p>
      <text:p text:style-name="P444"/>
      <text:p text:style-name="P445"/>
      <text:soft-page-break/>
      <text:list text:style-name="WWNum2">
        <text:list-item text:start-value="4">
          <text:p text:style-name="P446"><text:span text:style-name="T447">Discussion</text:span></text:p>
        </text:list-item>
      </text:list>
      <text:p text:style-name="P448"><text:span text:style-name="T449">This study demonstrates a multi-level deficit in how individuals with schizophrenia (SZ) process social feedback. Behaviorally, patients struggled to learn from positive outcomes (reduced Win-Stay). Computationally, this impairment was driven by lower learning rates, while severe positive symptoms correlated with more random decision-making. Furthermore, unlike controls, SZ patients failed to<text:s/></text:span><text:span text:style-name="T450">adjust their prediction errors during unpredictable social interactions. At the neural level, this inability to update social expectations was mirrored by blunted prediction error signals in occipitotemporal regions, notably the fusiform gyrus. Together, these findings highlight a multidimensional failure in the behavioral, computational, and neural integration of social feedback in schizophrenia.</text:span></text:p>
      <text:p text:style-name="P451"><text:span text:style-name="T452">4.1<text:s/></text:span><text:span text:style-name="T453">Group Differences in Model-Free Heuristics: Win-Stay/Loss-Shift Patterns</text:span></text:p>
      <text:p text:style-name="P454"><text:span text:style-name="T455">Before employing computational<text:s/></text:span><text:span text:style-name="T456">modelling, our model-free analysis revealed a fundamental impairment in how patients utilized social feedback. While healthy controls typically rely on an adaptive "Win-Stay/Loss-Shift" (WSLS) heuristic, the SZ cohort exhibited a significant reduction in “Win-Stay” behavior, frequently failing to re-invest even following mutually profitable interactions. This failure to capitalize on positive social reinforcement aligns with profound reward processing deficits characterizing schizophrenia<text:s/></text:span><text:bookmark-start text:name="ZOTERO_BREF_leQBCp4IP9Vr"/><text:span text:style-name="T457">(19,33,34)</text:span><text:bookmark-end text:name="ZOTERO_BREF_leQBCp4IP9Vr"/><text:span text:style-name="T458">. Rather</text:span><text:span text:style-name="T459"><text:s/>than building a stable model of interpersonal trust, patients' trial-by-trial responses appeared disconnected from immediate feedback history.</text:span></text:p>
      <text:p text:style-name="P460"><text:span text:style-name="T461">While these deficits indicate impaired adaptive social functioning, simple heuristics cannot distinguish whether this failure stems from an inability to learn the trustee's value (learning rate) or to translate that value into consistent actions (decision noise). To isolate the precise mechanistic locus of this impairment, we turned to computational reinforcement<text:s/></text:span><text:span text:style-name="T462">learning models.</text:span></text:p>
      <text:p text:style-name="P463"><text:span text:style-name="T464">4.2 Behavioral Imprecision and Inconsistent Preferences</text:span></text:p>
      <text:p text:style-name="P465"/>
      <text:p text:style-name="P466"><text:span text:style-name="T467">Behaviorally, standard reinforcement learning models poorly described patient choices, evidenced by severely reduced<text:s/></text:span><text:span text:style-name="T468">Pseudo-R</text:span><text:span text:style-name="T469">2</text:span><text:span text:style-name="T470"><text:s/>and blunted learning rates<text:s/></text:span><text:span text:style-name="T471">(</text:span><draw:frame draw:style-name="a72" text:anchor-type="as-char" svg:x="0in" svg:y="0in" svg:width="0.1in" svg:height="0.175in" style:rel-width="scale" style:rel-height="scale"><draw:object xlink:href="Object 68/" xlink:type="simple" xlink:show="embed" xlink:actuate="onLoad"/></draw:frame><text:span text:style-name="T472">).<text:s/></text:span><text:span text:style-name="T473"><text:s/>Strikingly, a zero-parameter null model best fit most patients, indicating a profound failure to integrate trial-by-trial social feedback. Rather than dynamically updating expected values, patient decisions were highly stochastic. This aligns with findings that schizophrenia<text:s/></text:span><text:span text:style-name="T474">patients exhibit fundamentally inconsistent preference judgments<text:s/></text:span><text:bookmark-start text:name="ZOTERO_BREF_mPBy5hwwx8bO"/><text:span text:style-name="T475">(35)</text:span><text:bookmark-end text:name="ZOTERO_BREF_mPBy5hwwx8bO"/><text:span text:style-name="T476">, and that systemic "imprecision" might be a core pathophysiological mechanism<text:s/></text:span><text:bookmark-start text:name="ZOTERO_BREF_PCStAFXMF8Au"/><text:span text:style-name="T477">(36)</text:span><text:bookmark-end text:name="ZOTERO_BREF_PCStAFXMF8Au"/><text:span text:style-name="T478">.</text:span></text:p>
      <text:p text:style-name="Standard"><text:span text:style-name="T479">Importantly, our findings align closely with the recently developed concept of spatiotemporal psychopathology advanced by the group around Northoff</text:span><text:span text:style-name="T480"><text:s/></text:span><text:bookmark-start text:name="ZOTERO_BREF_SSvM32OwjYAp"/><text:span text:style-name="T481">(36–38)</text:span><text:bookmark-end text:name="ZOTERO_BREF_SSvM32OwjYAp"/><text:span text:style-name="T482">. Their framework conceptualizes schizophrenia fundamentally as a disorder of temporal imprecision, a deficit evident across both neural and behavioral accounts. In our Trust Game, the severe reduction<text:s/></text:span><text:span text:style-name="T483">in inverse temperature<text:s/></text:span><text:span text:style-name="T484">(</text:span><draw:frame draw:style-name="a73" text:anchor-type="as-char" svg:x="0in" svg:y="0in" svg:width="0.1in" svg:height="0.175in" style:rel-width="scale" style:rel-height="scale"><draw:object xlink:href="Object 69/" xlink:type="simple" xlink:show="embed" xlink:actuate="onLoad"/></draw:frame><text:span text:style-name="T485">)</text:span><text:span text:style-name="T486">, indexing choice precision, suggests this imprecision disrupts higher-order social valuation, rendering patients incapable of utilizing positive feedback to guide consistent behavior.</text:span></text:p>
      <text:p text:style-name="P487"/>
      <text:p text:style-name="P488"><text:span text:style-name="T489">While reduced<text:s/></text:span><draw:frame draw:style-name="a74" text:anchor-type="as-char" svg:x="0in" svg:y="0in" svg:width="0.1in" svg:height="0.175in" style:rel-width="scale" style:rel-height="scale"><draw:object xlink:href="Object 70/" xlink:type="simple" xlink:show="embed" xlink:actuate="onLoad"/></draw:frame><text:span text:style-name="T490"><text:s/>is multifaceted and might capture cognitive noise or amotivation, lower<text:s/></text:span><draw:frame draw:style-name="a75" text:anchor-type="as-char" svg:x="0in" svg:y="0in" svg:width="0.1in" svg:height="0.175in" style:rel-width="scale" style:rel-height="scale"><draw:object xlink:href="Object 71/" xlink:type="simple" xlink:show="embed" xlink:actuate="onLoad"/></draw:frame><text:span text:style-name="T491"><text:s/>in our cohort correlated specifically with positive symptom severity rather than negative symptoms or cognitive deficits. <text:s/>This clinical dissociation suggests that the observed computational deficits stem from<text:s/></text:span><text:span text:style-name="T492">primary psychopathology rather than secondary social withdrawal. Since choice imprecision was independent of negative symptoms, blunted prediction errors do not merely reflect social isolation. Instead, their specific link to positive symptoms supports a primary dopaminergic disruption. Aberrant precision-weighting<text:s/></text:span><text:soft-page-break/><text:span text:style-name="T493">degrades social feedback reliability, causing a symptom-associated lack of trust rather than a loss of social practice.</text:span></text:p>
      <text:p text:style-name="P494"><text:span text:style-name="T495">4.3 Failure to Adapt to Social Volatility: Blunted Prediction Errors</text:span></text:p>
      <text:p text:style-name="P496"><text:span text:style-name="T497">To<text:s/></text:span><text:span text:style-name="T498">elucidate the temporal dynamics of this learning failure, we analyzed absolute prediction error (PE) magnitudes across task phases. Normatively, PEs should scale with environmental uncertainty to rapidly update internal models when social contingencies change<text:s/></text:span><text:bookmark-start text:name="ZOTERO_BREF_bfPrwM8FoTwo"/><text:span text:style-name="T499">(28)</text:span><text:bookmark-end text:name="ZOTERO_BREF_bfPrwM8FoTwo"/><text:span text:style-name="T500">. Our Linear Mixed-Effects Model confirmed this in HC, who exhibited significantly increased PE magnitudes specifically during the volatile, 50% reward-rate phase, generating the appropriate computational surprise signals to drive behavioral<text:s/></text:span><text:span text:style-name="T501">adaptation.</text:span></text:p>
      <text:p text:style-name="P502"><text:span text:style-name="T503">In contrast, the SZ cohort demonstrated a significantly blunted PE response during this same volatile phase. This Group × Block interaction highlights a profound deficit in higher-order social inference: patients failed to scale their computational surprise to match their partner's sudden unpredictability. As outlined by the prediction-error hypothesis of schizophrenia<text:s/></text:span><text:bookmark-start text:name="ZOTERO_BREF_9QkwwIF93Y70"/><text:span text:style-name="T504">(13,39)</text:span><text:bookmark-end text:name="ZOTERO_BREF_9QkwwIF93Y70"/><text:span text:style-name="T505">, dopaminergic dysfunction compromises the reliable signaling of reward discrepancies. In our paradigm, this<text:s/></text:span><text:span text:style-name="T506">computational blunting rendered patients insensitive to shifting social dynamics. Failing to generate the necessary trial-by-trial surprise to update expectations, patients could not flexibly adapt their strategies, culminating in the rigid, stochastic behavioral profile captured by our metrics<text:s/></text:span><text:bookmark-start text:name="ZOTERO_BREF_ilr4ifAwYNhQ"/><text:span text:style-name="T507">(40)</text:span><text:bookmark-end text:name="ZOTERO_BREF_ilr4ifAwYNhQ"/><text:span text:style-name="T508">.</text:span></text:p>
      <text:p text:style-name="P509"><text:span text:style-name="T510">4.4 Aberrant Predictive Coding, Positive Symptoms and Neural Deficits</text:span></text:p>
      <text:p text:style-name="P511"><text:span text:style-name="T512">Crucially, we identified a direct link between this behavioral stochasticity and clinical psychopathology: higher positive symptom severity<text:s/></text:span><text:span text:style-name="T513">significantly predicted greater decision imprecision (lower<text:s/></text:span><draw:frame draw:style-name="a76" text:anchor-type="as-char" svg:x="0in" svg:y="0in" svg:width="0.1in" svg:height="0.175in" style:rel-width="scale" style:rel-height="scale"><draw:object xlink:href="Object 72/" xlink:type="simple" xlink:show="embed" xlink:actuate="onLoad"/></draw:frame><text:span text:style-name="T514">). This relationship provides strong empirical support for predictive coding accounts of psychosis, such as those detailed by Horga and colleagues</text:span><text:bookmark-start text:name="ZOTERO_BREF_qkh8s59CqAwJ"/><text:span text:style-name="T515">(41)</text:span><text:bookmark-end text:name="ZOTERO_BREF_qkh8s59CqAwJ"/><text:span text:style-name="T516">. According to this framework, positive symptoms like hallucinations and delusions arise from a fundamental disruption in "precision weighting", an inability to appropriately balance the reliability of internal priors against incoming sensory PEs<text:s/></text:span><text:bookmark-start text:name="ZOTERO_BREF_coUVkWfmnwFz"/><text:span text:style-name="T517">(42,43)</text:span><text:bookmark-end text:name="ZOTERO_BREF_coUVkWfmnwFz"/><text:span text:style-name="T518">. When the precision of external social feedback</text:span><text:span text:style-name="T519"><text:s/>is aberrantly downweighted, the patient cannot reliably use that feedback to update their internal models. Consequently, decision-making becomes overly reliant on rigid, potentially delusional prior beliefs, driving the inconsistent and symptom-associated choice patterns observed in our computational data.</text:span></text:p>
      <text:p text:style-name="P520"/>
      <text:p text:style-name="P521"><text:span text:style-name="T522">Our fMRI findings provide the direct neural substrate for this predictive coding failure. In HC, social PE robustly engaged both canonical reward hubs (the right ventral striatum with caudate/nucleus<text:s/></text:span><text:span text:style-name="T523">accumbens) and posterior sensory-processing networks (left lateral occipital cortex) to compute and propagate learning signals. In contrast, the SZ cohort exhibited a significant, FWE-corrected attenuation of prediction error signaling, most prominently within the left lateral occipital cortex and the fusiform gyrus.</text:span></text:p>
      <text:p text:style-name="P524"><text:span text:style-name="T525">The localization of these group differences to occipitotemporal regions, rather than striatal hubs, likely reflects the social and identity-driven nature of our task. Unlike abstract<text:s/></text:span><text:span text:style-name="T526">reinforcement learning, the Trust Game requires participants to track the identity and trustworthiness of a human partner through facial cues. Thus, updating expectations in this context necessitates robust engagement of face-processing and social-perception networks</text:span><text:bookmark-start text:name="ZOTERO_BREF_e3YrVjhHvmLN"/><text:span text:style-name="T527">(44–46)</text:span><text:bookmark-end text:name="ZOTERO_BREF_e3YrVjhHvmLN"/><text:span text:style-name="T528">. From a predictive coding perspective, these results suggest that the failure to integrate social feedback in SZ stems from impaired precision-weighting at these early sensory levels<text:s/></text:span><text:bookmark-start text:name="ZOTERO_BREF_ORoJxONsIiXB"/><text:span text:style-name="T529">(31,42,47)</text:span><text:bookmark-end text:name="ZOTERO_BREF_ORoJxONsIiXB"/><text:span text:style-name="T530">. If the neural representation of the social</text:span><text:span text:style-name="T531"><text:s/>"surprise" is degraded within the fusiform gyrus, the very region responsible for processing the trustee’s feedback, the computational system lacks the reliable evidence needed to drive subsequent value updating<text:s/></text:span><text:bookmark-start text:name="ZOTERO_BREF_uDZkvLYgb89b"/><text:span text:style-name="T532">(48,49)</text:span><text:bookmark-end text:name="ZOTERO_BREF_uDZkvLYgb89b"/><text:span text:style-name="T533">.</text:span></text:p>
      <text:soft-page-break/>
      <text:p text:style-name="P534"><text:span text:style-name="T535">This deficit aligns with shortened intrinsic neural timescales and impaired functional connectivity within early visual hierarchies<text:s/></text:span><text:bookmark-start text:name="ZOTERO_BREF_nX78XZfO5rAH"/><text:span text:style-name="T536">(50–53)</text:span><text:bookmark-end text:name="ZOTERO_BREF_nX78XZfO5rAH"/><text:span text:style-name="T537">, indicating a fundamental disruption in sensory precision, potentially linked to NMDA hypofunction<text:s/></text:span><text:bookmark-start text:name="ZOTERO_BREF_fSKIEXo1wgpt"/><text:span text:style-name="T538">(54–57)</text:span><text:bookmark-end text:name="ZOTERO_BREF_fSKIEXo1wgpt"/><text:span text:style-name="T539">. Importantly, it could be argued that these</text:span><text:span text:style-name="T540"><text:s/>attenuated BOLD responses in the SZ group could be attributed to generalized visual attention confounds. However, our fMRI analysis utilized parametric modulation, which identifies brain regions where activity correlates on a trial-by-trial basis with the magnitude of prediction errors. A simple lack of attention would likely manifest as a global reduction in signal amplitude, rather than a specific disruption of the mathematical coupling between PE magnitude and the BOLD response. Together, these<text:s/></text:span><text:span text:style-name="T541">multimodal results suggest that positive symptoms in SZ do not merely alter what patients learn but may disrupt the underlying neural precision of the learning mechanism itself, leading to behavior that is less responsive to environmental contingencies.</text:span></text:p>
      <text:p text:style-name="P542"/>
      <text:p text:style-name="P543"/>
      <text:p text:style-name="P544"><text:span text:style-name="T545">4.5 Clinical Implications and Predictive Utility</text:span></text:p>
      <text:p text:style-name="P546"><text:span text:style-name="T547">These computational findings offer actionable insights for clinical practice. When stable patients fail to benefit from social skills training or struggle to form therapeutic alliances, clinicians often<text:s/></text:span><text:span text:style-name="T548">attribute this to amotivation or cognitive decline. However, our results suggest a different mechanism: a fundamental computational inability to integrate positive social feedback. Consequently, interventions relying heavily on social reinforcement may be ineffective for patients exhibiting profound decision imprecision (low<text:s/></text:span><draw:frame draw:style-name="a77" text:anchor-type="as-char" svg:x="0in" svg:y="0in" svg:width="0.1in" svg:height="0.175in" style:rel-width="scale" style:rel-height="scale"><draw:object xlink:href="Object 73/" xlink:type="simple" xlink:show="embed" xlink:actuate="onLoad"/></draw:frame><text:span text:style-name="T549">)) Furthermore, behavioral paradigms like the Trust Game hold significant promise as prognostic tools. In clinically stable outpatients, extracting these computational parameters could<text:s/></text:span><text:span text:style-name="T550">serve as a quantitive biomarker to identify individuals at high risk for long-term social withdrawal and functional decline, guiding the early implementation of tailored cognitive remediation strategies.</text:span></text:p>
      <text:p text:style-name="P551"/>
      <text:p text:style-name="P552"><text:span text:style-name="T553">Limitations and Conclusion</text:span></text:p>
      <text:p text:style-name="P554"><text:span text:style-name="T555">It is worth noting a few limitations. First, the small fMRI clinical sample (N = 29) limits statistical power for detecting subtle clinico-computational correlations, necessitating cautious interpretation. Second, because a zero-parameter Null model best explained most patients'<text:s/></text:span><text:span text:style-name="T556">choices, their extracted learning rates</text:span><draw:frame draw:style-name="a78" text:anchor-type="as-char" svg:x="0in" svg:y="0in" svg:width="0.225in" svg:height="0.175in" style:rel-width="scale" style:rel-height="scale"><draw:object xlink:href="Object 74/" xlink:type="simple" xlink:show="embed" xlink:actuate="onLoad"/></draw:frame><text:span text:style-name="T557"><text:s/>and decision noise<text:s/></text:span><text:span text:style-name="T558"><text:s/></text:span><draw:frame draw:style-name="a79" text:anchor-type="as-char" svg:x="0in" svg:y="0in" svg:width="0.225in" svg:height="0.175in" style:rel-width="scale" style:rel-height="scale"><draw:object xlink:href="Object 75/" xlink:type="simple" xlink:show="embed" xlink:actuate="onLoad"/></draw:frame><text:span text:style-name="T559"><text:s/></text:span><text:span text:style-name="T560"><text:s/>parameters may be noisy. Third, lacking a non-social control task (e.g., a probabilistic slot-machine), it remains unclear whether these deficits are specific to social feedback or reflect domain-general learning impairments.</text:span></text:p>
      <text:p text:style-name="P561"><text:span text:style-name="T562">Despite these limitations, our study demonstrates a profound disruption in feedback-driven social learning in schizophrenia. Patients failed to adapt to cooperative or exploitative feedback, independent of negative symptoms<text:s/></text:span><text:span text:style-name="T563">or social cognitive impairments, indicating a fundamental reinforcement learning deficit. Future research with larger longitudinal cohorts must map these computational abnormalities onto underlying striatal and prefrontal network dysfunctions.</text:span></text:p>
      <text:p text:style-name="Standard"><text:span text:style-name="T564">Funding</text:span></text:p>
      <text:p text:style-name="P565"/>
      <text:p text:style-name="P566"><text:span text:style-name="T567">This research was supported by Ege University Scientific Research Projects to A.S.G. (grant number 196-23567)</text:span></text:p>
      <text:soft-page-break/>
      <text:p text:style-name="P568"><text:span text:style-name="T569">References</text:span></text:p>
      <text:p text:style-name="Bibliography1"><text:bookmark-start text:name="ZOTERO_BREF_Lwh4X9hnA6Ef"/>1. Kochunov P, Coyle TR, Rowland LM, Jahanshad N, Thompson PM, Kelly S,<text:s/><text:span text:style-name="T570">et al.</text:span><text:s/>(2017): Association of White Matter With Core Cognitive<text:s/>Deficits in Patients With Schizophrenia [no. 9].<text:s/><text:span text:style-name="T571">JAMA Psychiatry</text:span><text:s/>74: 958.</text:p>
      <text:p text:style-name="Bibliography1">2. Caqueo-Urízar A, Boyer L, Baumstarck K, Gilman SE (2015): Subjective perceptions of cognitive deficits and their influences on quality of life among patients with schizophrenia [no. 11].<text:s/><text:span text:style-name="T572">Qual Life Res</text:span><text:s/>24: 2753–2760.</text:p>
      <text:p text:style-name="Bibliography1">3. Lesh TA, Niendam TA, Minzenberg MJ, Carter CS (2011): Cognitive Control Deficits in Schizophrenia: Mechanisms and Meaning [no. 1].<text:s/><text:span text:style-name="T573">Neuropsychopharmacol</text:span><text:s/>36: 316–338.</text:p>
      <text:p text:style-name="Bibliography1">4. Tripathi A, Kar SK, Shukla R (2018): Cognitive<text:s/>Deficits in Schizophrenia: Understanding the Biological Correlates and Remediation Strategies [no. 1].<text:s/><text:span text:style-name="T574">Clin Psychopharmacol Neurosci</text:span><text:s/>16: 7–17.</text:p>
      <text:p text:style-name="Bibliography1">5. Prouteau A, Verdoux H, Briand C, Lesage A, Lalonde P, Nicole L,<text:s/><text:span text:style-name="T575">et al.</text:span><text:s/>(2005): Cognitive predictors of psychosocial functioning outcome in schizophrenia: A follow-up study of subjects participating in a rehabilitation program.<text:s/><text:span text:style-name="T576">Schizophrenia Research</text:span><text:s/>77: 343–353.</text:p>
      <text:p text:style-name="Bibliography1">6. Pascal De Raykeer R, Hoertel N, Blanco C, Lavaud P, Kaladjian A, Blumenstock Y,<text:s/><text:span text:style-name="T577">et al.</text:span><text:s/>(2019):<text:s/>Effects of depression and cognitive impairment on quality of life in older adults with schizophrenia spectrum disorder: Results from a multicenter study.<text:s/><text:span text:style-name="T578">Journal of Affective Disorders</text:span><text:s/>256: 164–175.</text:p>
      <text:p text:style-name="Bibliography1">7. Green MF, Horan WP, Lee J (2015): Social cognition in schizophrenia.<text:s/><text:span text:style-name="T579">Nature Reviews Neuroscience</text:span><text:s/>16: 620–631.</text:p>
      <text:p text:style-name="Bibliography1">8. Berg J, Dickhaut J, McCabe K (1995): Trust, Reciprocity, and Social History.<text:s/><text:span text:style-name="T580">Games and Economic Behavior</text:span><text:s/>10: 122–142.</text:p>
      <text:p text:style-name="Bibliography1">9. Miall RC, Wolpert DM (1996): Forward Models for Physiological Motor Control.<text:s/><text:span text:style-name="T581">Neural Networks</text:span><text:s/>9: 1265–1279.</text:p>
      <text:p text:style-name="Bibliography1">10. Schultz W, Dickinson A (2000): Neuronal Coding of Prediction Errors.<text:s/><text:span text:style-name="T582">Annu Rev Neurosci</text:span><text:s/>23: 473–500.</text:p>
      <text:p text:style-name="Bibliography1">11. Friston K (2009): The free-energy principle: a rough guide to the brain?<text:s/><text:span text:style-name="T583">Trends in Cognitive Sciences</text:span><text:s/>13: 293–301.</text:p>
      <text:p text:style-name="Bibliography1">12. Katthagen T, Kaminski J, Heinz A, Buchert R, Schlagenhauf F (2020): Striatal Dopamine and Reward Prediction Error Signaling in Unmedicated Schizophrenia Patients.<text:s/><text:span text:style-name="T584">Schizophrenia Bulletin</text:span><text:s/>46: 1535–1546.</text:p>
      <text:p text:style-name="Bibliography1">13. Millard SJ, Bearden CE, Karlsgodt KH, Sharpe MJ<text:s/>(2022): The prediction-error hypothesis of schizophrenia: new data point to circuit-specific changes in dopamine activity [no. 3].<text:s/><text:span text:style-name="T585">Neuropsychopharmacol</text:span><text:s/>47: 628–640.</text:p>
      <text:p text:style-name="Bibliography1">14. Reinen JM, Van Snellenberg JX, Horga G, Abi-Dargham A, Daw ND, Shohamy D (2016): Motivational Context Modulates Prediction Error Response in Schizophrenia.<text:s/><text:span text:style-name="T586">SCHBUL</text:span><text:s/>42: 1467–1475.</text:p>
      <text:p text:style-name="Bibliography1">15. Charlton CE, Hauke DJ, Litvak V, Wobmann M, De Bock R, Andreou C,<text:s/><text:span text:style-name="T587">et al.</text:span><text:s/>(2026): Neural Dynamics of Social Cognition: A Single‐Trial Computational Analysis of<text:s/>Learning Under Uncertainty.<text:s/><text:span text:style-name="T588">Human Brain Mapping</text:span><text:s/>47: e70433.</text:p>
      <text:soft-page-break/>
      <text:p text:style-name="Bibliography1">16. Deserno L, Boehme R, Mathys C, Katthagen T, Kaminski J, Stephan KE,<text:s/><text:span text:style-name="T589">et al.</text:span><text:s/>(2020): Volatility Estimates Increase Choice Switching and Relate to Prefrontal Activity in Schizophrenia.<text:s/><text:span text:style-name="T590">Biological Psychiatry: Cognitive Neuroscience and Neuroimaging</text:span><text:s/>5: 173–183.</text:p>
      <text:p text:style-name="Bibliography1">17. Glimcher PW (2011): Understanding dopamine and reinforcement learning: The dopamine reward prediction error hypothesis.<text:s/><text:span text:style-name="T591">Proc Natl Acad Sci USA</text:span><text:s/>108: 15647–15654.</text:p>
      <text:p text:style-name="Bibliography1">18. Huys QJM, Maia TV,<text:s/>Frank MJ (2016): Computational psychiatry as a bridge from neuroscience to clinical applications.<text:s/><text:span text:style-name="T592">Nat Neurosci</text:span><text:s/>19: 404–413.</text:p>
      <text:p text:style-name="Bibliography1">19. Waltz JA, Gold JM (2015): Motivational Deficits in Schizophrenia and the Representation of Expected Value. In: Simpson EH, Balsam PD, editors.<text:s/><text:span text:style-name="T593">Behavioral Neuroscience of Motivation</text:span>, vol. 27. Cham: Springer International Publishing, pp 375–410.</text:p>
      <text:p text:style-name="Bibliography1">20. Gold JM, Waltz JA, Prentice KJ, Morris SE, Heerey EA (2008): Reward processing in schizophrenia: a deficit in the representation of<text:s/>value.<text:s/><text:span text:style-name="T594">Schizophr Bull</text:span><text:s/>34: 835–847.</text:p>
      <text:p text:style-name="Bibliography1">21. Gromann PM, Heslenfeld DJ, Fett A-K, Joyce DW, Shergill SS, Krabbendam L (2013): Trust versus paranoia: abnormal response to social reward in psychotic illness [no. 6].<text:s/><text:span text:style-name="T595">Brain</text:span><text:s/>136: 1968–1975.</text:p>
      <text:p text:style-name="Bibliography1">22. Howes OD, Murray RM (2014): Schizophrenia: An integrated sociodevelopmental-cognitive model.<text:s/><text:span text:style-name="T596">The Lancet</text:span><text:s/>383: 1677–1687.</text:p>
      <text:p text:style-name="Bibliography1">23. Heinz A, Schlagenhauf F (2010): Dopaminergic Dysfunction in Schizophrenia: Salience Attribution Revisited.<text:s/><text:span text:style-name="T597">Schizophrenia Bulletin</text:span><text:s/>36: 472–485.</text:p>
      <text:p text:style-name="Bibliography1">24. Kapur S<text:s/>(2003): Psychosis as a State of Aberrant Salience: A Framework Linking Biology, Phenomenology, and Pharmacology in Schizophrenia.<text:s/><text:span text:style-name="T598">AJP</text:span><text:s/>160: 13–23.</text:p>
      <text:p text:style-name="Bibliography1">25. Maia TV, Frank MJ (2011): From reinforcement learning models to psychiatric and neurological disorders.<text:s/><text:span text:style-name="T599">Nat Neurosci</text:span><text:s/>14: 154–162.</text:p>
      <text:p text:style-name="Bibliography1">26. Corlett PR, Murray GK, Honey GD, Aitken MRF, Shanks DR, Robbins TW,<text:s/><text:span text:style-name="T600">et al.</text:span><text:s/>(2007): Disrupted prediction-error signal in psychosis: evidence for an associative account of delusions.<text:s/><text:span text:style-name="T601">Brain</text:span><text:s/>130: 2387–2400.</text:p>
      <text:p text:style-name="Bibliography1">27. Griffiths O, Langdon<text:s/>R, Le Pelley ME, Coltheart M (2014): Delusions and prediction error: re-examining the behavioural evidence for disrupted error signalling in delusion formation.<text:s/><text:span text:style-name="T602">Cognitive Neuropsychiatry</text:span><text:s/>19: 439–467.</text:p>
      <text:p text:style-name="Bibliography1">28. Diaconescu AO, Mathys C, Weber LAE, Kasper L, Mauer J, Stephan KE (2017): Hierarchical prediction errors in midbrain and septum during social learning.<text:s/><text:span text:style-name="T603">Social Cognitive and Affective Neuroscience</text:span><text:s/>12: 618–634.</text:p>
      <text:p text:style-name="Bibliography1">29. Dima D, Roiser JP, Dietrich DE, Bonnemann C, Lanfermann H, Emrich HM, Dillo W (2009):<text:s/>Understanding why patients with schizophrenia do not perceive the hollow-mask illusion using dynamic causal modelling.<text:s/><text:span text:style-name="T604">NeuroImage</text:span><text:s/>46: 1180–1186.</text:p>
      <text:p text:style-name="Bibliography1">30. Claassen C, Langdon R, Brüne M (2020): Recognition of Social Rule Violation in “Deficit Syndrome” Schizophrenia: A Study Using Economic Games.<text:s/><text:span text:style-name="T605">Front Psychiatry</text:span><text:s/>11: 835.</text:p>
      <text:p text:style-name="Bibliography1">31. Adams RA, Stephan KE, Brown HR, Frith CD, Friston KJ (2013): The Computational Anatomy of Psychosis.<text:s/><text:span text:style-name="T606">Front Psychiatry</text:span><text:s/>4. https://doi.org/10.3389/fpsyt.2013.00047</text:p>
      <text:p text:style-name="Bibliography1">32. Alós-Ferrer C, Farolfi F<text:s/>(2019): Trust Games and Beyond.<text:s/><text:span text:style-name="T607">Front Neurosci</text:span><text:s/>13: 887.</text:p>
      <text:p text:style-name="Bibliography1">33. Waltz JA, Frank MJ, Robinson BM, Gold JM (2007): Selective Reinforcement Learning Deficits in Schizophrenia Support Predictions from Computational Models of Striatal-Cortical Dysfunction.<text:s/><text:span text:style-name="T608">Biological Psychiatry</text:span><text:s/>62: 756–764.</text:p>
      <text:soft-page-break/>
      <text:p text:style-name="Bibliography1">34. Fromm SP, Wieland L, Klettke A, Nassar MR, Katthagen T, Markett S,<text:s/><text:span text:style-name="T609">et al.</text:span><text:s/>(2023): Computational mechanisms of belief updating in relation to psychotic-like experiences.<text:s/><text:span text:style-name="T610">Front Psychiatry</text:span><text:s/>14: 1170168.</text:p>
      <text:p text:style-name="Bibliography1">35. Strauss GP, Robinson<text:s/>BM, Waltz JA, Frank MJ, Kasanova Z, Herbener ES, Gold JM (2011): Patients With Schizophrenia Demonstrate Inconsistent Preference Judgments for Affective and Nonaffective Stimuli.<text:s/><text:span text:style-name="T611">Schizophrenia Bulletin</text:span><text:s/>37: 1295–1304.</text:p>
      <text:p text:style-name="Bibliography1">36. Lechner S, Hsieh MH, Lin Y-T, Liu C-M, Chen I-F, Liu C-C,<text:s/><text:span text:style-name="T612">et al.</text:span><text:s/>(2025): Temporal imprecision and its dynamics in schizophrenia.<text:s/><text:span text:style-name="T613">Transl Psychiatry</text:span><text:s/>15: 279.</text:p>
      <text:p text:style-name="Bibliography1">37. Lechner S, Northoff G (2023): Temporal imprecision and phase instability in schizophrenia resting state EEG.<text:s/><text:span text:style-name="T614">Asian Journal of<text:s/></text:span><text:span text:style-name="T615">Psychiatry</text:span><text:s/>86: 103654.</text:p>
      <text:p text:style-name="Bibliography1">38. Wolff A, Northoff G (2023): Phase Based Temporal Imprecision in Schizophrenia.<text:s/><text:span text:style-name="T616">Molecular psychiatry</text:span>.</text:p>
      <text:p text:style-name="Bibliography1">39. Yaple ZA, Tolomeo S, Yu R (2021): Abnormal prediction error processing in schizophrenia and depression [no. 11].<text:s/><text:span text:style-name="T617">Hum Brain Mapp</text:span><text:s/>42: 3547–3560.</text:p>
      <text:p text:style-name="Bibliography1">40. Hauke DJ, Wobmann M, Andreou C, Mackintosh AJ, De Bock R, Karvelis P,<text:s/><text:span text:style-name="T618">et al.</text:span><text:s/>(2024): Altered Perception of Environmental Volatility During Social Learning in Emerging Psychosis.<text:s/><text:span text:style-name="T619">Computational Psychiatry</text:span><text:s/>8: 1–22.</text:p>
      <text:p text:style-name="Bibliography1">41. Horga G, Schatz<text:s/>KC, Abi-Dargham A, Peterson BS (2014): Deficits in Predictive Coding Underlie Hallucinations in Schizophrenia.<text:s/><text:span text:style-name="T620">Journal of Neuroscience</text:span><text:s/>34: 8072–8082.</text:p>
      <text:p text:style-name="Bibliography1">42. Sterzer P, Adams RA, Fletcher P, Frith C, Lawrie SM, Muckli L,<text:s/><text:span text:style-name="T621">et al.</text:span><text:s/>(2018, November): The Predictive Coding Account of Psychosis.<text:s/><text:span text:style-name="T622">Biological Psychiatry</text:span>, vol. 84. Elsevier USA, pp 634–643.</text:p>
      <text:p text:style-name="Bibliography1">43. Shaw AD, Sumner RL, Berndt LCS (2026): Predictive coding and neurocomputational psychiatry: a mechanistic framework for understanding mental disorders.<text:s/><text:span text:style-name="T623">Front<text:s/></text:span><text:span text:style-name="T624">Psychiatry</text:span><text:s/>16: 1713833.</text:p>
      <text:p text:style-name="Bibliography1">44. Behrens TEJ, Hunt LT, Woolrich MW, Rushworth MFS (2008): Associative learning of social value.<text:s/><text:span text:style-name="T625">Nature</text:span><text:s/>456: 245–249.</text:p>
      <text:p text:style-name="Bibliography1">45. Haxby JV, Hoffman EA, Gobbini MI (2000): The distributed human neural system for face perception.<text:s/><text:span text:style-name="T626">Trends in Cognitive Sciences</text:span><text:s/>4: 223–233.</text:p>
      <text:p text:style-name="Bibliography1">46. Lin A, Adolphs R, Rangel A (2012): Social and monetary reward learning engage overlapping neural substrates.<text:s/><text:span text:style-name="T627">Social Cognitive and Affective Neuroscience</text:span><text:s/>7: 274–281.</text:p>
      <text:p text:style-name="Bibliography1">47. Friston KJ, Stephan KE, Montague R, Dolan RJ (2014):<text:s/>Computational psychiatry: the brain as a phantastic organ.<text:s/><text:span text:style-name="T628">The Lancet Psychiatry</text:span><text:s/>1: 148–158.</text:p>
      <text:p text:style-name="Bibliography1">48. Butler PD, Schechter I, Zemon V, Schwartz SG, Greenstein VC, Gordon J,<text:s/><text:span text:style-name="T629">et al.</text:span><text:s/>(2001): Dysfunction of Early-Stage Visual Processing in Schizophrenia.<text:s/><text:span text:style-name="T630">AJP</text:span><text:s/>158: 1126–1133.</text:p>
      <text:p text:style-name="Bibliography1">49. Gur RE, McGrath C, Chan RM, Schroeder L, Turner T, Turetsky BI,<text:s/><text:span text:style-name="T631">et al.</text:span><text:s/>(2002): An fMRI Study of Facial Emotion Processing in Patients With Schizophrenia.<text:s/><text:span text:style-name="T632">AJP</text:span><text:s/>159: 1992–1999.</text:p>
      <text:p text:style-name="Bibliography1">50. Wengler K, Goldberg AT, Chahine G, Horga G (2020): Distinct<text:s/>hierarchical alterations of intrinsic neural timescales account for different manifestations of psychosis.<text:s/><text:span text:style-name="T633">eLife</text:span><text:s/>9: e56151.</text:p>
      <text:p text:style-name="Bibliography1">51. Geljic M, Mitchell M, Stevens K-A, Holbrook H, Darke H, Goodbourn P,<text:s/><text:span text:style-name="T634">et al.</text:span><text:s/>(2025): Visual integration deficits associated with psychosis are independent of diagnosis.<text:s/><text:span text:style-name="T635">Schizophr</text:span><text:s/>11: 58.</text:p>
      <text:p text:style-name="Bibliography1">52. Haarsma J, Knolle F, Griffin JD, Taverne H, Mada M, Goodyer IM,<text:s/><text:span text:style-name="T636">et al.</text:span><text:s/>(2020): Influence of prior beliefs on perception in early psychosis: Effects of illness stage and hierarchical level of<text:s/>belief.<text:s/><text:span text:style-name="T637">Journal of Abnormal Psychology</text:span><text:s/>129: 581–598.</text:p>
      <text:soft-page-break/>
      <text:p text:style-name="Bibliography1">53. Uscătescu LC, Said-Yürekli S, Kronbichler L, Stelzig-Schöler R, Pearce B-G, Reich LA,<text:s/><text:span text:style-name="T638">et al.</text:span><text:s/>(2021): Reduced intrinsic neural timescales in schizophrenia along posterior parietal and occipital areas.<text:s/><text:span text:style-name="T639">npj Schizophr</text:span><text:s/>7: 55.</text:p>
      <text:p text:style-name="Bibliography1">54. Nakazawa K, Sapkota K (2020): The origin of NMDA receptor hypofunction in schizophrenia.<text:s/><text:span text:style-name="T640">Pharmacol Ther</text:span><text:s/>205: 107426.</text:p>
      <text:p text:style-name="Bibliography1">55. Widmer FC, O’Toole SM, Keller GB (2022): NMDA receptors in visual cortex are necessary for normal visuomotor<text:s/>integration and skill learning.<text:s/><text:span text:style-name="T641">eLife</text:span><text:s/>11: e71476.</text:p>
      <text:p text:style-name="Bibliography1">56. Schielke A, Krekelberg B (2021): N-methyl d-aspartate receptor hypofunction reduces visual contextual integration.<text:s/><text:span text:style-name="T642">J Vis</text:span><text:s/>21: 9.</text:p>
      <text:p text:style-name="Bibliography1">57. Haarsma J, Fletcher PC, Griffin JD, Taverne HJ, Ziauddeen H, Spencer TJ,<text:s/><text:span text:style-name="T643">et al.</text:span><text:s/>(2021): Precision weighting of cortical unsigned prediction error signals benefits learning, is mediated by dopamine, and is impaired in psychosis.<text:s/><text:span text:style-name="T644">Mol Psychiatry</text:span><text:s/>26: 5320–5333.<text:bookmark-end text:name="ZOTERO_BREF_Lwh4X9hnA6Ef"/></text:p>
      <text:p text:style-name="P6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Arial Unicode MS" svg:font-family="Arial Unicode MS" style:font-family-generic="system"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fo:line-height="115%"/>
      <style:text-properties style:font-name="Calibri" style:font-name-asian="Calibri" style:font-name-complex="Calibri" fo:color="#2F5496"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fo:line-height="115%"/>
      <style:text-properties style:font-name="Calibri" style:font-name-asian="Calibri" style:font-name-complex="Calibri" fo:color="#2F5496"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fo:line-height="115%"/>
      <style:text-properties style:font-name="Calibri" style:font-name-asian="Calibri" style:font-name-complex="Calibri" fo:color="#2F5496"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fo:line-height="115%"/>
      <style:text-properties style:font-name="Calibri" style:font-name-asian="Calibri" style:font-name-complex="Calibri" fo:font-style="italic" style:font-style-asian="italic" style:font-style-complex="italic" fo:color="#2F549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fo:line-height="115%"/>
      <style:text-properties style:font-name="Calibri" style:font-name-asian="Calibri" style:font-name-complex="Calibri" fo:color="#2F5496" fo:font-size="12pt" style:font-size-asian="12pt" style:font-size-complex="12pt" fo:hyphenate="false"/>
    </style:style>
    <style:style style:name="Heading6" style:display-name="Heading 6" style:family="paragraph" style:parent-style-name="Standard" style:next-style-name="Standard" style:default-outline-level="6">
      <style:paragraph-properties fo:keep-with-next="always" fo:keep-together="always" fo:margin-top="0.0277in" fo:line-height="115%"/>
      <style:text-properties style:font-name="Calibri" style:font-name-asian="Calibri" style:font-name-complex="Calibri" fo:font-style="italic" style:font-style-asian="italic" style:font-style-complex="italic" fo:color="#595959"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Arial Unicode MS" fo:hyphenate="false"/>
    </style:style>
    <style:style style:name="Caption" style:display-name="Caption" style:family="paragraph" style:parent-style-name="Standard">
      <style:paragraph-properties text:number-lines="false" fo:margin-top="0.0833in" fo:margin-bottom="0.0833in"/>
      <style:text-properties style:font-name-complex="Arial Unicode M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Unicode MS" fo:hyphenate="false"/>
    </style:style>
    <style:style style:name="Title" style:display-name="Title" style:family="paragraph" style:parent-style-name="Standard" style:next-style-name="Standard">
      <style:paragraph-properties fo:margin-bottom="0.0555in" fo:line-height="100%"/>
      <style:text-properties style:font-name="Calibri" style:font-name-asian="Calibri" style:font-name-complex="Calibri" fo:font-size="28pt" style:font-size-asian="28pt" style:font-size-complex="28pt" fo:hyphenate="false"/>
    </style:style>
    <style:style style:name="Subtitle" style:display-name="Subtitle" style:family="paragraph" style:parent-style-name="Standard" style:next-style-name="Standard">
      <style:paragraph-properties fo:margin-bottom="0.1111in" fo:line-height="115%"/>
      <style:text-properties style:font-name="Calibri" style:font-name-asian="Calibri" style:font-name-complex="Calibri" fo:color="#595959" fo:font-size="14pt" style:font-size-asian="14pt" style:font-size-complex="14pt" fo:hyphenate="false"/>
    </style:style>
    <style:style style:name="Bibliography" style:display-name="Bibliography" style:family="paragraph" style:parent-style-name="Standard" style:next-style-name="Standard">
      <style:text-properties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text:number-lines="false" fo:line-height="100%">
        <style:tab-stops>
          <style:tab-stop style:type="center" style:position="3.25in"/>
          <style:tab-stop style:type="right" style:position="6.5in"/>
        </style:tab-stops>
      </style:paragraph-properties>
      <style:text-properties fo:hyphenate="false"/>
    </style:style>
    <style:style style:name="Framecontents" style:display-name="Frame contents" style:family="paragraph" style:parent-style-name="Standard">
      <style:text-properties fo:hyphenate="false"/>
    </style:style>
    <style:style style:name="Header" style:display-name="Header" style:family="paragraph" style:parent-style-name="HeaderandFooter">
      <style:paragraph-properties text:number-lines="false">
        <style:tab-stops>
          <style:tab-stop style:type="center" style:position="3.25in"/>
          <style:tab-stop style:type="right" style:position="6.5in"/>
        </style:tab-stops>
      </style:paragraph-properties>
      <style:text-properties fo:hyphenate="false"/>
    </style:style>
    <style:style style:name="FrameContents0" style:display-name="Frame Contents" style:family="paragraph" style:parent-style-name="Standard">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5in"/>
        </style:tab-stops>
      </style:paragraph-properties>
      <style:text-properties fo:hyphenate="false"/>
    </style:style>
    <style:style style:name="PlaceholderText" style:display-name="Placeholder Text" style:family="text" style:parent-style-name="DefaultParagraphFont">
      <style:text-properties fo:color="#666666"/>
    </style:style>
    <style:style style:name="FooterChar" style:display-name="Footer Char" style:family="text" style:parent-style-name="DefaultParagraphFont"/>
    <style:style style:name="PageNumber" style:display-name="Page Numbe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nenumbering" style:display-name="Line numbering" style:family="text" style:parent-style-name="DefaultParagraphFon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fo:font-size="10pt" style:font-size-asian="10pt" style:font-size-complex="10pt"/>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style:font-name="Helvetica Neue" style:font-name-asian="Times New Roman" style:font-name-complex="Helvetica Neue" fo:font-size="10pt" style:font-size-asian="10pt" style:font-size-complex="10pt" fo:language="en" fo:country="US"/>
    </style:style>
    <style:style style:name="ListLabel29" style:display-name="ListLabel 29" style:family="text">
      <style:text-properties style:font-name="Helvetica Neue" style:font-name-asian="Helvetica Neue" style:font-name-complex="Helvetica Neue" fo:font-size="10pt" style:font-size-asian="10pt" style:font-size-complex="10pt" fo:language="en" fo:country="US"/>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text:start-value="4">
        <style:list-level-properties text:space-before="0.25in" text:min-label-width="0.3888in" text:list-level-position-and-space-mode="label-alignment">
          <style:list-level-label-alignment text:label-followed-by="listtab" fo:margin-left="0.6388in" fo:text-indent="-0.3888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3LVL1" style:family="text">
      <style:text-properties fo:font-size="10pt" style:font-size-asian="10pt" style:font-size-complex="10pt"/>
    </style:style>
    <text:list-style style:name="WWNum2" style:display-name="WWNum2">
      <text:list-level-style-number text:level="1" text:style-name="WW_CharLFO3LV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list-format-name="NLF2" style:num-format="">
        <style:list-level-properties text:list-level-position-and-space-mode="label-alignment">
          <style:list-level-label-alignment text:label-followed-by="nothing"/>
        </style:list-level-properties>
      </text:list-level-style-number>
      <text:list-level-style-number text:level="2" style:num-list-format-name="NLF2" style:num-format="">
        <style:list-level-properties text:list-level-position-and-space-mode="label-alignment">
          <style:list-level-label-alignment text:label-followed-by="nothing"/>
        </style:list-level-properties>
      </text:list-level-style-number>
      <text:list-level-style-number text:level="3" style:num-list-format-name="NLF2" style:num-format="">
        <style:list-level-properties text:list-level-position-and-space-mode="label-alignment">
          <style:list-level-label-alignment text:label-followed-by="nothing"/>
        </style:list-level-properties>
      </text:list-level-style-number>
      <text:list-level-style-number text:level="4" style:num-list-format-name="NLF2" style:num-format="">
        <style:list-level-properties text:list-level-position-and-space-mode="label-alignment">
          <style:list-level-label-alignment text:label-followed-by="nothing"/>
        </style:list-level-properties>
      </text:list-level-style-number>
      <text:list-level-style-number text:level="5" style:num-list-format-name="NLF2" style:num-format="">
        <style:list-level-properties text:list-level-position-and-space-mode="label-alignment">
          <style:list-level-label-alignment text:label-followed-by="nothing"/>
        </style:list-level-properties>
      </text:list-level-style-number>
      <text:list-level-style-number text:level="6" style:num-list-format-name="NLF2" style:num-format="">
        <style:list-level-properties text:list-level-position-and-space-mode="label-alignment">
          <style:list-level-label-alignment text:label-followed-by="nothing"/>
        </style:list-level-properties>
      </text:list-level-style-number>
      <text:list-level-style-number text:level="7" style:num-list-format-name="NLF2" style:num-format="">
        <style:list-level-properties text:list-level-position-and-space-mode="label-alignment">
          <style:list-level-label-alignment text:label-followed-by="nothing"/>
        </style:list-level-properties>
      </text:list-level-style-number>
      <text:list-level-style-number text:level="8" style:num-list-format-name="NLF2" style:num-format="">
        <style:list-level-properties text:list-level-position-and-space-mode="label-alignment">
          <style:list-level-label-alignment text:label-followed-by="nothing"/>
        </style:list-level-properties>
      </text:list-level-style-number>
      <text:list-level-style-number text:level="9" style:num-list-format-name="NLF2" style:num-format="">
        <style:list-level-properties text:list-level-position-and-space-mode="label-alignment">
          <style:list-level-label-alignment text:label-followed-by="nothing"/>
        </style:list-level-properties>
      </text:list-level-style-number>
    </text:list-style>
    <style:style style:name="LineNumber" style:display-name="Lin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text:linenumbering-configuration text:increment="1" text:offset="0.2in" text:restart-on-page="fals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Footer" style:family="paragraph">
      <style:paragraph-properties fo:margin-right="0.25in"/>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Kaan Keskin</dc:creator>
    <meta:creation-date>2026-05-12T14:08:00Z</meta:creation-date>
    <dc:date>2026-07-04T09:20:00Z</dc:date>
    <meta:template xlink:href="Normal.dotm" xlink:type="simple"/>
    <meta:editing-cycles>15</meta:editing-cycles>
    <meta:editing-duration>PT12120S</meta:editing-duration>
    <meta:user-defined meta:name="AppVersion">15.0000</meta:user-defined>
    <meta:user-defined meta:name="ZOTERO_BREF_2eosskXErdi9_1">ZOTERO_ITEM CSL_CITATION {"citationID":"6ymdz0za","properties":{"unsorted":false,"formattedCitation":"(32)","plainCitation":"(32)","noteIndex":0},"citationItems":[{"id":4745,"uris":["http://zotero.org/users/9264269/items/KD24Q68P"],"itemData":{"id":4745,"</meta:user-defined>
    <meta:user-defined meta:name="ZOTERO_BREF_2eosskXErdi9_2">type":"article-journal","container-title":"Frontiers in Neuroscience","DOI":"10.3389/fnins.2019.00887","ISSN":"1662-453X","journalAbbreviation":"Front. Neurosci.","page":"887","source":"DOI.org (Crossref)","title":"Trust Games and Beyond","volume":"13","a</meta:user-defined>
    <meta:user-defined meta:name="ZOTERO_BREF_2eosskXErdi9_3">uthor":[{"family":"Alós-Ferrer","given":"Carlos"},{"family":"Farolfi","given":"Federica"}],"issued":{"date-parts":[["2019",9,10]]}}}],"schema":"https://github.com/citation-style-language/schema/raw/master/csl-citation.json"}</meta:user-defined>
    <meta:user-defined meta:name="ZOTERO_BREF_9QkwwIF93Y70_1">ZOTERO_ITEM CSL_CITATION {"citationID":"ZtyIV8gM","properties":{"unsorted":false,"formattedCitation":"(13,39)","plainCitation":"(13,39)","noteIndex":0},"citationItems":[{"id":4742,"uris":["http://zotero.org/users/9264269/items/W2CPA9ZZ"],"itemData":{"id":</meta:user-defined>
    <meta:user-defined meta:name="ZOTERO_BREF_9QkwwIF93Y70_10">iction-error hypothesis of schizophrenia","volume":"47","author":[{"family":"Millard","given":"Samuel J."},{"family":"Bearden","given":"Carrie E."},{"family":"Karlsgodt","given":"Katherine H."},{"family":"Sharpe","given":"Melissa J."}],"issued":{"date-par</meta:user-defined>
    <meta:user-defined meta:name="ZOTERO_BREF_9QkwwIF93Y70_11">ts":[["2022",2]]}}},{"id":4736,"uris":["http://zotero.org/users/9264269/items/TYJAVZZB"],"itemData":{"id":4736,"type":"article-journal","container-title":"Human Brain Mapping","DOI":"10.1002/hbm.25453","ISSN":"1065-9471, 1097-0193","issue":"11","journalAb</meta:user-defined>
    <meta:user-defined meta:name="ZOTERO_BREF_9QkwwIF93Y70_12">breviation":"Hum Brain Mapp","language":"en","note":"number: 11","page":"3547-3560","source":"DOI.org (Crossref)","title":"Abnormal prediction error processing in schizophrenia and depression","volume":"42","author":[{"family":"Yaple","given":"Zachary Ada</meta:user-defined>
    <meta:user-defined meta:name="ZOTERO_BREF_9QkwwIF93Y70_13">m"},{"family":"Tolomeo","given":"Serenella"},{"family":"Yu","given":"Rongjun"}],"issued":{"date-parts":[["2021",8]]}}}],"schema":"https://github.com/citation-style-language/schema/raw/master/csl-citation.json"}</meta:user-defined>
    <meta:user-defined meta:name="ZOTERO_BREF_9QkwwIF93Y70_2">4742,"type":"article-journal","abstract":"Abstract\n            Schizophrenia is a severe psychiatric disorder affecting 21 million people worldwide. People with schizophrenia suffer from symptoms including psychosis and delusions, apathy, anhedonia, and </meta:user-defined>
    <meta:user-defined meta:name="ZOTERO_BREF_9QkwwIF93Y70_3">cognitive deficits. Strikingly, schizophrenia is characterised by a learning paradox involving difficulties learning from rewarding events, whilst simultaneously ‘overlearning’ about irrelevant or neutral information. While dysfunction in dopaminergic sig</meta:user-defined>
    <meta:user-defined meta:name="ZOTERO_BREF_9QkwwIF93Y70_4">nalling has long been linked to the pathophysiology of schizophrenia, a cohesive framework that accounts for this learning paradox remains elusive. Recently, there has been an explosion of new research investigating how dopamine contributes to reinforceme</meta:user-defined>
    <meta:user-defined meta:name="ZOTERO_BREF_9QkwwIF93Y70_5">nt learning, which illustrates that midbrain dopamine contributes in complex ways to reinforcement learning, not previously envisioned. This new data brings new possibilities for how dopamine signalling contributes to the symptomatology of schizophrenia. </meta:user-defined>
    <meta:user-defined meta:name="ZOTERO_BREF_9QkwwIF93Y70_6">Building on recent work, we present a new neural framework for how we might envision specific dopamine circuits contributing to this learning paradox in schizophrenia in the context of models of reinforcement learning. Further, we discuss avenues of precl</meta:user-defined>
    <meta:user-defined meta:name="ZOTERO_BREF_9QkwwIF93Y70_7">inical research with the use of cutting-edge neuroscience techniques where aspects of this model may be tested. Ultimately, it is hoped that this review will spur to action more research utilising specific reinforcement learning paradigms in preclinical m</meta:user-defined>
    <meta:user-defined meta:name="ZOTERO_BREF_9QkwwIF93Y70_8">odels of schizophrenia, to reconcile seemingly disparate symptomatology and develop more efficient therapeutics.","container-title":"Neuropsychopharmacology","DOI":"10.1038/s41386-021-01188-y","ISSN":"0893-133X, 1740-634X","issue":"3","journalAbbreviation</meta:user-defined>
    <meta:user-defined meta:name="ZOTERO_BREF_9QkwwIF93Y70_9">":"Neuropsychopharmacol.","language":"en","note":"number: 3","page":"628-640","source":"DOI.org (Crossref)","title":"The prediction-error hypothesis of schizophrenia: new data point to circuit-specific changes in dopamine activity","title-short":"The pred</meta:user-defined>
    <meta:user-defined meta:name="ZOTERO_BREF_AfXx41MC4mFG_1">ZOTERO_ITEM CSL_CITATION {"citationID":"jp5GH52x","properties":{"unsorted":false,"formattedCitation":"(9\\uc0\\u8211{}11)","plainCitation":"(9–11)","noteIndex":0},"citationItems":[{"id":4909,"uris":["http://zotero.org/users/9264269/items/AJG7LN5S"],"itemD</meta:user-defined>
    <meta:user-defined meta:name="ZOTERO_BREF_AfXx41MC4mFG_10">ltz","given":"Wolfram"},{"family":"Dickinson","given":"Anthony"}],"issued":{"date-parts":[["2000",3]]}}},{"id":914,"uris":["http://zotero.org/users/9264269/items/WIV358ML"],"itemData":{"id":914,"type":"article-journal","abstract":"This article reviews a f</meta:user-defined>
    <meta:user-defined meta:name="ZOTERO_BREF_AfXx41MC4mFG_11">ree-energy formulation that advances Helmholtz's agenda to find principles of brain function based on conservation laws and neuronal energy. It rests on advances in statistical physics, theoretical biology and machine learning to explain a remarkable rang</meta:user-defined>
    <meta:user-defined meta:name="ZOTERO_BREF_AfXx41MC4mFG_12">e of facts about brain structure and function. We could have just scratched the surface of what this formulation offers; for example, it is becoming clear that the Bayesian brain is just one facet of the free-energy principle and that perception is an ine</meta:user-defined>
    <meta:user-defined meta:name="ZOTERO_BREF_AfXx41MC4mFG_13">vitable consequence of active exchange with the environment. Furthermore, one can see easily how constructs like memory, attention, value, reinforcement and salience might disclose their simple relationships within this framework. © 2009 Elsevier Ltd. All</meta:user-defined>
    <meta:user-defined meta:name="ZOTERO_BREF_AfXx41MC4mFG_14"> rights reserved.","container-title":"Trends in Cognitive Sciences","DOI":"10.1016/j.tics.2009.04.005","ISSN":"13646613","issue":"7","page":"293–301","PMID":"19559644","title":"The free-energy principle: a rough guide to the brain?","volume":"13","author"</meta:user-defined>
    <meta:user-defined meta:name="ZOTERO_BREF_AfXx41MC4mFG_15">:[{"family":"Friston","given":"Karl"}],"issued":{"date-parts":[["2009"]]}}}],"schema":"https://github.com/citation-style-language/schema/raw/master/csl-citation.json"}</meta:user-defined>
    <meta:user-defined meta:name="ZOTERO_BREF_AfXx41MC4mFG_2">ata":{"id":4909,"type":"article-journal","container-title":"Neural Networks","DOI":"10.1016/s0893-6080(96)00035-4","ISSN":"0893-6080","issue":"8","language":"en","license":"https://www.elsevier.com/tdm/userlicense/1.0/","page":"1265-1279","publisher":"Els</meta:user-defined>
    <meta:user-defined meta:name="ZOTERO_BREF_AfXx41MC4mFG_3">evier BV","source":"Crossref","title":"Forward Models for Physiological Motor Control","volume":"9","author":[{"family":"Miall","given":"R.C."},{"family":"Wolpert","given":"D.M."}],"issued":{"date-parts":[["1996",11]]}}},{"id":4908,"uris":["http://zotero.</meta:user-defined>
    <meta:user-defined meta:name="ZOTERO_BREF_AfXx41MC4mFG_4">org/users/9264269/items/DI7W85X3"],"itemData":{"id":4908,"type":"article-journal","abstract":"Associative learning enables animals to anticipate the occurrence of important outcomes. Learning occurs when the actual outcome differs from the predicted outco</meta:user-defined>
    <meta:user-defined meta:name="ZOTERO_BREF_AfXx41MC4mFG_5">me, resulting in a prediction error. Neurons in several brain structures appear to code prediction errors in relation to rewards, punishments, external stimuli, and behavioral reactions. In one form, dopamine neurons, norepinephrine neurons, and nucleus b</meta:user-defined>
    <meta:user-defined meta:name="ZOTERO_BREF_AfXx41MC4mFG_6">asalis neurons broadcast prediction errors as global reinforcement or teaching signals to large postsynaptic structures. In other cases, error signals are coded by selected neurons in the cerebellum, superior colliculus, frontal eye fields, parietal corte</meta:user-defined>
    <meta:user-defined meta:name="ZOTERO_BREF_AfXx41MC4mFG_7">x, striatum, and visual system, where they influence specific subgroups of neurons. Prediction errors can be used in postsynaptic structures for the immediate selection of behavior or for synaptic changes underlying behavioral learning. The coding of pred</meta:user-defined>
    <meta:user-defined meta:name="ZOTERO_BREF_AfXx41MC4mFG_8">iction errors may represent a basic mode of brain function that may also contribute to the processing of sensory information and the short-term control of behavior.","container-title":"Annual Review of Neuroscience","DOI":"10.1146/annurev.neuro.23.1.473",</meta:user-defined>
    <meta:user-defined meta:name="ZOTERO_BREF_AfXx41MC4mFG_9">"ISSN":"0147-006X, 1545-4126","issue":"1","journalAbbreviation":"Annu. Rev. Neurosci.","language":"en","page":"473-500","publisher":"Annual Reviews","source":"Crossref","title":"Neuronal Coding of Prediction Errors","volume":"23","author":[{"family":"Schu</meta:user-defined>
    <meta:user-defined meta:name="ZOTERO_BREF_FrwCU2eguzOI_1">ZOTERO_ITEM CSL_CITATION {"citationID":"yjDa4O7i","properties":{"unsorted":false,"formattedCitation":"(7,8)","plainCitation":"(7,8)","noteIndex":0},"citationItems":[{"id":4969,"uris":["http://zotero.org/users/9264269/items/NSG8WKX9"],"itemData":{"id":4969</meta:user-defined>
    <meta:user-defined meta:name="ZOTERO_BREF_FrwCU2eguzOI_2">,"type":"article-journal","container-title":"Nature Reviews Neuroscience","DOI":"10.1038/nrn4005","issue":"10","page":"620–631","PMID":"26373471","title":"Social cognition in schizophrenia","volume":"16","author":[{"family":"Green","given":"M. F."},{"fami</meta:user-defined>
    <meta:user-defined meta:name="ZOTERO_BREF_FrwCU2eguzOI_3">ly":"Horan","given":"W. P."},{"family":"Lee","given":"J."}],"issued":{"date-parts":[["2015"]]}}},{"id":4917,"uris":["http://zotero.org/users/9264269/items/RBUFUNRJ"],"itemData":{"id":4917,"type":"article-journal","container-title":"Games and Economic Beha</meta:user-defined>
    <meta:user-defined meta:name="ZOTERO_BREF_FrwCU2eguzOI_4">vior","DOI":"10.1006/game.1995.1027","ISSN":"0899-8256","issue":"1","language":"en","license":"https://www.elsevier.com/tdm/userlicense/1.0/","page":"122-142","publisher":"Elsevier BV","source":"Crossref","title":"Trust, Reciprocity, and Social History","</meta:user-defined>
    <meta:user-defined meta:name="ZOTERO_BREF_FrwCU2eguzOI_5">volume":"10","author":[{"family":"Berg","given":"Joyce"},{"family":"Dickhaut","given":"John"},{"family":"McCabe","given":"Kevin"}],"issued":{"date-parts":[["1995",7]]}}}],"schema":"https://github.com/citation-style-language/schema/raw/master/csl-citation.</meta:user-defined>
    <meta:user-defined meta:name="ZOTERO_BREF_FrwCU2eguzOI_6">json"}</meta:user-defined>
    <meta:user-defined meta:name="ZOTERO_BREF_Lwh4X9hnA6Ef_1">ZOTERO_BIBL {"uncited":[],"omitted":[],"custom":[]} CSL_BIBLIOGRAPHY</meta:user-defined>
    <meta:user-defined meta:name="ZOTERO_BREF_NrCWC69PW6vh_1">ZOTERO_ITEM CSL_CITATION {"citationID":"la0ujdYu","properties":{"unsorted":false,"formattedCitation":"(26,27)","plainCitation":"(26,27)","noteIndex":0},"citationItems":[{"id":88,"uris":["http://zotero.org/users/9264269/items/LYNW6AFR"],"itemData":{"id":88</meta:user-defined>
    <meta:user-defined meta:name="ZOTERO_BREF_NrCWC69PW6vh_2">,"type":"article-journal","container-title":"Brain","DOI":"10.1093/brain/awm173","ISSN":"0006-8950, 1460-2156","issue":"9","journalAbbreviation":"Brain","language":"en","page":"2387-2400","source":"DOI.org (Crossref)","title":"Disrupted prediction-error s</meta:user-defined>
    <meta:user-defined meta:name="ZOTERO_BREF_NrCWC69PW6vh_3">ignal in psychosis: evidence for an associative account of delusions","title-short":"Disrupted prediction-error signal in psychosis","volume":"130","author":[{"family":"Corlett","given":"P.R."},{"family":"Murray","given":"G.K."},{"family":"Honey","given":</meta:user-defined>
    <meta:user-defined meta:name="ZOTERO_BREF_NrCWC69PW6vh_4">"G.D."},{"family":"Aitken","given":"M.R.F."},{"family":"Shanks","given":"D.R."},{"family":"Robbins","given":"T.W."},{"family":"Bullmore","given":"E.T."},{"family":"Dickinson","given":"A."},{"family":"Fletcher","given":"P.C."}],"issued":{"date-parts":[["20</meta:user-defined>
    <meta:user-defined meta:name="ZOTERO_BREF_NrCWC69PW6vh_5">07",9,1]]}}},{"id":4941,"uris":["http://zotero.org/users/9264269/items/U3KZIZ39"],"itemData":{"id":4941,"type":"article-journal","container-title":"Cognitive Neuropsychiatry","DOI":"10.1080/13546805.2014.897601","issue":"5","page":"439–467","PMID":"247022</meta:user-defined>
    <meta:user-defined meta:name="ZOTERO_BREF_NrCWC69PW6vh_6">87","title":"Delusions and prediction error: re-examining the behavioural evidence for disrupted error signalling in delusion formation","volume":"19","author":[{"family":"Griffiths","given":"O."},{"family":"Langdon","given":"R."},{"family":"Le Pelley","g</meta:user-defined>
    <meta:user-defined meta:name="ZOTERO_BREF_NrCWC69PW6vh_7">iven":"M. E."},{"family":"Coltheart","given":"M."}],"issued":{"date-parts":[["2014"]]}}}],"schema":"https://github.com/citation-style-language/schema/raw/master/csl-citation.json"}</meta:user-defined>
    <meta:user-defined meta:name="ZOTERO_BREF_ORoJxONsIiXB_1">ZOTERO_ITEM CSL_CITATION {"citationID":"OaY4qMqr","properties":{"unsorted":false,"formattedCitation":"(31,42,47)","plainCitation":"(31,42,47)","noteIndex":0},"citationItems":[{"id":23,"uris":["http://zotero.org/users/9264269/items/SZZSR6ED"],"itemData":{"</meta:user-defined>
    <meta:user-defined meta:name="ZOTERO_BREF_ORoJxONsIiXB_10">ay be critical. Altered processes at lower levels of a hierarchy need not be linearly related to processes at higher levels (and vice versa). Finally, canonical theories do not highlight active inference—the process through which the effects of our action</meta:user-defined>
    <meta:user-defined meta:name="ZOTERO_BREF_ORoJxONsIiXB_11">s on our sensations are anticipated and minimized. It is possible that conflicting findings might be reconciled by considering these complexities, portending a framework for psychosis more equipped to deal with its many manifestations.","DOI":"10.1016/j.b</meta:user-defined>
    <meta:user-defined meta:name="ZOTERO_BREF_ORoJxONsIiXB_12">iopsych.2018.05.015","note":"ISSN: 18732402\nissue: 9\npage: 634–643\ncontainer-title: Biological Psychiatry\nvolume: 84\nPMID: 30007575","publisher":"Elsevier USA","title":"The Predictive Coding Account of Psychosis","author":[{"family":"Sterzer","given"</meta:user-defined>
    <meta:user-defined meta:name="ZOTERO_BREF_ORoJxONsIiXB_13">:"Philipp"},{"family":"Adams","given":"Rick A."},{"family":"Fletcher","given":"Paul"},{"family":"Frith","given":"Chris"},{"family":"Lawrie","given":"Stephen M."},{"family":"Muckli","given":"Lars"},{"family":"Petrovic","given":"Predrag"},{"family":"Uhlhaas</meta:user-defined>
    <meta:user-defined meta:name="ZOTERO_BREF_ORoJxONsIiXB_14">","given":"Peter"},{"family":"Voss","given":"Martin"},{"family":"Corlett","given":"Philip R."}],"issued":{"date-parts":[["2018",11]]}}},{"id":5512,"uris":["http://zotero.org/users/9264269/items/DUC4HHYN"],"itemData":{"id":5512,"type":"article-journal","co</meta:user-defined>
    <meta:user-defined meta:name="ZOTERO_BREF_ORoJxONsIiXB_15">ntainer-title":"The Lancet Psychiatry","DOI":"10.1016/S2215-0366(14)70275-5","ISSN":"22150366","issue":"2","journalAbbreviation":"The Lancet Psychiatry","language":"en","page":"148-158","source":"DOI.org (Crossref)","title":"Computational psychiatry: the </meta:user-defined>
    <meta:user-defined meta:name="ZOTERO_BREF_ORoJxONsIiXB_16">brain as a phantastic organ","title-short":"Computational psychiatry","volume":"1","author":[{"family":"Friston","given":"Karl J"},{"family":"Stephan","given":"Klaas Enno"},{"family":"Montague","given":"Read"},{"family":"Dolan","given":"Raymond J"}],"issu</meta:user-defined>
    <meta:user-defined meta:name="ZOTERO_BREF_ORoJxONsIiXB_17">ed":{"date-parts":[["2014",7]]}}}],"schema":"https://github.com/citation-style-language/schema/raw/master/csl-citation.json"}</meta:user-defined>
    <meta:user-defined meta:name="ZOTERO_BREF_ORoJxONsIiXB_2">id":23,"type":"article-journal","container-title":"Frontiers in Psychiatry","DOI":"10.3389/fpsyt.2013.00047","ISSN":"1664-0640","journalAbbreviation":"Front. Psychiatry","source":"DOI.org (Crossref)","title":"The Computational Anatomy of Psychosis","URL":</meta:user-defined>
    <meta:user-defined meta:name="ZOTERO_BREF_ORoJxONsIiXB_3">"http://journal.frontiersin.org/article/10.3389/fpsyt.2013.00047/abstract","volume":"4","author":[{"family":"Adams","given":"Rick A."},{"family":"Stephan","given":"Klaas Enno"},{"family":"Brown","given":"Harriet R."},{"family":"Frith","given":"Christopher</meta:user-defined>
    <meta:user-defined meta:name="ZOTERO_BREF_ORoJxONsIiXB_4"> D."},{"family":"Friston","given":"Karl J."}],"accessed":{"date-parts":[["2023",10,16]]},"issued":{"date-parts":[["2013"]]}}},{"id":952,"uris":["http://zotero.org/users/9264269/items/D6F6LLRB"],"itemData":{"id":952,"type":"document","abstract":"Fueled by </meta:user-defined>
    <meta:user-defined meta:name="ZOTERO_BREF_ORoJxONsIiXB_5">developments in computational neuroscience, there has been increasing interest in the underlying neurocomputational mechanisms of psychosis. One successful approach involves predictive coding and Bayesian inference. Here, inferences regarding the current </meta:user-defined>
    <meta:user-defined meta:name="ZOTERO_BREF_ORoJxONsIiXB_6">state of the world are made by combining prior beliefs with incoming sensory signals. Mismatches between prior beliefs and incoming signals constitute prediction errors that drive new learning. Psychosis has been suggested to result from a decreased preci</meta:user-defined>
    <meta:user-defined meta:name="ZOTERO_BREF_ORoJxONsIiXB_7">sion in the encoding of prior beliefs relative to the sensory data, thereby garnering maladaptive inferences. Here, we review the current evidence for aberrant predictive coding and discuss challenges for this canonical predictive coding account of psycho</meta:user-defined>
    <meta:user-defined meta:name="ZOTERO_BREF_ORoJxONsIiXB_8">sis. For example, hallucinations and delusions may relate to distinct alterations in predictive coding, despite their common co-occurrence. More broadly, some studies implicate weakened prior beliefs in psychosis, and others find stronger priors. These ch</meta:user-defined>
    <meta:user-defined meta:name="ZOTERO_BREF_ORoJxONsIiXB_9">allenges might be answered with a more nuanced view of predictive coding. Different priors may be specified for different sensory modalities and their integration, and deficits in each modality need not be uniform. Furthermore, hierarchical organization m</meta:user-defined>
    <meta:user-defined meta:name="ZOTERO_BREF_PCStAFXMF8Au_1">ZOTERO_ITEM CSL_CITATION {"citationID":"kkc9gsjP","properties":{"unsorted":false,"formattedCitation":"(36)","plainCitation":"(36)","noteIndex":0},"citationItems":[{"id":5044,"uris":["http://zotero.org/users/9264269/items/X5BTZSH2"],"itemData":{"id":5044,"</meta:user-defined>
    <meta:user-defined meta:name="ZOTERO_BREF_PCStAFXMF8Au_2">type":"article-journal","container-title":"Translational Psychiatry","DOI":"10.1038/s41398-025-03510-4","ISSN":"2158-3188","issue":"1","journalAbbreviation":"Transl Psychiatry","language":"en","page":"279","source":"DOI.org (Crossref)","title":"Temporal i</meta:user-defined>
    <meta:user-defined meta:name="ZOTERO_BREF_PCStAFXMF8Au_3">mprecision and its dynamics in schizophrenia","volume":"15","author":[{"family":"Lechner","given":"Stephan"},{"family":"Hsieh","given":"Ming H."},{"family":"Lin","given":"Yi-Ting"},{"family":"Liu","given":"Chih-Min"},{"family":"Chen","given":"I-Fei"},{"fa</meta:user-defined>
    <meta:user-defined meta:name="ZOTERO_BREF_PCStAFXMF8Au_4">mily":"Liu","given":"Chen-Chung"},{"family":"Chien","given":"Yi-Ling"},{"family":"Hwang","given":"Tzung-Jeng"},{"family":"Hwu","given":"Hai-Gwo"},{"family":"Northoff","given":"Georg"}],"issued":{"date-parts":[["2025",8,13]]}}}],"schema":"https://github.co</meta:user-defined>
    <meta:user-defined meta:name="ZOTERO_BREF_PCStAFXMF8Au_5">m/citation-style-language/schema/raw/master/csl-citation.json"}</meta:user-defined>
    <meta:user-defined meta:name="ZOTERO_BREF_SSvM32OwjYAp_1">ZOTERO_ITEM CSL_CITATION {"citationID":"uHPn7eVK","properties":{"unsorted":false,"formattedCitation":"(36\\uc0\\u8211{}38)","plainCitation":"(36–38)","noteIndex":0},"citationItems":[{"id":5044,"uris":["http://zotero.org/users/9264269/items/X5BTZSH2"],"ite</meta:user-defined>
    <meta:user-defined meta:name="ZOTERO_BREF_SSvM32OwjYAp_2">mData":{"id":5044,"type":"article-journal","container-title":"Translational Psychiatry","DOI":"10.1038/s41398-025-03510-4","ISSN":"2158-3188","issue":"1","journalAbbreviation":"Transl Psychiatry","language":"en","page":"279","source":"DOI.org (Crossref)",</meta:user-defined>
    <meta:user-defined meta:name="ZOTERO_BREF_SSvM32OwjYAp_3">"title":"Temporal imprecision and its dynamics in schizophrenia","volume":"15","author":[{"family":"Lechner","given":"Stephan"},{"family":"Hsieh","given":"Ming H."},{"family":"Lin","given":"Yi-Ting"},{"family":"Liu","given":"Chih-Min"},{"family":"Chen","g</meta:user-defined>
    <meta:user-defined meta:name="ZOTERO_BREF_SSvM32OwjYAp_4">iven":"I-Fei"},{"family":"Liu","given":"Chen-Chung"},{"family":"Chien","given":"Yi-Ling"},{"family":"Hwang","given":"Tzung-Jeng"},{"family":"Hwu","given":"Hai-Gwo"},{"family":"Northoff","given":"Georg"}],"issued":{"date-parts":[["2025",8,13]]}}},{"id":21,</meta:user-defined>
    <meta:user-defined meta:name="ZOTERO_BREF_SSvM32OwjYAp_5">"uris":["http://zotero.org/users/9264269/items/UNH2TYA3"],"itemData":{"id":21,"type":"article-journal","container-title":"Asian Journal of Psychiatry","DOI":"10.1016/j.ajp.2023.103654","ISSN":"18762018","journalAbbreviation":"Asian Journal of Psychiatry",</meta:user-defined>
    <meta:user-defined meta:name="ZOTERO_BREF_SSvM32OwjYAp_6">"language":"en","page":"103654","source":"DOI.org (Crossref)","title":"Temporal imprecision and phase instability in schizophrenia resting state EEG","volume":"86","author":[{"family":"Lechner","given":"Stephan"},{"family":"Northoff","given":"Georg"}],"is</meta:user-defined>
    <meta:user-defined meta:name="ZOTERO_BREF_SSvM32OwjYAp_7">sued":{"date-parts":[["2023",8]]}}},{"id":263,"uris":["http://zotero.org/users/9264269/items/56ZPIYBY"],"itemData":{"id":263,"type":"article-journal","container-title":"Molecular psychiatry","title":"Phase Based Temporal Imprecision in Schizophrenia","aut</meta:user-defined>
    <meta:user-defined meta:name="ZOTERO_BREF_SSvM32OwjYAp_8">hor":[{"family":"Wolff","given":"Annemarie"},{"family":"Northoff","given":"Georg"}],"issued":{"date-parts":[["2023"]],"season":"In Press"}}}],"schema":"https://github.com/citation-style-language/schema/raw/master/csl-citation.json"}</meta:user-defined>
    <meta:user-defined meta:name="ZOTERO_BREF_VS3b1Ox3icy3_1">ZOTERO_ITEM CSL_CITATION {"citationID":"sgagOwfn","properties":{"unsorted":false,"formattedCitation":"(31)","plainCitation":"(31)","noteIndex":0},"citationItems":[{"id":23,"uris":["http://zotero.org/users/9264269/items/SZZSR6ED"],"itemData":{"id":23,"type</meta:user-defined>
    <meta:user-defined meta:name="ZOTERO_BREF_VS3b1Ox3icy3_2">":"article-journal","container-title":"Frontiers in Psychiatry","DOI":"10.3389/fpsyt.2013.00047","ISSN":"1664-0640","journalAbbreviation":"Front. Psychiatry","source":"DOI.org (Crossref)","title":"The Computational Anatomy of Psychosis","URL":"http://jour</meta:user-defined>
    <meta:user-defined meta:name="ZOTERO_BREF_VS3b1Ox3icy3_3">nal.frontiersin.org/article/10.3389/fpsyt.2013.00047/abstract","volume":"4","author":[{"family":"Adams","given":"Rick A."},{"family":"Stephan","given":"Klaas Enno"},{"family":"Brown","given":"Harriet R."},{"family":"Frith","given":"Christopher D."},{"fami</meta:user-defined>
    <meta:user-defined meta:name="ZOTERO_BREF_VS3b1Ox3icy3_4">ly":"Friston","given":"Karl J."}],"accessed":{"date-parts":[["2023",10,16]]},"issued":{"date-parts":[["2013"]]}}}],"schema":"https://github.com/citation-style-language/schema/raw/master/csl-citation.json"}</meta:user-defined>
    <meta:user-defined meta:name="ZOTERO_BREF_VtGfB1hyoacB_1">ZOTERO_ITEM CSL_CITATION {"citationID":"Rz9mEvX5","properties":{"unsorted":false,"formattedCitation":"(28,29)","plainCitation":"(28,29)","noteIndex":0},"citationItems":[{"id":707,"uris":["http://zotero.org/users/9264269/items/62HXSG2Y"],"itemData":{"id":7</meta:user-defined>
    <meta:user-defined meta:name="ZOTERO_BREF_VtGfB1hyoacB_10">":"Klaas E."}],"issued":{"date-parts":[["2017"]]}}},{"id":5494,"uris":["http://zotero.org/users/9264269/items/BVHTW6PT"],"itemData":{"id":5494,"type":"article-journal","container-title":"NeuroImage","DOI":"10.1016/j.neuroimage.2009.03.033","ISSN":"1053811</meta:user-defined>
    <meta:user-defined meta:name="ZOTERO_BREF_VtGfB1hyoacB_11">9","issue":"4","journalAbbreviation":"NeuroImage","language":"en","license":"https://www.elsevier.com/tdm/userlicense/1.0/","page":"1180-1186","source":"DOI.org (Crossref)","title":"Understanding why patients with schizophrenia do not perceive the hollow-</meta:user-defined>
    <meta:user-defined meta:name="ZOTERO_BREF_VtGfB1hyoacB_12">mask illusion using dynamic causal modelling","volume":"46","author":[{"family":"Dima","given":"Danai"},{"family":"Roiser","given":"Jonathan P."},{"family":"Dietrich","given":"Detlef E."},{"family":"Bonnemann","given":"Catharina"},{"family":"Lanfermann","</meta:user-defined>
    <meta:user-defined meta:name="ZOTERO_BREF_VtGfB1hyoacB_13">given":"Heinrich"},{"family":"Emrich","given":"Hinderk M."},{"family":"Dillo","given":"Wolfgang"}],"issued":{"date-parts":[["2009",7]]}}}],"schema":"https://github.com/citation-style-language/schema/raw/master/csl-citation.json"}</meta:user-defined>
    <meta:user-defined meta:name="ZOTERO_BREF_VtGfB1hyoacB_2">07,"type":"article-journal","abstract":"Social learning is fundamental to human interactions, yet its computational and physiological mechanisms are not well understood. One prominent open question concerns the role of neuromodulatory transmitters. We com</meta:user-defined>
    <meta:user-defined meta:name="ZOTERO_BREF_VtGfB1hyoacB_3">bined fMRI, computational modelling and genetics to address this question in two separate samples (N1/435, N1/447). Participants played a game requiring inference on an adviser's intentions whose motivation to help or mislead changed over time. Our analys</meta:user-defined>
    <meta:user-defined meta:name="ZOTERO_BREF_VtGfB1hyoacB_4">es suggest that hierarchically structured belief updates about current advice validity and the adviser's trustworthiness, respectively, depend on different neuromodulatory systems. Low-level prediction errors (PEs) about advice accuracy not only activated</meta:user-defined>
    <meta:user-defined meta:name="ZOTERO_BREF_VtGfB1hyoacB_5"> regions known to support 'theory of mind', but also the dopaminergic midbrain. Furthermore, PE responses in ventral striatum were influenced by the Met/Val polymorphismof the Catechol-O-Methyltransferase (COMT) gene. By contrast, high-level PEs ('expecte</meta:user-defined>
    <meta:user-defined meta:name="ZOTERO_BREF_VtGfB1hyoacB_6">d uncertainty') about the adviser's fidelity activated the cholinergic septum. These findings, replicated in both samples, have important implications: They suggest that social learning rests on hierarchically related PEs encoded by midbrain and septum ac</meta:user-defined>
    <meta:user-defined meta:name="ZOTERO_BREF_VtGfB1hyoacB_7">tivity, respectively, in the same manner as other forms of learning under volatility. Furthermore, these hierarchical PEs may be broadcast by dopaminergic and cholinergic projections to induce plasticity specifically in cortical areas known to represent b</meta:user-defined>
    <meta:user-defined meta:name="ZOTERO_BREF_VtGfB1hyoacB_8">eliefs about others.","container-title":"Social Cognitive and Affective Neuroscience","DOI":"10.1093/scan/nsw171","ISSN":"17495024","issue":"4","page":"618–634","PMID":"28119508","title":"Hierarchical prediction errors in midbrain and septum during social</meta:user-defined>
    <meta:user-defined meta:name="ZOTERO_BREF_VtGfB1hyoacB_9"> learning","volume":"12","author":[{"family":"Diaconescu","given":"Andreea O."},{"family":"Mathys","given":"Christoph"},{"family":"Weber","given":"Lilian A.E."},{"family":"Kasper","given":"Lars"},{"family":"Mauer","given":"Jan"},{"family":"Stephan","given</meta:user-defined>
    <meta:user-defined meta:name="ZOTERO_BREF_XorhVnzmJMdU_1">ZOTERO_ITEM CSL_CITATION {"citationID":"37aaemRJ","properties":{"unsorted":false,"formattedCitation":"(12\\uc0\\u8211{}14)","plainCitation":"(12–14)","noteIndex":0},"citationItems":[{"id":5491,"uris":["http://zotero.org/users/9264269/items/8LXZFSQ2"],"ite</meta:user-defined>
    <meta:user-defined meta:name="ZOTERO_BREF_XorhVnzmJMdU_10">e":"en","license":"http://creativecommons.org/licenses/by-nc-nd/4.0/","page":"1535-1546","source":"DOI.org (Crossref)","title":"Striatal Dopamine and Reward Prediction Error Signaling in Unmedicated Schizophrenia Patients","volume":"46","author":[{"family</meta:user-defined>
    <meta:user-defined meta:name="ZOTERO_BREF_XorhVnzmJMdU_11">":"Katthagen","given":"Teresa"},{"family":"Kaminski","given":"Jakob"},{"family":"Heinz","given":"Andreas"},{"family":"Buchert","given":"Ralph"},{"family":"Schlagenhauf","given":"Florian"}],"issued":{"date-parts":[["2020",12,1]]}}},{"id":4742,"uris":["http</meta:user-defined>
    <meta:user-defined meta:name="ZOTERO_BREF_XorhVnzmJMdU_12">://zotero.org/users/9264269/items/W2CPA9ZZ"],"itemData":{"id":4742,"type":"article-journal","abstract":"Abstract\n            Schizophrenia is a severe psychiatric disorder affecting 21 million people worldwide. People with schizophrenia suffer from sympt</meta:user-defined>
    <meta:user-defined meta:name="ZOTERO_BREF_XorhVnzmJMdU_13">oms including psychosis and delusions, apathy, anhedonia, and cognitive deficits. Strikingly, schizophrenia is characterised by a learning paradox involving difficulties learning from rewarding events, whilst simultaneously ‘overlearning’ about irrelevant</meta:user-defined>
    <meta:user-defined meta:name="ZOTERO_BREF_XorhVnzmJMdU_14"> or neutral information. While dysfunction in dopaminergic signalling has long been linked to the pathophysiology of schizophrenia, a cohesive framework that accounts for this learning paradox remains elusive. Recently, there has been an explosion of new </meta:user-defined>
    <meta:user-defined meta:name="ZOTERO_BREF_XorhVnzmJMdU_15">research investigating how dopamine contributes to reinforcement learning, which illustrates that midbrain dopamine contributes in complex ways to reinforcement learning, not previously envisioned. This new data brings new possibilities for how dopamine s</meta:user-defined>
    <meta:user-defined meta:name="ZOTERO_BREF_XorhVnzmJMdU_16">ignalling contributes to the symptomatology of schizophrenia. Building on recent work, we present a new neural framework for how we might envision specific dopamine circuits contributing to this learning paradox in schizophrenia in the context of models o</meta:user-defined>
    <meta:user-defined meta:name="ZOTERO_BREF_XorhVnzmJMdU_17">f reinforcement learning. Further, we discuss avenues of preclinical research with the use of cutting-edge neuroscience techniques where aspects of this model may be tested. Ultimately, it is hoped that this review will spur to action more research utilis</meta:user-defined>
    <meta:user-defined meta:name="ZOTERO_BREF_XorhVnzmJMdU_18">ing specific reinforcement learning paradigms in preclinical models of schizophrenia, to reconcile seemingly disparate symptomatology and develop more efficient therapeutics.","container-title":"Neuropsychopharmacology","DOI":"10.1038/s41386-021-01188-y",</meta:user-defined>
    <meta:user-defined meta:name="ZOTERO_BREF_XorhVnzmJMdU_19">"ISSN":"0893-133X, 1740-634X","issue":"3","journalAbbreviation":"Neuropsychopharmacol.","language":"en","note":"number: 3","page":"628-640","source":"DOI.org (Crossref)","title":"The prediction-error hypothesis of schizophrenia: new data point to circuit-</meta:user-defined>
    <meta:user-defined meta:name="ZOTERO_BREF_XorhVnzmJMdU_2">mData":{"id":5491,"type":"article-journal","abstract":"Abstract\n            Increased striatal dopamine synthesis capacity has consistently been reported in patients with schizophrenia. However, the mechanism translating this into behavior and symptoms r</meta:user-defined>
    <meta:user-defined meta:name="ZOTERO_BREF_XorhVnzmJMdU_20">specific changes in dopamine activity","title-short":"The prediction-error hypothesis of schizophrenia","volume":"47","author":[{"family":"Millard","given":"Samuel J."},{"family":"Bearden","given":"Carrie E."},{"family":"Karlsgodt","given":"Katherine H."}</meta:user-defined>
    <meta:user-defined meta:name="ZOTERO_BREF_XorhVnzmJMdU_21">,{"family":"Sharpe","given":"Melissa J."}],"issued":{"date-parts":[["2022",2]]}}},{"id":5493,"uris":["http://zotero.org/users/9264269/items/6GZTNUHW"],"itemData":{"id":5493,"type":"article-journal","container-title":"Schizophrenia Bulletin","DOI":"10.1093</meta:user-defined>
    <meta:user-defined meta:name="ZOTERO_BREF_XorhVnzmJMdU_22">/schbul/sbw045","ISSN":"0586-7614, 1745-1701","issue":"6","journalAbbreviation":"SCHBUL","language":"en","page":"1467-1475","source":"DOI.org (Crossref)","title":"Motivational Context Modulates Prediction Error Response in Schizophrenia","volume":"42","au</meta:user-defined>
    <meta:user-defined meta:name="ZOTERO_BREF_XorhVnzmJMdU_23">thor":[{"family":"Reinen","given":"Jenna M."},{"family":"Van Snellenberg","given":"Jared X."},{"family":"Horga","given":"Guillermo"},{"family":"Abi-Dargham","given":"Anissa"},{"family":"Daw","given":"Nathaniel D."},{"family":"Shohamy","given":"Daphna"}],"</meta:user-defined>
    <meta:user-defined meta:name="ZOTERO_BREF_XorhVnzmJMdU_24">issued":{"date-parts":[["2016",11]]}}}],"schema":"https://github.com/citation-style-language/schema/raw/master/csl-citation.json"}</meta:user-defined>
    <meta:user-defined meta:name="ZOTERO_BREF_XorhVnzmJMdU_3">emains unclear. It has been proposed that heightened striatal dopamine may blunt dopaminergic reward prediction error signaling during reinforcement learning. In this study, we investigated striatal dopamine synthesis capacity, reward prediction errors, a</meta:user-defined>
    <meta:user-defined meta:name="ZOTERO_BREF_XorhVnzmJMdU_4">nd their association in unmedicated schizophrenia patients (n = 19) and healthy controls (n = 23). They took part in FDOPA-PET and underwent functional magnetic resonance imaging (fMRI) scanning, where they performed a reversal-learning paradigm. The grou</meta:user-defined>
    <meta:user-defined meta:name="ZOTERO_BREF_XorhVnzmJMdU_5">ps were compared regarding dopamine synthesis capacity (Kicer), fMRI neural prediction error signals, and the correlation of both. Patients did not differ from controls with respect to striatal Kicer. Taking into account, comorbid alcohol abuse revealed t</meta:user-defined>
    <meta:user-defined meta:name="ZOTERO_BREF_XorhVnzmJMdU_6">hat patients without such abuse showed elevated Kicer in the associative striatum, while those with abuse did not differ from controls. Comparing all patients to controls, patients performed worse during reversal learning and displayed reduced prediction </meta:user-defined>
    <meta:user-defined meta:name="ZOTERO_BREF_XorhVnzmJMdU_7">error signaling in the ventral striatum. In controls, Kicer in the limbic striatum correlated with higher reward prediction error signaling, while there was no significant association in patients. Kicer in the associative striatum correlated with higher p</meta:user-defined>
    <meta:user-defined meta:name="ZOTERO_BREF_XorhVnzmJMdU_8">ositive symptoms and blunted reward prediction error signaling was associated with negative symptoms. Our results suggest a dissociation between striatal subregions and symptom domains, with elevated dopamine synthesis capacity in the associative striatum</meta:user-defined>
    <meta:user-defined meta:name="ZOTERO_BREF_XorhVnzmJMdU_9"> contributing to positive symptoms while blunted prediction error signaling in the ventral striatum related to negative symptoms.","container-title":"Schizophrenia Bulletin","DOI":"10.1093/schbul/sbaa055","ISSN":"0586-7614, 1745-1701","issue":"6","languag</meta:user-defined>
    <meta:user-defined meta:name="ZOTERO_BREF_ZFcbEabjNrdo_1">ZOTERO_ITEM CSL_CITATION {"citationID":"gtEKd1Xt","properties":{"unsorted":false,"formattedCitation":"(15,16)","plainCitation":"(15,16)","noteIndex":0},"citationItems":[{"id":5487,"uris":["http://zotero.org/users/9264269/items/3MSW8GDX"],"itemData":{"id":</meta:user-defined>
    <meta:user-defined meta:name="ZOTERO_BREF_ZFcbEabjNrdo_10">l Cognition","volume":"47","author":[{"family":"Charlton","given":"Colleen E."},{"family":"Hauke","given":"Daniel J."},{"family":"Litvak","given":"Vladimir"},{"family":"Wobmann","given":"Michelle"},{"family":"De Bock","given":"Renate"},{"family":"Andreou"</meta:user-defined>
    <meta:user-defined meta:name="ZOTERO_BREF_ZFcbEabjNrdo_11">,"given":"Christina"},{"family":"Borgwardt","given":"Stefan"},{"family":"Roth","given":"Volker"},{"family":"Diaconescu","given":"Andreea O."}],"issued":{"date-parts":[["2026",1]]}}},{"id":5506,"uris":["http://zotero.org/users/9264269/items/LSWR5NTR"],"ite</meta:user-defined>
    <meta:user-defined meta:name="ZOTERO_BREF_ZFcbEabjNrdo_12">mData":{"id":5506,"type":"article-journal","container-title":"Biological Psychiatry: Cognitive Neuroscience and Neuroimaging","DOI":"10.1016/j.bpsc.2019.10.007","ISSN":"24519022","issue":"2","journalAbbreviation":"Biological Psychiatry: Cognitive Neurosci</meta:user-defined>
    <meta:user-defined meta:name="ZOTERO_BREF_ZFcbEabjNrdo_13">ence and Neuroimaging","language":"en","page":"173-183","source":"DOI.org (Crossref)","title":"Volatility Estimates Increase Choice Switching and Relate to Prefrontal Activity in Schizophrenia","volume":"5","author":[{"family":"Deserno","given":"Lorenz"},</meta:user-defined>
    <meta:user-defined meta:name="ZOTERO_BREF_ZFcbEabjNrdo_14">{"family":"Boehme","given":"Rebecca"},{"family":"Mathys","given":"Christoph"},{"family":"Katthagen","given":"Teresa"},{"family":"Kaminski","given":"Jakob"},{"family":"Stephan","given":"Klaas Enno"},{"family":"Heinz","given":"Andreas"},{"family":"Schlagenh</meta:user-defined>
    <meta:user-defined meta:name="ZOTERO_BREF_ZFcbEabjNrdo_15">auf","given":"Florian"}],"issued":{"date-parts":[["2020",2]]}}}],"schema":"https://github.com/citation-style-language/schema/raw/master/csl-citation.json"}</meta:user-defined>
    <meta:user-defined meta:name="ZOTERO_BREF_ZFcbEabjNrdo_2">5487,"type":"article-journal","abstract":"ABSTRACT\n            Understanding others' intentions amidst uncertainty is critical for effective social interactions, yet the neural mechanisms underlying this process are not fully understood. Here, we combine</meta:user-defined>
    <meta:user-defined meta:name="ZOTERO_BREF_ZFcbEabjNrdo_3">d computational modeling and single‐trial EEG analysis to examine how the brain dynamically updates beliefs about others' intentions in volatile social contexts. A total of 43 healthy volunteers engaged in a deception‐free advice‐taking task, featuring al</meta:user-defined>
    <meta:user-defined meta:name="ZOTERO_BREF_ZFcbEabjNrdo_4">ternating stable and volatile phases that systematically manipulated the reliability of an adviser's intentions. Using the hierarchical Gaussian filter (HGF), a Bayesian model of learning, we quantified trial‐by‐trial updates of participants' beliefs and </meta:user-defined>
    <meta:user-defined meta:name="ZOTERO_BREF_ZFcbEabjNrdo_5">their neural correlates. EEG amplitudes systematically varied according to task volatility, engaging neural regions associated with uncertainty processing such as the fusiform gyrus and posterior cingulate cortex. Sensor‐level EEG analyses confirmed a tem</meta:user-defined>
    <meta:user-defined meta:name="ZOTERO_BREF_ZFcbEabjNrdo_6">poral sequence consistent with the hierarchical computations predicted by the HGF, whereby lower‐level prediction errors were processed earlier than higher‐order volatility‐related signals. Moreover, individual differences in these hierarchical neural pro</meta:user-defined>
    <meta:user-defined meta:name="ZOTERO_BREF_ZFcbEabjNrdo_7">cesses correlated significantly with psychosocial functioning, suggesting that disruptions in Bayesian belief updating may underlie functional impairments in clinical populations. Collectively, our results reveal novel neural evidence for hierarchical Bay</meta:user-defined>
    <meta:user-defined meta:name="ZOTERO_BREF_ZFcbEabjNrdo_8">esian inference during social learning, highlighting its critical role in adaptive social behavior and potential relevance to mental health.","container-title":"Human Brain Mapping","DOI":"10.1002/hbm.70433","ISSN":"1065-9471, 1097-0193","issue":"1","jour</meta:user-defined>
    <meta:user-defined meta:name="ZOTERO_BREF_ZFcbEabjNrdo_9">nalAbbreviation":"Human Brain Mapping","language":"en","page":"e70433","source":"DOI.org (Crossref)","title":"Neural Dynamics of Social Cognition: A Single‐Trial Computational Analysis of Learning Under Uncertainty","title-short":"Neural Dynamics of Socia</meta:user-defined>
    <meta:user-defined meta:name="ZOTERO_BREF_bfPrwM8FoTwo_1">ZOTERO_ITEM CSL_CITATION {"citationID":"b9OU2jfz","properties":{"unsorted":false,"formattedCitation":"(28)","plainCitation":"(28)","noteIndex":0},"citationItems":[{"id":707,"uris":["http://zotero.org/users/9264269/items/62HXSG2Y"],"itemData":{"id":707,"ty</meta:user-defined>
    <meta:user-defined meta:name="ZOTERO_BREF_bfPrwM8FoTwo_10">as E."}],"issued":{"date-parts":[["2017"]]}}}],"schema":"https://github.com/citation-style-language/schema/raw/master/csl-citation.json"}</meta:user-defined>
    <meta:user-defined meta:name="ZOTERO_BREF_bfPrwM8FoTwo_2">pe":"article-journal","abstract":"Social learning is fundamental to human interactions, yet its computational and physiological mechanisms are not well understood. One prominent open question concerns the role of neuromodulatory transmitters. We combined </meta:user-defined>
    <meta:user-defined meta:name="ZOTERO_BREF_bfPrwM8FoTwo_3">fMRI, computational modelling and genetics to address this question in two separate samples (N1/435, N1/447). Participants played a game requiring inference on an adviser's intentions whose motivation to help or mislead changed over time. Our analyses sug</meta:user-defined>
    <meta:user-defined meta:name="ZOTERO_BREF_bfPrwM8FoTwo_4">gest that hierarchically structured belief updates about current advice validity and the adviser's trustworthiness, respectively, depend on different neuromodulatory systems. Low-level prediction errors (PEs) about advice accuracy not only activated regio</meta:user-defined>
    <meta:user-defined meta:name="ZOTERO_BREF_bfPrwM8FoTwo_5">ns known to support 'theory of mind', but also the dopaminergic midbrain. Furthermore, PE responses in ventral striatum were influenced by the Met/Val polymorphismof the Catechol-O-Methyltransferase (COMT) gene. By contrast, high-level PEs ('expected unce</meta:user-defined>
    <meta:user-defined meta:name="ZOTERO_BREF_bfPrwM8FoTwo_6">rtainty') about the adviser's fidelity activated the cholinergic septum. These findings, replicated in both samples, have important implications: They suggest that social learning rests on hierarchically related PEs encoded by midbrain and septum activity</meta:user-defined>
    <meta:user-defined meta:name="ZOTERO_BREF_bfPrwM8FoTwo_7">, respectively, in the same manner as other forms of learning under volatility. Furthermore, these hierarchical PEs may be broadcast by dopaminergic and cholinergic projections to induce plasticity specifically in cortical areas known to represent beliefs</meta:user-defined>
    <meta:user-defined meta:name="ZOTERO_BREF_bfPrwM8FoTwo_8"> about others.","container-title":"Social Cognitive and Affective Neuroscience","DOI":"10.1093/scan/nsw171","ISSN":"17495024","issue":"4","page":"618–634","PMID":"28119508","title":"Hierarchical prediction errors in midbrain and septum during social learn</meta:user-defined>
    <meta:user-defined meta:name="ZOTERO_BREF_bfPrwM8FoTwo_9">ing","volume":"12","author":[{"family":"Diaconescu","given":"Andreea O."},{"family":"Mathys","given":"Christoph"},{"family":"Weber","given":"Lilian A.E."},{"family":"Kasper","given":"Lars"},{"family":"Mauer","given":"Jan"},{"family":"Stephan","given":"Kla</meta:user-defined>
    <meta:user-defined meta:name="ZOTERO_BREF_coUVkWfmnwFz_1">ZOTERO_ITEM CSL_CITATION {"citationID":"YI1cmzpk","properties":{"unsorted":false,"formattedCitation":"(42,43)","plainCitation":"(42,43)","noteIndex":0},"citationItems":[{"id":952,"uris":["http://zotero.org/users/9264269/items/D6F6LLRB"],"itemData":{"id":9</meta:user-defined>
    <meta:user-defined meta:name="ZOTERO_BREF_coUVkWfmnwFz_10">osis","author":[{"family":"Sterzer","given":"Philipp"},{"family":"Adams","given":"Rick A."},{"family":"Fletcher","given":"Paul"},{"family":"Frith","given":"Chris"},{"family":"Lawrie","given":"Stephen M."},{"family":"Muckli","given":"Lars"},{"family":"Petr</meta:user-defined>
    <meta:user-defined meta:name="ZOTERO_BREF_coUVkWfmnwFz_11">ovic","given":"Predrag"},{"family":"Uhlhaas","given":"Peter"},{"family":"Voss","given":"Martin"},{"family":"Corlett","given":"Philip R."}],"issued":{"date-parts":[["2018",11]]}}},{"id":5391,"uris":["http://zotero.org/users/9264269/items/X8VR47I9"],"itemDa</meta:user-defined>
    <meta:user-defined meta:name="ZOTERO_BREF_coUVkWfmnwFz_12">ta":{"id":5391,"type":"article-journal","abstract":"Predictive coding offers a powerful computational framework for understanding brain function and psychiatric disorders at a mechanistic level. This perspective synthesizes advances in computational psych</meta:user-defined>
    <meta:user-defined meta:name="ZOTERO_BREF_coUVkWfmnwFz_13">iatry, proposing that mental disorders can be conceptualized as specific alterations in the brain’s predictive inference machinery. We first outline the theoretical foundations of predictive coding, including Bayesian inference, free-energy minimization, </meta:user-defined>
    <meta:user-defined meta:name="ZOTERO_BREF_coUVkWfmnwFz_14">and neural population dynamics, illustrating how these abstract computational principles map onto specific neural circuits and biophysical mechanisms. We then argue that diverse psychiatric conditions can be understood within this unified framework. Taken</meta:user-defined>
    <meta:user-defined meta:name="ZOTERO_BREF_coUVkWfmnwFz_15"> together, these links between theory, generative models and empirical data suggest a route by which predictive coding might be rendered a testable, modifiable, falsifiable construct within biological psychiatry. Beyond offering conceptual clarity, this f</meta:user-defined>
    <meta:user-defined meta:name="ZOTERO_BREF_coUVkWfmnwFz_16">ramework has significant clinical implications, including the development of mechanistic biomarkers, personalized treatment approaches based on computational phenotypes, and novel therapeutic interventions targeting specific inferential abnormalities. By </meta:user-defined>
    <meta:user-defined meta:name="ZOTERO_BREF_coUVkWfmnwFz_17">grounding psychiatric symptoms in aberrant predictive processes implemented in neural circuitry, this approach promises a more mechanistic understanding of mental disorders and a path toward more targeted, effective interventions.","container-title":"Fron</meta:user-defined>
    <meta:user-defined meta:name="ZOTERO_BREF_coUVkWfmnwFz_18">tiers in Psychiatry","DOI":"10.3389/fpsyt.2025.1713833","ISSN":"1664-0640","journalAbbreviation":"Front. Psychiatry","language":"en","page":"1713833","source":"DOI.org (Crossref)","title":"Predictive coding and neurocomputational psychiatry: a mechanistic</meta:user-defined>
    <meta:user-defined meta:name="ZOTERO_BREF_coUVkWfmnwFz_19"> framework for understanding mental disorders","title-short":"Predictive coding and neurocomputational psychiatry","volume":"16","author":[{"family":"Shaw","given":"Alexander D."},{"family":"Sumner","given":"Rachael L."},{"family":"Berndt","given":"Lioba </meta:user-defined>
    <meta:user-defined meta:name="ZOTERO_BREF_coUVkWfmnwFz_2">52,"type":"document","abstract":"Fueled by developments in computational neuroscience, there has been increasing interest in the underlying neurocomputational mechanisms of psychosis. One successful approach involves predictive coding and Bayesian inferen</meta:user-defined>
    <meta:user-defined meta:name="ZOTERO_BREF_coUVkWfmnwFz_20">C. S."}],"issued":{"date-parts":[["2026",1,7]]}}}],"schema":"https://github.com/citation-style-language/schema/raw/master/csl-citation.json"}</meta:user-defined>
    <meta:user-defined meta:name="ZOTERO_BREF_coUVkWfmnwFz_3">ce. Here, inferences regarding the current state of the world are made by combining prior beliefs with incoming sensory signals. Mismatches between prior beliefs and incoming signals constitute prediction errors that drive new learning. Psychosis has been</meta:user-defined>
    <meta:user-defined meta:name="ZOTERO_BREF_coUVkWfmnwFz_4"> suggested to result from a decreased precision in the encoding of prior beliefs relative to the sensory data, thereby garnering maladaptive inferences. Here, we review the current evidence for aberrant predictive coding and discuss challenges for this ca</meta:user-defined>
    <meta:user-defined meta:name="ZOTERO_BREF_coUVkWfmnwFz_5">nonical predictive coding account of psychosis. For example, hallucinations and delusions may relate to distinct alterations in predictive coding, despite their common co-occurrence. More broadly, some studies implicate weakened prior beliefs in psychosis</meta:user-defined>
    <meta:user-defined meta:name="ZOTERO_BREF_coUVkWfmnwFz_6">, and others find stronger priors. These challenges might be answered with a more nuanced view of predictive coding. Different priors may be specified for different sensory modalities and their integration, and deficits in each modality need not be unifor</meta:user-defined>
    <meta:user-defined meta:name="ZOTERO_BREF_coUVkWfmnwFz_7">m. Furthermore, hierarchical organization may be critical. Altered processes at lower levels of a hierarchy need not be linearly related to processes at higher levels (and vice versa). Finally, canonical theories do not highlight active inference—the proc</meta:user-defined>
    <meta:user-defined meta:name="ZOTERO_BREF_coUVkWfmnwFz_8">ess through which the effects of our actions on our sensations are anticipated and minimized. It is possible that conflicting findings might be reconciled by considering these complexities, portending a framework for psychosis more equipped to deal with i</meta:user-defined>
    <meta:user-defined meta:name="ZOTERO_BREF_coUVkWfmnwFz_9">ts many manifestations.","DOI":"10.1016/j.biopsych.2018.05.015","note":"ISSN: 18732402\nissue: 9\npage: 634–643\ncontainer-title: Biological Psychiatry\nvolume: 84\nPMID: 30007575","publisher":"Elsevier USA","title":"The Predictive Coding Account of Psych</meta:user-defined>
    <meta:user-defined meta:name="ZOTERO_BREF_dey9aJGCzUVt_1">ZOTERO_ITEM CSL_CITATION {"citationID":"H46Y7rdQ","properties":{"unsorted":false,"formattedCitation":"(22\\uc0\\u8211{}25)","plainCitation":"(22–25)","noteIndex":0},"citationItems":[{"id":911,"uris":["http://zotero.org/users/9264269/items/DZWH2SA5"],"item</meta:user-defined>
    <meta:user-defined meta:name="ZOTERO_BREF_dey9aJGCzUVt_10">le":"Dopaminergic Dysfunction in Schizophrenia: Salience Attribution Revisited","title-short":"Dopaminergic Dysfunction in Schizophrenia","volume":"36","author":[{"family":"Heinz","given":"A."},{"family":"Schlagenhauf","given":"F."}],"issued":{"date-parts</meta:user-defined>
    <meta:user-defined meta:name="ZOTERO_BREF_dey9aJGCzUVt_11">":[["2010",5,1]]}}},{"id":4901,"uris":["http://zotero.org/users/9264269/items/TDNS4UJE"],"itemData":{"id":4901,"type":"article-journal","container-title":"American Journal of Psychiatry","DOI":"10.1176/appi.ajp.160.1.13","ISSN":"0002-953X, 1535-7228","iss</meta:user-defined>
    <meta:user-defined meta:name="ZOTERO_BREF_dey9aJGCzUVt_12">ue":"1","journalAbbreviation":"AJP","language":"en","page":"13-23","publisher":"American Psychiatric Association Publishing","source":"Crossref","title":"Psychosis as a State of Aberrant Salience: A Framework Linking Biology, Phenomenology, and Pharmacolo</meta:user-defined>
    <meta:user-defined meta:name="ZOTERO_BREF_dey9aJGCzUVt_13">gy in Schizophrenia","title-short":"Psychosis as a State of Aberrant Salience","volume":"160","author":[{"family":"Kapur","given":"Shitij"}],"issued":{"date-parts":[["2003",1,1]]}}},{"id":5490,"uris":["http://zotero.org/users/9264269/items/YQZ92K6K"],"ite</meta:user-defined>
    <meta:user-defined meta:name="ZOTERO_BREF_dey9aJGCzUVt_14">mData":{"id":5490,"type":"article-journal","container-title":"Nature Neuroscience","DOI":"10.1038/nn.2723","ISSN":"1097-6256, 1546-1726","issue":"2","journalAbbreviation":"Nat Neurosci","language":"en","license":"http://www.springer.com/tdm","page":"154-1</meta:user-defined>
    <meta:user-defined meta:name="ZOTERO_BREF_dey9aJGCzUVt_15">62","source":"DOI.org (Crossref)","title":"From reinforcement learning models to psychiatric and neurological disorders","volume":"14","author":[{"family":"Maia","given":"Tiago V"},{"family":"Frank","given":"Michael J"}],"issued":{"date-parts":[["2011",2]</meta:user-defined>
    <meta:user-defined meta:name="ZOTERO_BREF_dey9aJGCzUVt_16">]}}}],"schema":"https://github.com/citation-style-language/schema/raw/master/csl-citation.json"}</meta:user-defined>
    <meta:user-defined meta:name="ZOTERO_BREF_dey9aJGCzUVt_2">Data":{"id":911,"type":"article-journal","abstract":"Schizophrenia remains a major burden on patients and society. The dopamine hypothesis attempts to explain the pathogenic mechanisms of the disorder, and the neurodevelopmental hypothesis the origins. In</meta:user-defined>
    <meta:user-defined meta:name="ZOTERO_BREF_dey9aJGCzUVt_3"> the past 10 years an alternative, the cognitive model, has gained popularity. However, the first two theories have not been satisfactorily integrated, and the most influential iteration of the cognitive model makes no mention of dopamine, neurodevelopmen</meta:user-defined>
    <meta:user-defined meta:name="ZOTERO_BREF_dey9aJGCzUVt_4">t, or indeed the brain. In this Review we show that developmental alterations secondary to variant genes, early hazards to the brain, and childhood adversity sensitise the dopamine system, and result in excessive presynaptic dopamine synthesis and release</meta:user-defined>
    <meta:user-defined meta:name="ZOTERO_BREF_dey9aJGCzUVt_5">. Social adversity biases the cognitive schema that the individual uses to interpret experiences towards paranoid interpretations. Subsequent stress results in dysregulated dopamine release, causing the misattribution of salience to stimuli, which are the</meta:user-defined>
    <meta:user-defined meta:name="ZOTERO_BREF_dey9aJGCzUVt_6">n misinterpreted by the biased cognitive processes. The resulting paranoia and hallucinations in turn cause further stress, and eventually repeated dopamine dysregulation hardwires the psychotic beliefs. Finally, we consider the implications of this model</meta:user-defined>
    <meta:user-defined meta:name="ZOTERO_BREF_dey9aJGCzUVt_7"> for understanding and treatment of schizophrenia.","container-title":"The Lancet","DOI":"10.1016/S0140-6736(13)62036-X","ISSN":"1474547X","issue":"9929","page":"1677–1687","PMID":"24315522","publisher":"Elsevier Ltd","title":"Schizophrenia: An integrated</meta:user-defined>
    <meta:user-defined meta:name="ZOTERO_BREF_dey9aJGCzUVt_8"> sociodevelopmental-cognitive model","volume":"383","author":[{"family":"Howes","given":"Oliver D."},{"family":"Murray","given":"Robin M."}],"issued":{"date-parts":[["2014"]]}}},{"id":4902,"uris":["http://zotero.org/users/9264269/items/FV6RPVSJ"],"itemDat</meta:user-defined>
    <meta:user-defined meta:name="ZOTERO_BREF_dey9aJGCzUVt_9">a":{"id":4902,"type":"article-journal","container-title":"Schizophrenia Bulletin","DOI":"10.1093/schbul/sbq031","ISSN":"0586-7614, 1745-1701","issue":"3","language":"en","page":"472-485","publisher":"Oxford University Press (OUP)","source":"Crossref","tit</meta:user-defined>
    <meta:user-defined meta:name="ZOTERO_BREF_e3YrVjhHvmLN_1">ZOTERO_ITEM CSL_CITATION {"citationID":"h4YJVO8P","properties":{"unsorted":false,"formattedCitation":"(44\\uc0\\u8211{}46)","plainCitation":"(44–46)","noteIndex":0},"citationItems":[{"id":5508,"uris":["http://zotero.org/users/9264269/items/CRGJHGNZ"],"ite</meta:user-defined>
    <meta:user-defined meta:name="ZOTERO_BREF_e3YrVjhHvmLN_2">mData":{"id":5508,"type":"article-journal","container-title":"Nature","DOI":"10.1038/nature07538","ISSN":"0028-0836, 1476-4687","issue":"7219","journalAbbreviation":"Nature","language":"en","license":"http://www.springer.com/tdm","page":"245-249","source"</meta:user-defined>
    <meta:user-defined meta:name="ZOTERO_BREF_e3YrVjhHvmLN_3">:"DOI.org (Crossref)","title":"Associative learning of social value","volume":"456","author":[{"family":"Behrens","given":"Timothy E. J."},{"family":"Hunt","given":"Laurence T."},{"family":"Woolrich","given":"Mark W."},{"family":"Rushworth","given":"Matth</meta:user-defined>
    <meta:user-defined meta:name="ZOTERO_BREF_e3YrVjhHvmLN_4">ew F. S."}],"issued":{"date-parts":[["2008",11]]}}},{"id":5509,"uris":["http://zotero.org/users/9264269/items/J3NETLEN"],"itemData":{"id":5509,"type":"article-journal","container-title":"Trends in Cognitive Sciences","DOI":"10.1016/S1364-6613(00)01482-0",</meta:user-defined>
    <meta:user-defined meta:name="ZOTERO_BREF_e3YrVjhHvmLN_5">"ISSN":"13646613","issue":"6","journalAbbreviation":"Trends in Cognitive Sciences","language":"en","license":"https://www.elsevier.com/tdm/userlicense/1.0/","page":"223-233","source":"DOI.org (Crossref)","title":"The distributed human neural system for fa</meta:user-defined>
    <meta:user-defined meta:name="ZOTERO_BREF_e3YrVjhHvmLN_6">ce perception","volume":"4","author":[{"family":"Haxby","given":"James V."},{"family":"Hoffman","given":"Elizabeth A."},{"family":"Gobbini","given":"M.Ida"}],"issued":{"date-parts":[["2000",6]]}}},{"id":5510,"uris":["http://zotero.org/users/9264269/items/</meta:user-defined>
    <meta:user-defined meta:name="ZOTERO_BREF_e3YrVjhHvmLN_7">NQRUE3DL"],"itemData":{"id":5510,"type":"article-journal","container-title":"Social Cognitive and Affective Neuroscience","DOI":"10.1093/scan/nsr006","ISSN":"1749-5024, 1749-5016","issue":"3","language":"en","license":"http://creativecommons.org/licenses/</meta:user-defined>
    <meta:user-defined meta:name="ZOTERO_BREF_e3YrVjhHvmLN_8">by-nc/4.0/","page":"274-281","source":"DOI.org (Crossref)","title":"Social and monetary reward learning engage overlapping neural substrates","volume":"7","author":[{"family":"Lin","given":"Alice"},{"family":"Adolphs","given":"Ralph"},{"family":"Rangel","</meta:user-defined>
    <meta:user-defined meta:name="ZOTERO_BREF_e3YrVjhHvmLN_9">given":"Antonio"}],"issued":{"date-parts":[["2012",3,1]]}}}],"schema":"https://github.com/citation-style-language/schema/raw/master/csl-citation.json"}</meta:user-defined>
    <meta:user-defined meta:name="ZOTERO_BREF_fSKIEXo1wgpt_1">ZOTERO_ITEM CSL_CITATION {"citationID":"qLud25Zm","properties":{"unsorted":false,"formattedCitation":"(54\\uc0\\u8211{}57)","plainCitation":"(54–57)","noteIndex":0},"citationItems":[{"id":5475,"uris":["http://zotero.org/users/9264269/items/3UP8K58Q"],"ite</meta:user-defined>
    <meta:user-defined meta:name="ZOTERO_BREF_fSKIEXo1wgpt_10">s":["http://zotero.org/users/9264269/items/KX7CQ4SG"],"itemData":{"id":5471,"type":"article-journal","abstract":"The experience of coupling between motor output and visual feedback is necessary for the development of visuomotor skills and shapes visuomoto</meta:user-defined>
    <meta:user-defined meta:name="ZOTERO_BREF_fSKIEXo1wgpt_11">r integration in visual cortex. Whether these experience-dependent changes of responses in V1 depend on modifications of the local circuit or are the consequence of circuit changes outside of V1 remains unclear. Here, we probed the role of\n              </meta:user-defined>
    <meta:user-defined meta:name="ZOTERO_BREF_fSKIEXo1wgpt_12">N\n              -methyl-\n              d\n              -aspartate (NMDA) receptor-dependent signaling, which is known to be involved in neuronal plasticity, in mouse primary visual cortex (V1) during visuomotor development. We used a local knockout of </meta:user-defined>
    <meta:user-defined meta:name="ZOTERO_BREF_fSKIEXo1wgpt_13">NMDA receptors and a photoactivatable inhibition of CaMKII in V1 during the first visual experience to probe for changes in neuronal activity in V1 as well as the influence on performance in a visuomotor task. We found that a knockout of NMDA receptors be</meta:user-defined>
    <meta:user-defined meta:name="ZOTERO_BREF_fSKIEXo1wgpt_14">fore, but not after, first visuomotor experience reduced responses to unpredictable stimuli, diminished the suppression of predictable feedback in V1, and impaired visuomotor skill learning later in life. Our results demonstrate that NMDA receptor-depende</meta:user-defined>
    <meta:user-defined meta:name="ZOTERO_BREF_fSKIEXo1wgpt_15">nt signaling in V1 is critical during the first visuomotor experience for shaping visuomotor integration and enabling visuomotor skill learning.","container-title":"eLife","DOI":"10.7554/eLife.71476","ISSN":"2050-084X","language":"en","page":"e71476","sou</meta:user-defined>
    <meta:user-defined meta:name="ZOTERO_BREF_fSKIEXo1wgpt_16">rce":"DOI.org (Crossref)","title":"NMDA receptors in visual cortex are necessary for normal visuomotor integration and skill learning","volume":"11","author":[{"family":"Widmer","given":"Felix C"},{"family":"O'Toole","given":"Sean M"},{"family":"Keller","</meta:user-defined>
    <meta:user-defined meta:name="ZOTERO_BREF_fSKIEXo1wgpt_17">given":"Georg B"}],"issued":{"date-parts":[["2022",2,16]]}}},{"id":5473,"uris":["http://zotero.org/users/9264269/items/T2WUABM9"],"itemData":{"id":5473,"type":"article-journal","abstract":"Visual cognition is finely tuned to the elements in a scene but al</meta:user-defined>
    <meta:user-defined meta:name="ZOTERO_BREF_fSKIEXo1wgpt_18">so relies on contextual integration to improve visual detection and discrimination. This integration is impaired in patients with schizophrenia. Studying impairments in contextual integration may lead to biomarkers of schizophrenia, tools to monitor disea</meta:user-defined>
    <meta:user-defined meta:name="ZOTERO_BREF_fSKIEXo1wgpt_19">se progression, and, in animal models, insight into the underlying neural deficits. We developed a nonhuman primate model to test the hypothesis that hypofunction of the N-methyl d-aspartate receptor (NMDAR) impairs contextual integration. Two male rhesus</meta:user-defined>
    <meta:user-defined meta:name="ZOTERO_BREF_fSKIEXo1wgpt_2">mData":{"id":5475,"type":"article-journal","abstract":"N-methyl-d-aspartate (NMDA) receptor (NMDAR) hypofunction plays a key role in pathophysiology of schizophrenia. Since NMDAR hypofunction has also been reported in autism, Alzheimer's disease and cogni</meta:user-defined>
    <meta:user-defined meta:name="ZOTERO_BREF_fSKIEXo1wgpt_20"> macaques (Macaca mulatta) were trained to indicate which of two patterns on the screen had the highest contrast. One of these patterns appeared in isolation, and the other was surrounded by a high-contrast pattern. In humans, this high-contrast context i</meta:user-defined>
    <meta:user-defined meta:name="ZOTERO_BREF_fSKIEXo1wgpt_21">s known to lead to an underestimation of contrast. This so-called Chubb illusion is thought to result from surround suppression, a key contextual integration mechanism. To test the involvement of NMDAR in this process, we compared animals' perceptual bias</meta:user-defined>
    <meta:user-defined meta:name="ZOTERO_BREF_fSKIEXo1wgpt_22"> with and without intramuscular injections of a subanesthetic dose of the NMDAR antagonist ketamine. In the absence of ketamine, the animals reported a Chubb illusion - matching reports in healthy humans. Hence, monkeys - just like humans - perform visual</meta:user-defined>
    <meta:user-defined meta:name="ZOTERO_BREF_fSKIEXo1wgpt_23"> contextual integration. This reaffirms the importance of nonhuman primates to help understand visual cognition. Injection of ketamine significantly reduced the strength of the illusion and thus impaired contextual integration. This supports the hypothesi</meta:user-defined>
    <meta:user-defined meta:name="ZOTERO_BREF_fSKIEXo1wgpt_24">s that NMDAR hypofunction plays a causal role in specific behavioral impairments observed in schizophrenia.","container-title":"Journal of Vision","DOI":"10.1167/jov.21.6.9","ISSN":"1534-7362","issue":"6","journalAbbreviation":"J Vis","language":"eng","pa</meta:user-defined>
    <meta:user-defined meta:name="ZOTERO_BREF_fSKIEXo1wgpt_25">ge":"9","PMID":"34128974","PMCID":"PMC8212430","source":"PubMed","title":"N-methyl d-aspartate receptor hypofunction reduces visual contextual integration","volume":"21","author":[{"family":"Schielke","given":"Alexander"},{"family":"Krekelberg","given":"B</meta:user-defined>
    <meta:user-defined meta:name="ZOTERO_BREF_fSKIEXo1wgpt_26">art"}],"issued":{"date-parts":[["2021",6,7]]}}},{"id":5504,"uris":["http://zotero.org/users/9264269/items/7FTCQJ88"],"itemData":{"id":5504,"type":"article-journal","abstract":"Abstract\n            \n              Recent theories of cortical function cons</meta:user-defined>
    <meta:user-defined meta:name="ZOTERO_BREF_fSKIEXo1wgpt_27">true the brain as performing hierarchical Bayesian inference. According to these theories, the precision of prediction errors plays a key role in learning and decision-making, is controlled by dopamine and contributes to the pathogenesis of psychosis. To </meta:user-defined>
    <meta:user-defined meta:name="ZOTERO_BREF_fSKIEXo1wgpt_28">test these hypotheses, we studied learning with variable outcome-precision in healthy individuals after dopaminergic modulation with a placebo, a dopamine receptor agonist bromocriptine or a dopamine receptor antagonist sulpiride (dopamine study\n        </meta:user-defined>
    <meta:user-defined meta:name="ZOTERO_BREF_fSKIEXo1wgpt_29">      n\n               = 59) and in patients with early psychosis (psychosis study\n              n\n               = 74: 20 participants with first-episode psychosis, 30 healthy controls and 24 participants with at-risk mental state attenuated psychotic</meta:user-defined>
    <meta:user-defined meta:name="ZOTERO_BREF_fSKIEXo1wgpt_3">tive dementia, it is crucial to identify the location, timing, and mechanism of NMDAR hypofunction for schizophrenia for better understanding of disease etiology and for novel therapeutic intervention. In this review, we first discuss the shared underlyin</meta:user-defined>
    <meta:user-defined meta:name="ZOTERO_BREF_fSKIEXo1wgpt_30"> symptoms). Behavioural computational modelling indicated that precision weighting of prediction errors benefits learning in health and is impaired in psychosis. FMRI revealed coding of unsigned prediction errors, which signal surprise, relative to their </meta:user-defined>
    <meta:user-defined meta:name="ZOTERO_BREF_fSKIEXo1wgpt_31">precision in superior frontal cortex (replicated across studies, combined\n              n\n               = 133), which was perturbed by dopaminergic modulation, impaired in psychosis and associated with task performance and schizotypy (schizotypy correl</meta:user-defined>
    <meta:user-defined meta:name="ZOTERO_BREF_fSKIEXo1wgpt_32">ation in 86 healthy volunteers). In contrast to our previous work, we did not observe significant precision-weighting of signed prediction errors, which signal valence, in the midbrain and ventral striatum in the healthy controls (or patients) in the psyc</meta:user-defined>
    <meta:user-defined meta:name="ZOTERO_BREF_fSKIEXo1wgpt_33">hosis study. We conclude that healthy people, but not patients with first-episode psychosis, take into account the precision of the environment when updating beliefs. Precision weighting of cortical prediction error signals is a key mechanism through whic</meta:user-defined>
    <meta:user-defined meta:name="ZOTERO_BREF_fSKIEXo1wgpt_34">h dopamine modulates inference and contributes to the pathogenesis of psychosis.","container-title":"Molecular Psychiatry","DOI":"10.1038/s41380-020-0803-8","ISSN":"1359-4184, 1476-5578","issue":"9","journalAbbreviation":"Mol Psychiatry","language":"en","</meta:user-defined>
    <meta:user-defined meta:name="ZOTERO_BREF_fSKIEXo1wgpt_35">page":"5320-5333","source":"DOI.org (Crossref)","title":"Precision weighting of cortical unsigned prediction error signals benefits learning, is mediated by dopamine, and is impaired in psychosis","volume":"26","author":[{"family":"Haarsma","given":"J."},</meta:user-defined>
    <meta:user-defined meta:name="ZOTERO_BREF_fSKIEXo1wgpt_36">{"family":"Fletcher","given":"P. C."},{"family":"Griffin","given":"J. D."},{"family":"Taverne","given":"H. J."},{"family":"Ziauddeen","given":"H."},{"family":"Spencer","given":"T. J."},{"family":"Miller","given":"C."},{"family":"Katthagen","given":"T."},{</meta:user-defined>
    <meta:user-defined meta:name="ZOTERO_BREF_fSKIEXo1wgpt_37">"family":"Goodyer","given":"I."},{"family":"Diederen","given":"K. M. J."},{"family":"Murray","given":"G. K."}],"issued":{"date-parts":[["2021",9]]}}}],"schema":"https://github.com/citation-style-language/schema/raw/master/csl-citation.json"}</meta:user-defined>
    <meta:user-defined meta:name="ZOTERO_BREF_fSKIEXo1wgpt_4">g mechanisms of NMDAR hypofunction in NMDAR antagonist models and the anti-NMDAR autoantibody model of schizophrenia and suggest that NMDAR hypofunction could occur in GABAergic neurons in both models. Preclinical models using transgenic mice have shown t</meta:user-defined>
    <meta:user-defined meta:name="ZOTERO_BREF_fSKIEXo1wgpt_5">hat NMDAR hypofunction in cortical GABAergic neurons, in particular parvalbumin-positive fast-spiking interneurons, in the early postnatal period confers schizophrenia-related phenotypes. Recent studies suggest that NMDAR hypofunction can also occur in PV</meta:user-defined>
    <meta:user-defined meta:name="ZOTERO_BREF_fSKIEXo1wgpt_6">-positive GABAergic neurons with alterations of NMDAR-associated proteins, such as neuregulin/ErbB4, α7nAChR, and serine racemase. Furthermore, several environmental factors, such as oxidative stress, kynurenic acid and hypoxia, may also potentially elici</meta:user-defined>
    <meta:user-defined meta:name="ZOTERO_BREF_fSKIEXo1wgpt_7">t NMDAR hypofunction in GABAergic neurons in early postnatal period. Altogether, the studies discussed here support a central role for GABAergic abnormalities in the context of NMDAR hypofunction. We conclude by suggesting potential therapeutic strategies</meta:user-defined>
    <meta:user-defined meta:name="ZOTERO_BREF_fSKIEXo1wgpt_8"> to improve the function of fast-spiking neurons.","container-title":"Pharmacology &amp; Therapeutics","DOI":"10.1016/j.pharmthera.2019.107426","ISSN":"1879-016X","journalAbbreviation":"Pharmacol Ther","language":"eng","page":"107426","PMID":"31629007","PMCID</meta:user-defined>
    <meta:user-defined meta:name="ZOTERO_BREF_fSKIEXo1wgpt_9">":"PMC6981256","source":"PubMed","title":"The origin of NMDA receptor hypofunction in schizophrenia","volume":"205","author":[{"family":"Nakazawa","given":"Kazu"},{"family":"Sapkota","given":"Kiran"}],"issued":{"date-parts":[["2020",1]]}}},{"id":5471,"uri</meta:user-defined>
    <meta:user-defined meta:name="ZOTERO_BREF_fUOMCUPHMs8y_1">ZOTERO_ITEM CSL_CITATION {"citationID":"4V7SvGNM","properties":{"unsorted":false,"formattedCitation":"(19,20)","plainCitation":"(19,20)","noteIndex":0},"citationItems":[{"id":5457,"uris":["http://zotero.org/users/9264269/items/5A3ZTGED"],"itemData":{"id":</meta:user-defined>
    <meta:user-defined meta:name="ZOTERO_BREF_fUOMCUPHMs8y_10">}}},{"id":5482,"uris":["http://zotero.org/users/9264269/items/9DUR5YNX"],"itemData":{"id":5482,"type":"article-journal","abstract":"Patients with schizophrenia demonstrate deficits in motivation and learning that suggest impairment in different aspects of</meta:user-defined>
    <meta:user-defined meta:name="ZOTERO_BREF_fUOMCUPHMs8y_11"> the reward system. In this article, we present the results of 8 converging experiments that address subjective reward experience, the impact of rewards on decision making, and the role of rewards in guiding both rapid and long-term learning. All experime</meta:user-defined>
    <meta:user-defined meta:name="ZOTERO_BREF_fUOMCUPHMs8y_12">nts compared the performance of stably treated outpatients with schizophrenia and demographically matched healthy volunteers. Results to date suggest (1) that patients have surprisingly normal experiences of positive emotion when presented with evocative </meta:user-defined>
    <meta:user-defined meta:name="ZOTERO_BREF_fUOMCUPHMs8y_13">stimuli, (2) that patients show reduced correlation, compared with controls, between their own subjective valuation of stimuli and action selection, (3) that decision making in patients appears to be compromised by deficits in the ability to fully represe</meta:user-defined>
    <meta:user-defined meta:name="ZOTERO_BREF_fUOMCUPHMs8y_14">nt the value of different choices and response options, and (4) that rapid learning on the basis of trial-to-trial feedback is severely impaired whereas more gradual learning may be surprisingly preserved in many paradigms. The overall pattern of findings</meta:user-defined>
    <meta:user-defined meta:name="ZOTERO_BREF_fUOMCUPHMs8y_15"> suggests compromises in the orbital and dorsal prefrontal structures that play a critical role in the ability to represent the value of outcomes and plans. In contrast, patients often (but not always) approach normal performance levels on the slow learni</meta:user-defined>
    <meta:user-defined meta:name="ZOTERO_BREF_fUOMCUPHMs8y_16">ng achieved by the integration of reinforcement signals over many trials, thought to be mediated by the basal ganglia.","container-title":"Schizophrenia Bulletin","DOI":"10.1093/schbul/sbn068","ISSN":"0586-7614","issue":"5","journalAbbreviation":"Schizoph</meta:user-defined>
    <meta:user-defined meta:name="ZOTERO_BREF_fUOMCUPHMs8y_17">r Bull","language":"eng","page":"835-847","PMID":"18591195","PMCID":"PMC2518641","source":"PubMed","title":"Reward processing in schizophrenia: a deficit in the representation of value","title-short":"Reward processing in schizophrenia","volume":"34","aut</meta:user-defined>
    <meta:user-defined meta:name="ZOTERO_BREF_fUOMCUPHMs8y_18">hor":[{"family":"Gold","given":"James M."},{"family":"Waltz","given":"James A."},{"family":"Prentice","given":"Kristen J."},{"family":"Morris","given":"Sarah E."},{"family":"Heerey","given":"Erin A."}],"issued":{"date-parts":[["2008",9]]}}}],"schema":"htt</meta:user-defined>
    <meta:user-defined meta:name="ZOTERO_BREF_fUOMCUPHMs8y_19">ps://github.com/citation-style-language/schema/raw/master/csl-citation.json"}</meta:user-defined>
    <meta:user-defined meta:name="ZOTERO_BREF_fUOMCUPHMs8y_2">5457,"type":"chapter","abstract":"Motivational deficits (avolition and anhedonia) have historically been considered important negative symptoms of schizophrenia. Numerous studies have attempted to identify the neural substrates of avolition and anhedonia </meta:user-defined>
    <meta:user-defined meta:name="ZOTERO_BREF_fUOMCUPHMs8y_3">in schizophrenia, but these studies have not produced much agreement. Deficits in various aspects of reinforcement processing have been observed in individuals with schizophrenia, but it is not exactly clear which of these deficits actually engender motiv</meta:user-defined>
    <meta:user-defined meta:name="ZOTERO_BREF_fUOMCUPHMs8y_4">ational impairments in SZ. The purpose of this chapter is to examine how various reinforcement-related behavioral and neural signals could contribute to motivational impairments in both schizophrenia, and psychiatric illness, in general. In particular, we</meta:user-defined>
    <meta:user-defined meta:name="ZOTERO_BREF_fUOMCUPHMs8y_5"> describe different aspects of the concept of expected value (EV), such as the distinction between the EV of stimuli and the expected value of actions, the acquisition of value vs. the estimation of value, and the discounting of value as a consequence of </meta:user-defined>
    <meta:user-defined meta:name="ZOTERO_BREF_fUOMCUPHMs8y_6">time or effort required. We conclude that avolition and anhedonia in SZ are most commonly tied to aberrant signals for expected value, in the context of learning. We discuss implications for further research on the neural substrates of motivational impair</meta:user-defined>
    <meta:user-defined meta:name="ZOTERO_BREF_fUOMCUPHMs8y_7">ments in psychiatric illness.","container-title":"Behavioral Neuroscience of Motivation","DOI":"10.1007/7854_2015_385","ISBN":"978-3-319-26933-7","language":"en","note":"collection-title: Current Topics in Behavioral Neurosciences","page":"375-410","publi</meta:user-defined>
    <meta:user-defined meta:name="ZOTERO_BREF_fUOMCUPHMs8y_8">sher":"Springer International Publishing","publisher-place":"Cham","source":"DOI.org (Crossref)","title":"Motivational Deficits in Schizophrenia and the Representation of Expected Value","URL":"https://link.springer.com/10.1007/7854_2015_385","volume":"27</meta:user-defined>
    <meta:user-defined meta:name="ZOTERO_BREF_fUOMCUPHMs8y_9">","editor":[{"family":"Simpson","given":"Eleanor H."},{"family":"Balsam","given":"Peter D."}],"author":[{"family":"Waltz","given":"James A."},{"family":"Gold","given":"James M."}],"accessed":{"date-parts":[["2026",4,11]]},"issued":{"date-parts":[["2015"]]</meta:user-defined>
    <meta:user-defined meta:name="ZOTERO_BREF_ilr4ifAwYNhQ_1">ZOTERO_ITEM CSL_CITATION {"citationID":"IfWlO6XN","properties":{"unsorted":false,"formattedCitation":"(40)","plainCitation":"(40)","noteIndex":0},"citationItems":[{"id":5497,"uris":["http://zotero.org/users/9264269/items/SSIRE9KF"],"itemData":{"id":5497,"</meta:user-defined>
    <meta:user-defined meta:name="ZOTERO_BREF_ilr4ifAwYNhQ_2">type":"article-journal","container-title":"Computational Psychiatry","DOI":"10.5334/cpsy.95","ISSN":"2379-6227","issue":"1","language":"en","license":"https://creativecommons.org/licenses/by/4.0","page":"1-22","source":"DOI.org (Crossref)","title":"Altere</meta:user-defined>
    <meta:user-defined meta:name="ZOTERO_BREF_ilr4ifAwYNhQ_3">d Perception of Environmental Volatility During Social Learning in Emerging Psychosis","volume":"8","author":[{"family":"Hauke","given":"Daniel J."},{"family":"Wobmann","given":"Michelle"},{"family":"Andreou","given":"Christina"},{"family":"Mackintosh","g</meta:user-defined>
    <meta:user-defined meta:name="ZOTERO_BREF_ilr4ifAwYNhQ_4">iven":"Amatya J."},{"family":"De Bock","given":"Renate"},{"family":"Karvelis","given":"Povilas"},{"family":"Adams","given":"Rick A."},{"family":"Sterzer","given":"Philipp"},{"family":"Borgwardt","given":"Stefan"},{"family":"Roth","given":"Volker"},{"famil</meta:user-defined>
    <meta:user-defined meta:name="ZOTERO_BREF_ilr4ifAwYNhQ_5">y":"Diaconescu","given":"Andreea O."}],"issued":{"date-parts":[["2024",2,7]]}}}],"schema":"https://github.com/citation-style-language/schema/raw/master/csl-citation.json"}</meta:user-defined>
    <meta:user-defined meta:name="ZOTERO_BREF_leQBCp4IP9Vr_1">ZOTERO_ITEM CSL_CITATION {"citationID":"pgSaRNTe","properties":{"unsorted":false,"formattedCitation":"(19,33,34)","plainCitation":"(19,33,34)","noteIndex":0},"citationItems":[{"id":5457,"uris":["http://zotero.org/users/9264269/items/5A3ZTGED"],"itemData":</meta:user-defined>
    <meta:user-defined meta:name="ZOTERO_BREF_leQBCp4IP9Vr_10">015"]]}}},{"id":5507,"uris":["http://zotero.org/users/9264269/items/9XJCYDWU"],"itemData":{"id":5507,"type":"article-journal","container-title":"Biological Psychiatry","DOI":"10.1016/j.biopsych.2006.09.042","ISSN":"00063223","issue":"7","journalAbbreviati</meta:user-defined>
    <meta:user-defined meta:name="ZOTERO_BREF_leQBCp4IP9Vr_11">on":"Biological Psychiatry","language":"en","license":"https://www.elsevier.com/tdm/userlicense/1.0/","page":"756-764","source":"DOI.org (Crossref)","title":"Selective Reinforcement Learning Deficits in Schizophrenia Support Predictions from Computational</meta:user-defined>
    <meta:user-defined meta:name="ZOTERO_BREF_leQBCp4IP9Vr_12"> Models of Striatal-Cortical Dysfunction","volume":"62","author":[{"family":"Waltz","given":"James A."},{"family":"Frank","given":"Michael J."},{"family":"Robinson","given":"Benjamin M."},{"family":"Gold","given":"James M."}],"issued":{"date-parts":[["200</meta:user-defined>
    <meta:user-defined meta:name="ZOTERO_BREF_leQBCp4IP9Vr_13">7",10]]}}},{"id":5495,"uris":["http://zotero.org/users/9264269/items/EXINRS8Q"],"itemData":{"id":5495,"type":"article-journal","abstract":"Introduction\n              Psychotic-like experiences (PLEs) may occur due to changes in weighting prior beliefs an</meta:user-defined>
    <meta:user-defined meta:name="ZOTERO_BREF_leQBCp4IP9Vr_14">d new evidence in the belief updating process. It is still unclear whether the acquisition or integration of stable beliefs is altered, and whether such alteration depends on the level of environmental and belief precision, which reflects the associated u</meta:user-defined>
    <meta:user-defined meta:name="ZOTERO_BREF_leQBCp4IP9Vr_15">ncertainty. This motivated us to investigate uncertainty-related dynamics of belief updating in relation to PLEs using an online study design.\n            \n            \n              Methods\n              \n                We selected a sample (\n    </meta:user-defined>
    <meta:user-defined meta:name="ZOTERO_BREF_leQBCp4IP9Vr_16">            n\n                = 300) of participants who performed a belief updating task with sudden change points and provided self-report questionnaires for PLEs. The task required participants to observe bags dropping from a hidden helicopter, infer </meta:user-defined>
    <meta:user-defined meta:name="ZOTERO_BREF_leQBCp4IP9Vr_17">its position, and dynamically update their belief about the helicopter's position. Participants could optimize performance by adjusting learning rates according to inferred belief uncertainty (inverse prior precision) and the probability of environmental </meta:user-defined>
    <meta:user-defined meta:name="ZOTERO_BREF_leQBCp4IP9Vr_18">change points. We used a normative learning model to examine the relationship between adherence to specific model parameters and PLEs.\n              \n            \n            \n              Results\n              \n                PLEs were linked to </meta:user-defined>
    <meta:user-defined meta:name="ZOTERO_BREF_leQBCp4IP9Vr_19">lower accuracy in tracking the outcome (helicopter location) (β = 0.26 ± 0.11,\n                p\n                = 0.018) and to a smaller increase of belief precision across observations after a change point (β = −0.003 ± 0.0007,\n                p\n  </meta:user-defined>
    <meta:user-defined meta:name="ZOTERO_BREF_leQBCp4IP9Vr_2">{"id":5457,"type":"chapter","abstract":"Motivational deficits (avolition and anhedonia) have historically been considered important negative symptoms of schizophrenia. Numerous studies have attempted to identify the neural substrates of avolition and anhe</meta:user-defined>
    <meta:user-defined meta:name="ZOTERO_BREF_leQBCp4IP9Vr_20">              &amp;lt; 0.001). PLEs were related to slower belief updating when participants encountered large prediction errors (β = −0.03 ± 0.009,\n                p\n                = 0.001). Computational modeling suggested that PLEs were associated with </meta:user-defined>
    <meta:user-defined meta:name="ZOTERO_BREF_leQBCp4IP9Vr_21">reduced overall belief updating in response to prediction errors (β\n                \n                  PE\n                \n                = −1.00 ± 0.45,\n                p\n                = 0.028) and reduced modulation of updating at inferred envi</meta:user-defined>
    <meta:user-defined meta:name="ZOTERO_BREF_leQBCp4IP9Vr_22">ronmental change points (β\n                \n                  CPP\n                \n                = −0.84 ± 0.38,\n                p\n                = 0.023).\n              \n            \n            \n              Discussion\n              We co</meta:user-defined>
    <meta:user-defined meta:name="ZOTERO_BREF_leQBCp4IP9Vr_23">nclude that PLEs are associated with altered dynamics of belief updating. These findings support the idea that the process of balancing prior belief and new evidence, as a function of environmental uncertainty, is altered in PLEs, which may contribute to </meta:user-defined>
    <meta:user-defined meta:name="ZOTERO_BREF_leQBCp4IP9Vr_24">the development of delusions. Specifically, slower learning after large prediction errors in people with high PLEs may result in rigid beliefs. Disregarding environmental change points may limit the flexibility to establish new beliefs in the face of cont</meta:user-defined>
    <meta:user-defined meta:name="ZOTERO_BREF_leQBCp4IP9Vr_25">radictory evidence. The present study fosters a deeper understanding of inferential belief updating mechanisms underlying PLEs.","container-title":"Frontiers in Psychiatry","DOI":"10.3389/fpsyt.2023.1170168","ISSN":"1664-0640","journalAbbreviation":"Front</meta:user-defined>
    <meta:user-defined meta:name="ZOTERO_BREF_leQBCp4IP9Vr_26">. Psychiatry","page":"1170168","source":"DOI.org (Crossref)","title":"Computational mechanisms of belief updating in relation to psychotic-like experiences","volume":"14","author":[{"family":"Fromm","given":"Sophie Pauline"},{"family":"Wieland","given":"L</meta:user-defined>
    <meta:user-defined meta:name="ZOTERO_BREF_leQBCp4IP9Vr_27">ara"},{"family":"Klettke","given":"Arne"},{"family":"Nassar","given":"Matthew R."},{"family":"Katthagen","given":"Teresa"},{"family":"Markett","given":"Sebastian"},{"family":"Heinz","given":"Andreas"},{"family":"Schlagenhauf","given":"Florian"}],"issued":</meta:user-defined>
    <meta:user-defined meta:name="ZOTERO_BREF_leQBCp4IP9Vr_28">{"date-parts":[["2023",5,5]]}}}],"schema":"https://github.com/citation-style-language/schema/raw/master/csl-citation.json"}</meta:user-defined>
    <meta:user-defined meta:name="ZOTERO_BREF_leQBCp4IP9Vr_3">donia in schizophrenia, but these studies have not produced much agreement. Deficits in various aspects of reinforcement processing have been observed in individuals with schizophrenia, but it is not exactly clear which of these deficits actually engender</meta:user-defined>
    <meta:user-defined meta:name="ZOTERO_BREF_leQBCp4IP9Vr_4"> motivational impairments in SZ. The purpose of this chapter is to examine how various reinforcement-related behavioral and neural signals could contribute to motivational impairments in both schizophrenia, and psychiatric illness, in general. In particul</meta:user-defined>
    <meta:user-defined meta:name="ZOTERO_BREF_leQBCp4IP9Vr_5">ar, we describe different aspects of the concept of expected value (EV), such as the distinction between the EV of stimuli and the expected value of actions, the acquisition of value vs. the estimation of value, and the discounting of value as a consequen</meta:user-defined>
    <meta:user-defined meta:name="ZOTERO_BREF_leQBCp4IP9Vr_6">ce of time or effort required. We conclude that avolition and anhedonia in SZ are most commonly tied to aberrant signals for expected value, in the context of learning. We discuss implications for further research on the neural substrates of motivational </meta:user-defined>
    <meta:user-defined meta:name="ZOTERO_BREF_leQBCp4IP9Vr_7">impairments in psychiatric illness.","container-title":"Behavioral Neuroscience of Motivation","DOI":"10.1007/7854_2015_385","ISBN":"978-3-319-26933-7","language":"en","note":"collection-title: Current Topics in Behavioral Neurosciences","page":"375-410",</meta:user-defined>
    <meta:user-defined meta:name="ZOTERO_BREF_leQBCp4IP9Vr_8">"publisher":"Springer International Publishing","publisher-place":"Cham","source":"DOI.org (Crossref)","title":"Motivational Deficits in Schizophrenia and the Representation of Expected Value","URL":"https://link.springer.com/10.1007/7854_2015_385","volum</meta:user-defined>
    <meta:user-defined meta:name="ZOTERO_BREF_leQBCp4IP9Vr_9">e":"27","editor":[{"family":"Simpson","given":"Eleanor H."},{"family":"Balsam","given":"Peter D."}],"author":[{"family":"Waltz","given":"James A."},{"family":"Gold","given":"James M."}],"accessed":{"date-parts":[["2026",4,11]]},"issued":{"date-parts":[["2</meta:user-defined>
    <meta:user-defined meta:name="ZOTERO_BREF_mPBy5hwwx8bO_1">ZOTERO_ITEM CSL_CITATION {"citationID":"OZzKsJQv","properties":{"unsorted":false,"formattedCitation":"(35)","plainCitation":"(35)","noteIndex":0},"citationItems":[{"id":5465,"uris":["http://zotero.org/users/9264269/items/G4F3SZ3P"],"itemData":{"id":5465,"</meta:user-defined>
    <meta:user-defined meta:name="ZOTERO_BREF_mPBy5hwwx8bO_2">type":"article-journal","container-title":"Schizophrenia Bulletin","DOI":"10.1093/schbul/sbq047","ISSN":"0586-7614, 1745-1701","issue":"6","journalAbbreviation":"Schizophrenia Bulletin","language":"en","page":"1295-1304","source":"DOI.org (Crossref)","tit</meta:user-defined>
    <meta:user-defined meta:name="ZOTERO_BREF_mPBy5hwwx8bO_3">le":"Patients With Schizophrenia Demonstrate Inconsistent Preference Judgments for Affective and Nonaffective Stimuli","volume":"37","author":[{"family":"Strauss","given":"G. P."},{"family":"Robinson","given":"B. M."},{"family":"Waltz","given":"J. A."},{"</meta:user-defined>
    <meta:user-defined meta:name="ZOTERO_BREF_mPBy5hwwx8bO_4">family":"Frank","given":"M. J."},{"family":"Kasanova","given":"Z."},{"family":"Herbener","given":"E. S."},{"family":"Gold","given":"J. M."}],"issued":{"date-parts":[["2011",11,1]]}}}],"schema":"https://github.com/citation-style-language/schema/raw/master/</meta:user-defined>
    <meta:user-defined meta:name="ZOTERO_BREF_mPBy5hwwx8bO_5">csl-citation.json"}</meta:user-defined>
    <meta:user-defined meta:name="ZOTERO_BREF_nX78XZfO5rAH_1">ZOTERO_ITEM CSL_CITATION {"citationID":"VJBHJs4r","properties":{"unsorted":false,"formattedCitation":"(50\\uc0\\u8211{}53)","plainCitation":"(50–53)","noteIndex":0},"citationItems":[{"id":30,"uris":["http://zotero.org/users/9264269/items/UD7TB725"],"itemD</meta:user-defined>
    <meta:user-defined meta:name="ZOTERO_BREF_nX78XZfO5rAH_10">stic biomarker to distinguish schizophrenia from other psychiatric disorders. Motivated by the current lack of cross-diagnostic assessments of visual integration performance, the current study used the Jittered Orientation Visual Integration (JOVI) task t</meta:user-defined>
    <meta:user-defined meta:name="ZOTERO_BREF_nX78XZfO5rAH_11">o assess contour integration performance in 85 psychiatric inpatients split into “schizophrenia spectrum” (\n              n\n               = 40) and “other psychiatric disorders” (\n              n\n               = 45), and healthy controls (\n        </meta:user-defined>
    <meta:user-defined meta:name="ZOTERO_BREF_nX78XZfO5rAH_12">      n\n               = 43). The study also examined attentional and working memory ability using the Digit Span Task. JOVI accuracy scores were found to be significantly impaired relative to healthy controls for both the schizophrenia (\n              </meta:user-defined>
    <meta:user-defined meta:name="ZOTERO_BREF_nX78XZfO5rAH_13">p\n               &lt; 0.001) and other psychiatric (\n              p\n               &lt; 0001) patient groups. In line with a transdiagnostic deficit, no differences in JOVI accuracy were seen between the patient groups (\n              p\n               = 0</meta:user-defined>
    <meta:user-defined meta:name="ZOTERO_BREF_nX78XZfO5rAH_14">.97) with reduced JOVI accuracy correlating with worsening psychosis regardless of diagnosis (\n              r\n               = −0.32,\n              p\n               &lt; 0.05). Schizophrenia spectrum patients also showed reduced Digit Span Forward (\n  </meta:user-defined>
    <meta:user-defined meta:name="ZOTERO_BREF_nX78XZfO5rAH_15">            p\n               &lt; 0.001) and Backward scores (\n              p\n               &lt; 0.001). The other psychiatric (\n              p\n               = 0.024) group were similarly found to be impaired in the Digit Span Backward relative to heal</meta:user-defined>
    <meta:user-defined meta:name="ZOTERO_BREF_nX78XZfO5rAH_16">thy controls, however no differences were seen between the patient groups. The findings indicate that contour integration deficits are not specific to schizophrenia spectrum disorders, and instead the neurobiological underpinnings of visual integration im</meta:user-defined>
    <meta:user-defined meta:name="ZOTERO_BREF_nX78XZfO5rAH_17">pairment may share commonality with psychosis more generally. The findings are also consistent with cognitive factors playing a potential role in JOVI performance and highlight the difficulty in teasing apart altered perceptual and cognitive function in p</meta:user-defined>
    <meta:user-defined meta:name="ZOTERO_BREF_nX78XZfO5rAH_18">sychiatric patient groups.","container-title":"Schizophrenia","DOI":"10.1038/s41537-025-00606-0","ISSN":"2754-6993","issue":"1","journalAbbreviation":"Schizophr","language":"en","page":"58","source":"DOI.org (Crossref)","title":"Visual integration deficit</meta:user-defined>
    <meta:user-defined meta:name="ZOTERO_BREF_nX78XZfO5rAH_19">s associated with psychosis are independent of diagnosis","volume":"11","author":[{"family":"Geljic","given":"Mia"},{"family":"Mitchell","given":"Matthew"},{"family":"Stevens","given":"Keri-Anne"},{"family":"Holbrook","given":"Henry"},{"family":"Darke","g</meta:user-defined>
    <meta:user-defined meta:name="ZOTERO_BREF_nX78XZfO5rAH_2">ata":{"id":30,"type":"article-journal","abstract":"Hierarchical perceptual-inference models of psychosis may provide a holistic framework for understanding psychosis in schizophrenia including heterogeneity in clinical presentations. Particularly, hypothe</meta:user-defined>
    <meta:user-defined meta:name="ZOTERO_BREF_nX78XZfO5rAH_20">iven":"Hayley"},{"family":"Goodbourn","given":"Patrick"},{"family":"Damicoucas","given":"Christina"},{"family":"Asghari-Jafarabadi","given":"Mohammad"},{"family":"Sundram","given":"Suresh"},{"family":"Carter","given":"Olivia"}],"issued":{"date-parts":[["2</meta:user-defined>
    <meta:user-defined meta:name="ZOTERO_BREF_nX78XZfO5rAH_21">025",4,9]]}}},{"id":4888,"uris":["http://zotero.org/users/9264269/items/YQG856HU"],"itemData":{"id":4888,"type":"article-journal","container-title":"Journal of Abnormal Psychology","DOI":"10.1037/abn0000494","ISSN":"1939-1846, 0021-843X","issue":"6","lang</meta:user-defined>
    <meta:user-defined meta:name="ZOTERO_BREF_nX78XZfO5rAH_22">uage":"en","license":"http://creativecommons.org/licenses/by/3.0/","page":"581-598","publisher":"American Psychological Association (APA)","source":"Crossref","title":"Influence of prior beliefs on perception in early psychosis: Effects of illness stage a</meta:user-defined>
    <meta:user-defined meta:name="ZOTERO_BREF_nX78XZfO5rAH_23">nd hierarchical level of belief.","title-short":"Influence of prior beliefs on perception in early psychosis","volume":"129","author":[{"family":"Haarsma","given":"Joost"},{"family":"Knolle","given":"Franziska"},{"family":"Griffin","given":"Juliet D."},{"</meta:user-defined>
    <meta:user-defined meta:name="ZOTERO_BREF_nX78XZfO5rAH_24">family":"Taverne","given":"Hilde"},{"family":"Mada","given":"Marius"},{"family":"Goodyer","given":"Ian M."},{"literal":"The Nspn Consortium"},{"family":"Fletcher","given":"Paul C."},{"family":"Murray","given":"Graham K."}],"issued":{"date-parts":[["2020",</meta:user-defined>
    <meta:user-defined meta:name="ZOTERO_BREF_nX78XZfO5rAH_25">8]]}}},{"id":13,"uris":["http://zotero.org/users/9264269/items/4NETIL5P"],"itemData":{"id":13,"type":"article-journal","abstract":"Abstract\n            We computed intrinsic neural timescales (INT) based on resting-state functional magnetic resonance ima</meta:user-defined>
    <meta:user-defined meta:name="ZOTERO_BREF_nX78XZfO5rAH_26">ging (rsfMRI) data of healthy controls (HC) and patients with schizophrenia spectrum disorder (SZ) from three independently collected samples. Five clusters showed decreased INT in SZ compared to HC in all three samples: right occipital fusiform gyrus (rO</meta:user-defined>
    <meta:user-defined meta:name="ZOTERO_BREF_nX78XZfO5rAH_27">FG), left superior occipital gyrus (lSOG), right superior occipital gyrus (rSOG), left lateral occipital cortex (lLOC) and right postcentral gyrus (rPG). In other words, it appears that sensory information in visual and posterior parietal areas is stored </meta:user-defined>
    <meta:user-defined meta:name="ZOTERO_BREF_nX78XZfO5rAH_28">for reduced lengths of time in SZ compared to HC. Finally, we found that symptom severity appears to modulate INT of these areas in SZ.","container-title":"npj Schizophrenia","DOI":"10.1038/s41537-021-00184-x","ISSN":"2334-265X","issue":"1","journalAbbrev</meta:user-defined>
    <meta:user-defined meta:name="ZOTERO_BREF_nX78XZfO5rAH_29">iation":"npj Schizophr","language":"en","page":"55","source":"DOI.org (Crossref)","title":"Reduced intrinsic neural timescales in schizophrenia along posterior parietal and occipital areas","volume":"7","author":[{"family":"Uscătescu","given":"Lavinia Car</meta:user-defined>
    <meta:user-defined meta:name="ZOTERO_BREF_nX78XZfO5rAH_3">sized alterations at distinct levels of the perceptual-inference hierarchy may explain why hallucinations and delusions tend to cluster together yet sometimes manifest in isolation. To test this, we used a recently developed resting-state fMRI measure of </meta:user-defined>
    <meta:user-defined meta:name="ZOTERO_BREF_nX78XZfO5rAH_30">men"},{"family":"Said-Yürekli","given":"Sarah"},{"family":"Kronbichler","given":"Lisa"},{"family":"Stelzig-Schöler","given":"Renate"},{"family":"Pearce","given":"Brandy-Gale"},{"family":"Reich","given":"Luise Antonia"},{"family":"Weber","given":"Stefanie"</meta:user-defined>
    <meta:user-defined meta:name="ZOTERO_BREF_nX78XZfO5rAH_31">},{"family":"Aichhorn","given":"Wolfgang"},{"family":"Kronbichler","given":"Martin"}],"issued":{"date-parts":[["2021",11,22]]}}}],"schema":"https://github.com/citation-style-language/schema/raw/master/csl-citation.json"}</meta:user-defined>
    <meta:user-defined meta:name="ZOTERO_BREF_nX78XZfO5rAH_4">intrinsic neural timescale (INT), which reflects the time window of neural integration and captures hierarchical brain gradients. In analyses examining extended sensory hierarchies that we first validated, we found distinct hierarchical INT alterations fo</meta:user-defined>
    <meta:user-defined meta:name="ZOTERO_BREF_nX78XZfO5rAH_5">r hallucinations versus delusions in the auditory and somatosensory systems, thus providing support for hierarchical perceptual-inference models of psychosis. Simulations using a large-scale biophysical model suggested local elevations of excitation-inhib</meta:user-defined>
    <meta:user-defined meta:name="ZOTERO_BREF_nX78XZfO5rAH_6">ition ratio at different hierarchical levels as a potential mechanism. More generally, our work highlights the robustness and utility of INT for studying hierarchical processes relevant to basic and clinical neuroscience.","container-title":"eLife","DOI":</meta:user-defined>
    <meta:user-defined meta:name="ZOTERO_BREF_nX78XZfO5rAH_7">"10.7554/eLife.56151","ISSN":"2050-084X","language":"en","page":"e56151","source":"DOI.org (Crossref)","title":"Distinct hierarchical alterations of intrinsic neural timescales account for different manifestations of psychosis","volume":"9","author":[{"fa</meta:user-defined>
    <meta:user-defined meta:name="ZOTERO_BREF_nX78XZfO5rAH_8">mily":"Wengler","given":"Kenneth"},{"family":"Goldberg","given":"Andrew T"},{"family":"Chahine","given":"George"},{"family":"Horga","given":"Guillermo"}],"issued":{"date-parts":[["2020",10,27]]}}},{"id":5479,"uris":["http://zotero.org/users/9264269/items/</meta:user-defined>
    <meta:user-defined meta:name="ZOTERO_BREF_nX78XZfO5rAH_9">2AWW3K9M"],"itemData":{"id":5479,"type":"article-journal","abstract":"Abstract\n            \n              Evidence of altered visual processing is well‐established in schizophrenia. Visual integration deficits have been highlighted as a potential diagno</meta:user-defined>
    <meta:user-defined meta:name="ZOTERO_BREF_qkh8s59CqAwJ_1">ZOTERO_ITEM CSL_CITATION {"citationID":"p6GoKy0O","properties":{"unsorted":false,"formattedCitation":"(41)","plainCitation":"(41)","noteIndex":0},"citationItems":[{"id":5470,"uris":["http://zotero.org/users/9264269/items/Q6645SFJ"],"itemData":{"id":5470,"</meta:user-defined>
    <meta:user-defined meta:name="ZOTERO_BREF_qkh8s59CqAwJ_2">type":"article-journal","container-title":"Journal of Neuroscience","DOI":"10.1523/JNEUROSCI.0200-14.2014","ISSN":"0270-6474, 1529-2401","issue":"24","journalAbbreviation":"Journal of Neuroscience","language":"en","page":"8072-8082","source":"DOI.org (Cro</meta:user-defined>
    <meta:user-defined meta:name="ZOTERO_BREF_qkh8s59CqAwJ_3">ssref)","title":"Deficits in Predictive Coding Underlie Hallucinations in Schizophrenia","volume":"34","author":[{"family":"Horga","given":"G."},{"family":"Schatz","given":"K. C."},{"family":"Abi-Dargham","given":"A."},{"family":"Peterson","given":"B. S."</meta:user-defined>
    <meta:user-defined meta:name="ZOTERO_BREF_qkh8s59CqAwJ_4">}],"issued":{"date-parts":[["2014",6,11]]}}}],"schema":"https://github.com/citation-style-language/schema/raw/master/csl-citation.json"}</meta:user-defined>
    <meta:user-defined meta:name="ZOTERO_BREF_t79Ep6ZnIRLZ_1">ZOTERO_ITEM CSL_CITATION {"citationID":"wWqGlGPP","properties":{"unsorted":false,"formattedCitation":"(19,30)","plainCitation":"(19,30)","noteIndex":0},"citationItems":[{"id":5457,"uris":["http://zotero.org/users/9264269/items/5A3ZTGED"],"itemData":{"id":</meta:user-defined>
    <meta:user-defined meta:name="ZOTERO_BREF_t79Ep6ZnIRLZ_10">}}},{"id":5456,"uris":["http://zotero.org/users/9264269/items/37S67Y2R"],"itemData":{"id":5456,"type":"article-journal","abstract":"Aberrant social behavior is a frequent clinical feature of schizophrenia and seems related to the duration and chronicity o</meta:user-defined>
    <meta:user-defined meta:name="ZOTERO_BREF_t79Ep6ZnIRLZ_11">f the disorder. However, there is a paucity of research into the relationship between social behavior and social cognition in patients with severe chronic courses of schizophrenia. Accordingly, the present study sought to examine the appreciation of socia</meta:user-defined>
    <meta:user-defined meta:name="ZOTERO_BREF_t79Ep6ZnIRLZ_12">l rules and norms such as fairness and cooperation in schizophrenia patients who fulﬁlled the criteria for “deﬁcit syndrome”. To this end, we utilized a so-called Ultimatum Game, and a Dictator Game, in which participants had the option to punish others’ </meta:user-defined>
    <meta:user-defined meta:name="ZOTERO_BREF_t79Ep6ZnIRLZ_13">unfair behavior. In addition, “theory of mind”, the ability to appreciate others’ mental states, was also examined using the Mental State Attribution Task (MSAT). Symptom severity was determined using the Positive and Negative Syndrome Scale. While patien</meta:user-defined>
    <meta:user-defined meta:name="ZOTERO_BREF_t79Ep6ZnIRLZ_14">ts with deﬁcit schizophrenia responded to varying levels of fairness in similar ways to controls, the patients accepted fewer fair offers and engaged less in third-party punishment. Impaired theory of mind in patients reduced the latter, but not the forme</meta:user-defined>
    <meta:user-defined meta:name="ZOTERO_BREF_t79Ep6ZnIRLZ_15">r, group difference to non-signiﬁcance. No signiﬁcant correlations emerged between symptom severity and task performance. Together, these ﬁndings suggest that the understanding of others’ minds partly contributes to the appreciation of social rules and no</meta:user-defined>
    <meta:user-defined meta:name="ZOTERO_BREF_t79Ep6ZnIRLZ_16">rms in patients with severe chronic courses of schizophrenia.","container-title":"Frontiers in Psychiatry","DOI":"10.3389/fpsyt.2020.00835","ISSN":"1664-0640","journalAbbreviation":"Front. Psychiatry","language":"en","page":"835","source":"DOI.org (Crossr</meta:user-defined>
    <meta:user-defined meta:name="ZOTERO_BREF_t79Ep6ZnIRLZ_17">ef)","title":"Recognition of Social Rule Violation in “Deficit Syndrome” Schizophrenia: A Study Using Economic Games","title-short":"Recognition of Social Rule Violation in “Deficit Syndrome” Schizophrenia","volume":"11","author":[{"family":"Claassen","gi</meta:user-defined>
    <meta:user-defined meta:name="ZOTERO_BREF_t79Ep6ZnIRLZ_18">ven":"Christian"},{"family":"Langdon","given":"Robyn"},{"family":"Brüne","given":"Martin"}],"issued":{"date-parts":[["2020",8,21]]}}}],"schema":"https://github.com/citation-style-language/schema/raw/master/csl-citation.json"}</meta:user-defined>
    <meta:user-defined meta:name="ZOTERO_BREF_t79Ep6ZnIRLZ_2">5457,"type":"chapter","abstract":"Motivational deficits (avolition and anhedonia) have historically been considered important negative symptoms of schizophrenia. Numerous studies have attempted to identify the neural substrates of avolition and anhedonia </meta:user-defined>
    <meta:user-defined meta:name="ZOTERO_BREF_t79Ep6ZnIRLZ_3">in schizophrenia, but these studies have not produced much agreement. Deficits in various aspects of reinforcement processing have been observed in individuals with schizophrenia, but it is not exactly clear which of these deficits actually engender motiv</meta:user-defined>
    <meta:user-defined meta:name="ZOTERO_BREF_t79Ep6ZnIRLZ_4">ational impairments in SZ. The purpose of this chapter is to examine how various reinforcement-related behavioral and neural signals could contribute to motivational impairments in both schizophrenia, and psychiatric illness, in general. In particular, we</meta:user-defined>
    <meta:user-defined meta:name="ZOTERO_BREF_t79Ep6ZnIRLZ_5"> describe different aspects of the concept of expected value (EV), such as the distinction between the EV of stimuli and the expected value of actions, the acquisition of value vs. the estimation of value, and the discounting of value as a consequence of </meta:user-defined>
    <meta:user-defined meta:name="ZOTERO_BREF_t79Ep6ZnIRLZ_6">time or effort required. We conclude that avolition and anhedonia in SZ are most commonly tied to aberrant signals for expected value, in the context of learning. We discuss implications for further research on the neural substrates of motivational impair</meta:user-defined>
    <meta:user-defined meta:name="ZOTERO_BREF_t79Ep6ZnIRLZ_7">ments in psychiatric illness.","container-title":"Behavioral Neuroscience of Motivation","DOI":"10.1007/7854_2015_385","ISBN":"978-3-319-26933-7","language":"en","note":"collection-title: Current Topics in Behavioral Neurosciences","page":"375-410","publi</meta:user-defined>
    <meta:user-defined meta:name="ZOTERO_BREF_t79Ep6ZnIRLZ_8">sher":"Springer International Publishing","publisher-place":"Cham","source":"DOI.org (Crossref)","title":"Motivational Deficits in Schizophrenia and the Representation of Expected Value","URL":"https://link.springer.com/10.1007/7854_2015_385","volume":"27</meta:user-defined>
    <meta:user-defined meta:name="ZOTERO_BREF_t79Ep6ZnIRLZ_9">","editor":[{"family":"Simpson","given":"Eleanor H."},{"family":"Balsam","given":"Peter D."}],"author":[{"family":"Waltz","given":"James A."},{"family":"Gold","given":"James M."}],"accessed":{"date-parts":[["2026",4,11]]},"issued":{"date-parts":[["2015"]]</meta:user-defined>
    <meta:user-defined meta:name="ZOTERO_BREF_tziNZT7vNfUx_1">ZOTERO_ITEM CSL_CITATION {"citationID":"CiItTBNE","properties":{"unsorted":false,"formattedCitation":"(1\\uc0\\u8211{}6)","plainCitation":"(1–6)","noteIndex":0},"citationItems":[{"id":4863,"uris":["http://zotero.org/users/9264269/items/ZFKLPADL"],"itemDat</meta:user-defined>
    <meta:user-defined meta:name="ZOTERO_BREF_tziNZT7vNfUx_10">"uris":["http://zotero.org/users/9264269/items/AL2JHC8H"],"itemData":{"id":4855,"type":"article-journal","container-title":"Neuropsychopharmacology","DOI":"10.1038/npp.2010.156","ISSN":"0893-133X, 1740-634X","issue":"1","journalAbbreviation":"Neuropsychop</meta:user-defined>
    <meta:user-defined meta:name="ZOTERO_BREF_tziNZT7vNfUx_11">harmacol","language":"en","license":"http://www.springer.com/tdm","note":"number: 1","page":"316-338","source":"DOI.org (Crossref)","title":"Cognitive Control Deficits in Schizophrenia: Mechanisms and Meaning","title-short":"Cognitive Control Deficits in </meta:user-defined>
    <meta:user-defined meta:name="ZOTERO_BREF_tziNZT7vNfUx_12">Schizophrenia","volume":"36","author":[{"family":"Lesh","given":"Tyler A"},{"family":"Niendam","given":"Tara A"},{"family":"Minzenberg","given":"Michael J"},{"family":"Carter","given":"Cameron S"}],"issued":{"date-parts":[["2011",1]]}}},{"id":4771,"uris":</meta:user-defined>
    <meta:user-defined meta:name="ZOTERO_BREF_tziNZT7vNfUx_13">["http://zotero.org/users/9264269/items/Z2AP9JGZ"],"itemData":{"id":4771,"type":"article-journal","container-title":"Clinical Psychopharmacology and Neuroscience","DOI":"10.9758/cpn.2018.16.1.7","ISSN":"1738-1088, 2093-4327","issue":"1","journalAbbreviati</meta:user-defined>
    <meta:user-defined meta:name="ZOTERO_BREF_tziNZT7vNfUx_14">on":"Clin Psychopharmacol Neurosci","language":"en","note":"number: 1","page":"7-17","source":"DOI.org (Crossref)","title":"Cognitive Deficits in Schizophrenia: Understanding the Biological Correlates and Remediation Strategies","title-short":"Cognitive D</meta:user-defined>
    <meta:user-defined meta:name="ZOTERO_BREF_tziNZT7vNfUx_15">eficits in Schizophrenia","volume":"16","author":[{"family":"Tripathi","given":"Adarsh"},{"family":"Kar","given":"Sujita Kumar"},{"family":"Shukla","given":"Rashmi"}],"issued":{"date-parts":[["2018",2,28]]}}},{"id":4916,"uris":["http://zotero.org/users/92</meta:user-defined>
    <meta:user-defined meta:name="ZOTERO_BREF_tziNZT7vNfUx_16">64269/items/KZGVQ46F"],"itemData":{"id":4916,"type":"article-journal","container-title":"Schizophrenia Research","DOI":"10.1016/j.schres.2005.03.001","ISSN":"0920-9964","issue":"2-3","language":"en","license":"https://www.elsevier.com/tdm/userlicense/1.0/</meta:user-defined>
    <meta:user-defined meta:name="ZOTERO_BREF_tziNZT7vNfUx_17">","page":"343-353","publisher":"Elsevier BV","source":"Crossref","title":"Cognitive predictors of psychosocial functioning outcome in schizophrenia: A follow-up study of subjects participating in a rehabilitation program","title-short":"Cognitive predicto</meta:user-defined>
    <meta:user-defined meta:name="ZOTERO_BREF_tziNZT7vNfUx_18">rs of psychosocial functioning outcome in schizophrenia","volume":"77","author":[{"family":"Prouteau","given":"Antoinette"},{"family":"Verdoux","given":"Hélène"},{"family":"Briand","given":"Catherine"},{"family":"Lesage","given":"Alain"},{"family":"Lalond</meta:user-defined>
    <meta:user-defined meta:name="ZOTERO_BREF_tziNZT7vNfUx_19">e","given":"Pierre"},{"family":"Nicole","given":"Luc"},{"family":"Reinharz","given":"Daniel"},{"family":"Stip","given":"Emmanuel"}],"issued":{"date-parts":[["2005",9]]}}},{"id":4869,"uris":["http://zotero.org/users/9264269/items/IBGXY36U"],"itemData":{"id</meta:user-defined>
    <meta:user-defined meta:name="ZOTERO_BREF_tziNZT7vNfUx_2">a":{"id":4863,"type":"article-journal","container-title":"JAMA Psychiatry","DOI":"10.1001/jamapsychiatry.2017.2228","ISSN":"2168-622X","issue":"9","journalAbbreviation":"JAMA Psychiatry","language":"en","note":"number: 9","page":"958","source":"DOI.org (C</meta:user-defined>
    <meta:user-defined meta:name="ZOTERO_BREF_tziNZT7vNfUx_20">":4869,"type":"article-journal","container-title":"Journal of Affective Disorders","DOI":"10.1016/j.jad.2019.05.063","ISSN":"01650327","journalAbbreviation":"Journal of Affective Disorders","language":"en","page":"164-175","source":"DOI.org (Crossref)","t</meta:user-defined>
    <meta:user-defined meta:name="ZOTERO_BREF_tziNZT7vNfUx_21">itle":"Effects of depression and cognitive impairment on quality of life in older adults with schizophrenia spectrum disorder: Results from a multicenter study","title-short":"Effects of depression and cognitive impairment on quality of life in older adul</meta:user-defined>
    <meta:user-defined meta:name="ZOTERO_BREF_tziNZT7vNfUx_22">ts with schizophrenia spectrum disorder","volume":"256","author":[{"family":"Pascal De Raykeer","given":"Rachel"},{"family":"Hoertel","given":"Nicolas"},{"family":"Blanco","given":"Carlos"},{"family":"Lavaud","given":"Pierre"},{"family":"Kaladjian","given</meta:user-defined>
    <meta:user-defined meta:name="ZOTERO_BREF_tziNZT7vNfUx_23">":"Arthur"},{"family":"Blumenstock","given":"Yvonne"},{"family":"Cuervo-Lombard","given":"Christine-Vanessa"},{"family":"Peyre","given":"Hugo"},{"family":"Lemogne","given":"Cédric"},{"family":"Limosin","given":"Frédéric"},{"family":"Adès","given":"J."},{"</meta:user-defined>
    <meta:user-defined meta:name="ZOTERO_BREF_tziNZT7vNfUx_24">family":"Alezrah","given":"C."},{"family":"Amado","given":"I."},{"family":"Amar","given":"G."},{"family":"Andréi","given":"O."},{"family":"Arbault","given":"D."},{"family":"Archambault","given":"G."},{"family":"Aurifeuille","given":"G."},{"family":"Barriè</meta:user-defined>
    <meta:user-defined meta:name="ZOTERO_BREF_tziNZT7vNfUx_25">re","given":"S."},{"family":"Béra-Potelle","given":"C."},{"family":"Blumenstock","given":"Y."},{"family":"Bardou","given":"H."},{"family":"Bareil-Guérin","given":"M."},{"family":"Barrau","given":"P."},{"family":"Barrouillet","given":"C."},{"family":"Baup"</meta:user-defined>
    <meta:user-defined meta:name="ZOTERO_BREF_tziNZT7vNfUx_26">,"given":"E."},{"family":"Bazin","given":"N."},{"family":"Beaufils","given":"B."},{"family":"Ben Ayed","given":"J."},{"family":"Benoit","given":"M."},{"family":"Benyacoub","given":"K."},{"family":"Bichet","given":"T."},{"family":"Blanadet","given":"F."},{</meta:user-defined>
    <meta:user-defined meta:name="ZOTERO_BREF_tziNZT7vNfUx_27">"family":"Blanc","given":"O."},{"family":"Blanc-Comiti","given":"J."},{"family":"Boussiron","given":"D."},{"family":"Bouysse","given":"A.M."},{"family":"Brochard","given":"A."},{"family":"Brochart","given":"O."},{"family":"Bucheron","given":"B."},{"family</meta:user-defined>
    <meta:user-defined meta:name="ZOTERO_BREF_tziNZT7vNfUx_28">":"Cabot","given":"M."},{"family":"Camus","given":"V."},{"family":"Chabannes","given":"J.M."},{"family":"Charlot","given":"V."},{"family":"Charpeaud","given":"T."},{"family":"Clad-Mor","given":"C."},{"family":"Combes","given":"C."},{"family":"Comisu","giv</meta:user-defined>
    <meta:user-defined meta:name="ZOTERO_BREF_tziNZT7vNfUx_29">en":"M."},{"family":"Cordier","given":"B."},{"family":"Costi","given":"F."},{"family":"Courcelles","given":"J.P."},{"family":"Creixell","given":"M."},{"family":"Cuche","given":"H."},{"family":"Cuervo-Lombard","given":"C."},{"family":"Dammak","given":"A."}</meta:user-defined>
    <meta:user-defined meta:name="ZOTERO_BREF_tziNZT7vNfUx_3">rossref)","title":"Association of White Matter With Core Cognitive Deficits in Patients With Schizophrenia","volume":"74","author":[{"family":"Kochunov","given":"Peter"},{"family":"Coyle","given":"Thomas R."},{"family":"Rowland","given":"Laura M."},{"fami</meta:user-defined>
    <meta:user-defined meta:name="ZOTERO_BREF_tziNZT7vNfUx_30">,{"family":"Da Rin","given":"D."},{"family":"Denis","given":"J.B."},{"family":"Denizot","given":"H."},{"family":"Deperthuis","given":"A."},{"family":"Diers","given":"E."},{"family":"Dirami","given":"S."},{"family":"Donneau","given":"D."},{"family":"Dreano</meta:user-defined>
    <meta:user-defined meta:name="ZOTERO_BREF_tziNZT7vNfUx_31">","given":"P."},{"family":"Dubertret","given":"C."},{"family":"Duprat","given":"E."},{"family":"Duthoit","given":"D."},{"family":"Fernandez","given":"C."},{"family":"Fonfrede","given":"P."},{"family":"Freitas","given":"N."},{"family":"Gasnier","given":"P.</meta:user-defined>
    <meta:user-defined meta:name="ZOTERO_BREF_tziNZT7vNfUx_32">"},{"family":"Gauillard","given":"J."},{"family":"Getten","given":"F."},{"family":"Gierski","given":"F."},{"family":"Godart","given":"F."},{"family":"Gourevitch","given":"R."},{"family":"Grassin Delyle","given":"A."},{"family":"Gremion","given":"J."},{"fa</meta:user-defined>
    <meta:user-defined meta:name="ZOTERO_BREF_tziNZT7vNfUx_33">mily":"Gres","given":"H."},{"family":"Griner","given":"V."},{"family":"Guerin-Langlois","given":"C."},{"family":"Guggiari","given":"C."},{"family":"Guillin","given":"O."},{"family":"Hadaoui","given":"H."},{"family":"Haffen","given":"E."},{"family":"Hanon"</meta:user-defined>
    <meta:user-defined meta:name="ZOTERO_BREF_tziNZT7vNfUx_34">,"given":"C."},{"family":"Haouzir","given":"S."},{"family":"Hazif-Thomas","given":"C."},{"family":"Heron","given":"A."},{"family":"Hoertel","given":"N."},{"family":"Hubsch","given":"B."},{"family":"Jalenques","given":"I."},{"family":"Januel","given":"D."}</meta:user-defined>
    <meta:user-defined meta:name="ZOTERO_BREF_tziNZT7vNfUx_35">,{"family":"Kaladjian","given":"A."},{"family":"Karnycheff","given":"J.F."},{"family":"Kebir","given":"O."},{"family":"Krebs","given":"M.O."},{"family":"Lajugie","given":"C."},{"family":"Leboyer","given":"M."},{"family":"Legrand","given":"P."},{"family":"</meta:user-defined>
    <meta:user-defined meta:name="ZOTERO_BREF_tziNZT7vNfUx_36">Lejoyeux","given":"M."},{"family":"Lemaire","given":"V."},{"family":"Leroy","given":"E."},{"family":"Levy-Chavagnat","given":"D."},{"family":"Leydier","given":"A."},{"family":"Liling","given":"C."},{"family":"Limosin","given":"F."},{"family":"Llorca","giv</meta:user-defined>
    <meta:user-defined meta:name="ZOTERO_BREF_tziNZT7vNfUx_37">en":"P.M."},{"family":"Loeffel","given":"P."},{"family":"Louville","given":"P."},{"family":"Lucas Navarro","given":"S."},{"family":"Mages","given":"N."},{"family":"Mahi","given":"M."},{"family":"Maillet","given":"O."},{"family":"Manetti","given":"A."},{"f</meta:user-defined>
    <meta:user-defined meta:name="ZOTERO_BREF_tziNZT7vNfUx_38">amily":"Martelli","given":"C."},{"family":"Martin","given":"P."},{"family":"Masson","given":"M."},{"family":"Maurs-Ferrer","given":"I."},{"family":"Mauvieux","given":"J."},{"family":"Mazmanian","given":"S."},{"family":"Mechin","given":"E."},{"family":"Mek</meta:user-defined>
    <meta:user-defined meta:name="ZOTERO_BREF_tziNZT7vNfUx_39">aoui","given":"L."},{"family":"Meniai","given":"M."},{"family":"Metton","given":"A."},{"family":"Mihoubi","given":"A."},{"family":"Miron","given":"M."},{"family":"Mora","given":"G."},{"family":"Niro Adès","given":"V."},{"family":"Nubukpo","given":"P."},{"</meta:user-defined>
    <meta:user-defined meta:name="ZOTERO_BREF_tziNZT7vNfUx_4">ly":"Jahanshad","given":"Neda"},{"family":"Thompson","given":"Paul M."},{"family":"Kelly","given":"Sinead"},{"family":"Du","given":"Xiaoming"},{"family":"Sampath","given":"Hemalatha"},{"family":"Bruce","given":"Heather"},{"family":"Chiappelli","given":"Jo</meta:user-defined>
    <meta:user-defined meta:name="ZOTERO_BREF_tziNZT7vNfUx_40">family":"Omnes","given":"C."},{"family":"Papin","given":"S."},{"family":"Paris","given":"P."},{"family":"Passerieux","given":"C."},{"family":"Pellerin","given":"J."},{"family":"Perlbarg","given":"J."},{"family":"Perron","given":"S."},{"family":"Petit","gi</meta:user-defined>
    <meta:user-defined meta:name="ZOTERO_BREF_tziNZT7vNfUx_41">ven":"A."},{"family":"Petitjean","given":"F."},{"family":"Portefaix","given":"C."},{"family":"Pringuey","given":"D."},{"family":"Radtchenko","given":"A."},{"family":"Rahiou","given":"H."},{"family":"Raucher-Chéné","given":"D."},{"family":"Rauzy","given":"</meta:user-defined>
    <meta:user-defined meta:name="ZOTERO_BREF_tziNZT7vNfUx_42">A."},{"family":"Reinheimer","given":"L."},{"family":"Renard","given":"M."},{"family":"René","given":"M."},{"family":"Rengade","given":"C.E."},{"family":"Reynaud","given":"P."},{"family":"Robin","given":"D."},{"family":"Rodrigues","given":"C."},{"family":"</meta:user-defined>
    <meta:user-defined meta:name="ZOTERO_BREF_tziNZT7vNfUx_43">Rollet","given":"A."},{"family":"Rondepierre","given":"F."},{"family":"Rousselot","given":"B."},{"family":"Rubingher","given":"S."},{"family":"Saba","given":"G."},{"family":"Salvarelli","given":"J.P."},{"family":"Samuelian","given":"J.C."},{"family":"Scem</meta:user-defined>
    <meta:user-defined meta:name="ZOTERO_BREF_tziNZT7vNfUx_44">ama-Ammar","given":"C."},{"family":"Schurhoff","given":"F."},{"family":"Schuster","given":"J.P."},{"family":"Sechter","given":"D."},{"family":"Segalas","given":"B."},{"family":"Seguret","given":"T."},{"family":"Seigneurie","given":"A.S."},{"family":"Semma</meta:user-defined>
    <meta:user-defined meta:name="ZOTERO_BREF_tziNZT7vNfUx_45">k","given":"A."},{"family":"Slama","given":"F."},{"family":"Taisne","given":"S."},{"family":"Taleb","given":"M."},{"family":"Terra","given":"J.L."},{"family":"Thefenne","given":"D."},{"family":"Tran","given":"E."},{"family":"Tourtauchaux","given":"R."},{"</meta:user-defined>
    <meta:user-defined meta:name="ZOTERO_BREF_tziNZT7vNfUx_46">family":"Vacheron","given":"M.N."},{"family":"Vandel","given":"P."},{"family":"Vanhoucke","given":"V."},{"family":"Venet","given":"E."},{"family":"Verdoux","given":"H."},{"family":"Viala","given":"A."},{"family":"Vidon","given":"G."},{"family":"Vitre","gi</meta:user-defined>
    <meta:user-defined meta:name="ZOTERO_BREF_tziNZT7vNfUx_47">ven":"M."},{"family":"Vurpas","given":"J.L."},{"family":"Wagermez","given":"C."},{"family":"Walter","given":"M."},{"family":"Yon","given":"L."},{"family":"Zendjidjian","given":"X."}],"issued":{"date-parts":[["2019",9]]}}}],"schema":"https://github.com/cit</meta:user-defined>
    <meta:user-defined meta:name="ZOTERO_BREF_tziNZT7vNfUx_48">ation-style-language/schema/raw/master/csl-citation.json"}</meta:user-defined>
    <meta:user-defined meta:name="ZOTERO_BREF_tziNZT7vNfUx_5">shua"},{"family":"Ryan","given":"Meghann"},{"family":"Fisseha","given":"Feven"},{"family":"Savransky","given":"Anya"},{"family":"Adhikari","given":"Bhim"},{"family":"Chen","given":"Shuo"},{"family":"Paciga","given":"Sara A."},{"family":"Whelan","given":"C</meta:user-defined>
    <meta:user-defined meta:name="ZOTERO_BREF_tziNZT7vNfUx_6">hristopher D."},{"family":"Xie","given":"Zhiyong"},{"family":"Hyde","given":"Craig L."},{"family":"Chen","given":"Xing"},{"family":"Schubert","given":"Christian R."},{"family":"O’Donnell","given":"Patricio"},{"family":"Hong","given":"L. Elliot"}],"issued"</meta:user-defined>
    <meta:user-defined meta:name="ZOTERO_BREF_tziNZT7vNfUx_7">:{"date-parts":[["2017",9,1]]}}},{"id":4871,"uris":["http://zotero.org/users/9264269/items/NTVEJGXE"],"itemData":{"id":4871,"type":"article-journal","container-title":"Quality of Life Research","DOI":"10.1007/s11136-015-1019-2","ISSN":"0962-9343, 1573-264</meta:user-defined>
    <meta:user-defined meta:name="ZOTERO_BREF_tziNZT7vNfUx_8">9","issue":"11","journalAbbreviation":"Qual Life Res","language":"en","note":"number: 11","page":"2753-2760","source":"DOI.org (Crossref)","title":"Subjective perceptions of cognitive deficits and their influences on quality of life among patients with sc</meta:user-defined>
    <meta:user-defined meta:name="ZOTERO_BREF_tziNZT7vNfUx_9">hizophrenia","volume":"24","author":[{"family":"Caqueo-Urízar","given":"Alejandra"},{"family":"Boyer","given":"Laurent"},{"family":"Baumstarck","given":"Karine"},{"family":"Gilman","given":"Stephen E."}],"issued":{"date-parts":[["2015",11]]}}},{"id":4855,</meta:user-defined>
    <meta:user-defined meta:name="ZOTERO_BREF_uDZkvLYgb89b_1">ZOTERO_ITEM CSL_CITATION {"citationID":"QUxBFod2","properties":{"unsorted":false,"formattedCitation":"(48,49)","plainCitation":"(48,49)","noteIndex":0},"citationItems":[{"id":5513,"uris":["http://zotero.org/users/9264269/items/2B4TUQKH"],"itemData":{"id":</meta:user-defined>
    <meta:user-defined meta:name="ZOTERO_BREF_uDZkvLYgb89b_2">5513,"type":"article-journal","container-title":"American Journal of Psychiatry","DOI":"10.1176/appi.ajp.158.7.1126","ISSN":"0002-953X, 1535-7228","issue":"7","journalAbbreviation":"AJP","language":"en","page":"1126-1133","source":"DOI.org (Crossref)","ti</meta:user-defined>
    <meta:user-defined meta:name="ZOTERO_BREF_uDZkvLYgb89b_3">tle":"Dysfunction of Early-Stage Visual Processing in Schizophrenia","volume":"158","author":[{"family":"Butler","given":"Pamela D."},{"family":"Schechter","given":"Isaac"},{"family":"Zemon","given":"Vance"},{"family":"Schwartz","given":"Stephen G."},{"fa</meta:user-defined>
    <meta:user-defined meta:name="ZOTERO_BREF_uDZkvLYgb89b_4">mily":"Greenstein","given":"Vivienne C."},{"family":"Gordon","given":"James"},{"family":"Schroeder","given":"Charles E."},{"family":"Javitt","given":"Daniel C."}],"issued":{"date-parts":[["2001",7,1]]}}},{"id":5514,"uris":["http://zotero.org/users/9264269</meta:user-defined>
    <meta:user-defined meta:name="ZOTERO_BREF_uDZkvLYgb89b_5">/items/VKIGQ43K"],"itemData":{"id":5514,"type":"article-journal","container-title":"American Journal of Psychiatry","DOI":"10.1176/appi.ajp.159.12.1992","ISSN":"0002-953X, 1535-7228","issue":"12","journalAbbreviation":"AJP","language":"en","page":"1992-19</meta:user-defined>
    <meta:user-defined meta:name="ZOTERO_BREF_uDZkvLYgb89b_6">99","source":"DOI.org (Crossref)","title":"An fMRI Study of Facial Emotion Processing in Patients With Schizophrenia","volume":"159","author":[{"family":"Gur","given":"Raquel E."},{"family":"McGrath","given":"Claire"},{"family":"Chan","given":"Robin M."},</meta:user-defined>
    <meta:user-defined meta:name="ZOTERO_BREF_uDZkvLYgb89b_7">{"family":"Schroeder","given":"Lee"},{"family":"Turner","given":"Travis"},{"family":"Turetsky","given":"Bruce I."},{"family":"Kohler","given":"Christian"},{"family":"Alsop","given":"David"},{"family":"Maldjian","given":"Joseph"},{"family":"Ragland","given</meta:user-defined>
    <meta:user-defined meta:name="ZOTERO_BREF_uDZkvLYgb89b_8">":"J. Daniel"},{"family":"Gur","given":"Ruben C."}],"issued":{"date-parts":[["2002",12,1]]}}}],"schema":"https://github.com/citation-style-language/schema/raw/master/csl-citation.json"}</meta:user-defined>
    <meta:user-defined meta:name="ZOTERO_BREF_v7XhDHRgUi2T_1">ZOTERO_ITEM CSL_CITATION {"citationID":"RSy2YdtZ","properties":{"unsorted":false,"formattedCitation":"(17,18)","plainCitation":"(17,18)","noteIndex":0},"citationItems":[{"id":5489,"uris":["http://zotero.org/users/9264269/items/PPNAIBFP"],"itemData":{"id":</meta:user-defined>
    <meta:user-defined meta:name="ZOTERO_BREF_v7XhDHRgUi2T_10">schema":"https://github.com/citation-style-language/schema/raw/master/csl-citation.json"}</meta:user-defined>
    <meta:user-defined meta:name="ZOTERO_BREF_v7XhDHRgUi2T_2">5489,"type":"article-journal","abstract":"A number of recent advances have been achieved in the study of midbrain dopaminergic neurons. Understanding these advances and how they relate to one another requires a deep understanding of the computational mode</meta:user-defined>
    <meta:user-defined meta:name="ZOTERO_BREF_v7XhDHRgUi2T_3">ls that serve as an explanatory framework and guide ongoing experimental inquiry. This intertwining of theory and experiment now suggests very clearly that the phasic activity of the midbrain dopamine neurons provides a global mechanism for synaptic modif</meta:user-defined>
    <meta:user-defined meta:name="ZOTERO_BREF_v7XhDHRgUi2T_4">ication. These synaptic modifications, in turn, provide the mechanistic underpinning for a specific class of reinforcement learning mechanisms that now seem to underlie much of human and animal behavior. This review describes both the critical empirical f</meta:user-defined>
    <meta:user-defined meta:name="ZOTERO_BREF_v7XhDHRgUi2T_5">indings that are at the root of this conclusion and the fantastic theoretical advances from which this conclusion is drawn.","container-title":"Proceedings of the National Academy of Sciences","DOI":"10.1073/pnas.1014269108","ISSN":"0027-8424, 1091-6490",</meta:user-defined>
    <meta:user-defined meta:name="ZOTERO_BREF_v7XhDHRgUi2T_6">"issue":"supplement_3","journalAbbreviation":"Proc. Natl. Acad. Sci. U.S.A.","language":"en","page":"15647-15654","source":"DOI.org (Crossref)","title":"Understanding dopamine and reinforcement learning: The dopamine reward prediction error hypothesis","t</meta:user-defined>
    <meta:user-defined meta:name="ZOTERO_BREF_v7XhDHRgUi2T_7">itle-short":"Understanding dopamine and reinforcement learning","volume":"108","author":[{"family":"Glimcher","given":"Paul W."}],"issued":{"date-parts":[["2011",9,13]]}}},{"id":1594,"uris":["http://zotero.org/users/9264269/items/8JSX7JPN"],"itemData":{"i</meta:user-defined>
    <meta:user-defined meta:name="ZOTERO_BREF_v7XhDHRgUi2T_8">d":1594,"type":"article-journal","container-title":"Nature Neuroscience","DOI":"10.1038/nn.4238","ISSN":"1097-6256, 1546-1726","issue":"3","journalAbbreviation":"Nat Neurosci","language":"en","page":"404-413","source":"DOI.org (Crossref)","title":"Computa</meta:user-defined>
    <meta:user-defined meta:name="ZOTERO_BREF_v7XhDHRgUi2T_9">tional psychiatry as a bridge from neuroscience to clinical applications","volume":"19","author":[{"family":"Huys","given":"Quentin J M"},{"family":"Maia","given":"Tiago V"},{"family":"Frank","given":"Michael J"}],"issued":{"date-parts":[["2016",3]]}}}],"</meta:user-defined>
    <meta:user-defined meta:name="ZOTERO_BREF_yLEBg2tSihNx_1">ZOTERO_ITEM CSL_CITATION {"citationID":"XqG23uMc","properties":{"unsorted":false,"formattedCitation":"(21)","plainCitation":"(21)","noteIndex":0},"citationItems":[{"id":4766,"uris":["http://zotero.org/users/9264269/items/PYRUBP32"],"itemData":{"id":4766,"</meta:user-defined>
    <meta:user-defined meta:name="ZOTERO_BREF_yLEBg2tSihNx_2">type":"article-journal","container-title":"Brain","DOI":"10.1093/brain/awt076","ISSN":"0006-8950, 1460-2156","issue":"6","language":"en","note":"number: 6","page":"1968-1975","source":"DOI.org (Crossref)","title":"Trust versus paranoia: abnormal response </meta:user-defined>
    <meta:user-defined meta:name="ZOTERO_BREF_yLEBg2tSihNx_3">to social reward in psychotic illness","title-short":"Trust versus paranoia","volume":"136","author":[{"family":"Gromann","given":"Paula M"},{"family":"Heslenfeld","given":"Dirk J"},{"family":"Fett","given":"Anne-Kathrin"},{"family":"Joyce","given":"Dan W</meta:user-defined>
    <meta:user-defined meta:name="ZOTERO_BREF_yLEBg2tSihNx_4">"},{"family":"Shergill","given":"Sukhi S"},{"family":"Krabbendam","given":"Lydia"}],"issued":{"date-parts":[["2013",6,1]]}}}],"schema":"https://github.com/citation-style-language/schema/raw/master/csl-citation.json"}</meta:user-defined>
    <meta:user-defined meta:name="ZOTERO_PREF_1">&lt;data data-version="3" zotero-version="9.0.4"&gt;&lt;session id="TwQXLpGC"/&gt;&lt;style id="http://www.zotero.org/styles/biological-psychiatry" hasBibliography="1" bibliographyStyleHasBeenSet="1"/&gt;&lt;prefs&gt;&lt;pref name="fieldType" value="Bookmark"/&gt;&lt;/prefs&gt;&lt;/data&gt;</meta:user-defined>
    <meta:document-statistic meta:page-count="17" meta:paragraph-count="95" meta:word-count="7115" meta:character-count="47579" meta:row-count="337" meta:non-whitespace-character-count="40559"/>
  </office:meta>
</office:document-meta>
</file>

<file path=Object 1/content.xml><?xml version="1.0" encoding="utf-8"?>
<math xmlns="http://www.w3.org/1998/Math/MathML">
  <mrow>
    <mo>(</mo>
    <mrow>
      <mi>α</mi>
    </mrow>
    <mo/>
  </mrow>
</math>
</file>

<file path=Object 10/content.xml><?xml version="1.0" encoding="utf-8"?>
<math xmlns="http://www.w3.org/1998/Math/MathML">
  <mi>β</mi>
</math>
</file>

<file path=Object 11/content.xml><?xml version="1.0" encoding="utf-8"?>
<math xmlns="http://www.w3.org/1998/Math/MathML">
  <mi>τ</mi>
</math>
</file>

<file path=Object 12/content.xml><?xml version="1.0" encoding="utf-8"?>
<math xmlns="http://www.w3.org/1998/Math/MathML">
  <mi>τ</mi>
</math>
</file>

<file path=Object 13/content.xml><?xml version="1.0" encoding="utf-8"?>
<math xmlns="http://www.w3.org/1998/Math/MathML">
  <mi>α</mi>
</math>
</file>

<file path=Object 14/content.xml><?xml version="1.0" encoding="utf-8"?>
<math xmlns="http://www.w3.org/1998/Math/MathML">
  <mrow>
    <mo>|</mo>
    <mrow>
      <mi>P</mi>
      <mi>E</mi>
    </mrow>
    <mo>|</mo>
  </mrow>
</math>
</file>

<file path=Object 15/content.xml><?xml version="1.0" encoding="utf-8"?>
<math xmlns="http://www.w3.org/1998/Math/MathML">
  <msub>
    <mrow>
      <mrow>
        <mo>|</mo>
        <mrow>
          <mi>P</mi>
          <mi>E</mi>
        </mrow>
        <mo>|</mo>
      </mrow>
    </mrow>
    <mrow>
      <mi>i</mi>
      <mi>j</mi>
    </mrow>
  </msub>
  <mtext>=</mtext>
  <msub>
    <mrow>
      <mi>β</mi>
    </mrow>
    <mrow>
      <mn>0</mn>
    </mrow>
  </msub>
  <mtext>+</mtext>
  <msub>
    <mrow>
      <mi>β</mi>
    </mrow>
    <mrow>
      <mn>1</mn>
    </mrow>
  </msub>
  <mrow>
    <mo>(</mo>
    <mrow>
      <mi>G</mi>
      <mi>r</mi>
      <mi>o</mi>
      <mi>u</mi>
      <msub>
        <mrow>
          <mi>p</mi>
        </mrow>
        <mrow>
          <mi>i</mi>
        </mrow>
      </msub>
    </mrow>
    <mo>)</mo>
  </mrow>
  <mtext>+</mtext>
  <msub>
    <mrow>
      <mi>β</mi>
    </mrow>
    <mrow>
      <mn>2</mn>
    </mrow>
  </msub>
  <mrow>
    <mo>(</mo>
    <mrow>
      <mi>B</mi>
      <mi>l</mi>
      <mi>o</mi>
      <mi>c</mi>
      <msub>
        <mrow>
          <mi>k</mi>
        </mrow>
        <mrow>
          <mi>i</mi>
          <mi>j</mi>
        </mrow>
      </msub>
    </mrow>
    <mo>)</mo>
  </mrow>
  <mtext>+</mtext>
  <msub>
    <mrow>
      <mi>β</mi>
    </mrow>
    <mrow>
      <mn>3</mn>
    </mrow>
  </msub>
  <mrow>
    <mo>(</mo>
    <mrow>
      <mi>G</mi>
      <mi>r</mi>
      <mi>o</mi>
      <mi>u</mi>
      <msub>
        <mrow>
          <mi>p</mi>
        </mrow>
        <mrow>
          <mi>i</mi>
        </mrow>
      </msub>
      <mo>×</mo>
      <mi>B</mi>
      <mi>l</mi>
      <mi>o</mi>
      <mi>c</mi>
      <msub>
        <mrow>
          <mi>k</mi>
        </mrow>
        <mrow>
          <mi>i</mi>
          <mi>j</mi>
        </mrow>
      </msub>
    </mrow>
    <mo>)</mo>
  </mrow>
  <mtext>+</mtext>
  <msub>
    <mrow>
      <mi>β</mi>
    </mrow>
    <mrow>
      <mn>4</mn>
    </mrow>
  </msub>
  <mrow>
    <mo>(</mo>
    <mrow>
      <mi>S</mi>
      <mi>e</mi>
      <msub>
        <mrow>
          <mi>x</mi>
        </mrow>
        <mrow>
          <mi>i</mi>
        </mrow>
      </msub>
    </mrow>
    <mo>)</mo>
  </mrow>
  <mtext>+</mtext>
  <msub>
    <mrow>
      <mi>β</mi>
    </mrow>
    <mrow>
      <mn>5</mn>
    </mrow>
  </msub>
  <mrow>
    <mo>(</mo>
    <mrow>
      <mi>A</mi>
      <mi>g</mi>
      <msub>
        <mrow>
          <mi>e</mi>
        </mrow>
        <mrow>
          <mi>i</mi>
        </mrow>
      </msub>
    </mrow>
    <mo>)</mo>
  </mrow>
  <mtext>+</mtext>
  <msub>
    <mrow>
      <mi>u</mi>
    </mrow>
    <mrow>
      <mn>0</mn>
      <mi>i</mi>
    </mrow>
  </msub>
  <mtext>+</mtext>
  <msub>
    <mrow>
      <mi>ϵ</mi>
    </mrow>
    <mrow>
      <mi>i</mi>
      <mi>j</mi>
    </mrow>
  </msub>
</math>
</file>

<file path=Object 16/content.xml><?xml version="1.0" encoding="utf-8"?>
<math xmlns="http://www.w3.org/1998/Math/MathML">
  <mrow>
    <mo>(</mo>
    <mrow>
      <mi>j</mi>
    </mrow>
    <mo>)</mo>
  </mrow>
</math>
</file>

<file path=Object 17/content.xml><?xml version="1.0" encoding="utf-8"?>
<math xmlns="http://www.w3.org/1998/Math/MathML">
  <mrow>
    <mo>|</mo>
    <mrow>
      <mi>P</mi>
      <mi>E</mi>
    </mrow>
    <mo>|</mo>
  </mrow>
</math>
</file>

<file path=Object 18/content.xml><?xml version="1.0" encoding="utf-8"?>
<math xmlns="http://www.w3.org/1998/Math/MathML">
  <mi>i</mi>
</math>
</file>

<file path=Object 19/content.xml><?xml version="1.0" encoding="utf-8"?>
<math xmlns="http://www.w3.org/1998/Math/MathML">
  <mi>G</mi>
  <mi>r</mi>
  <mi>o</mi>
  <mi>u</mi>
  <mi>p</mi>
</math>
</file>

<file path=Object 2/content.xml><?xml version="1.0" encoding="utf-8"?>
<math xmlns="http://www.w3.org/1998/Math/MathML">
  <mi>β</mi>
</math>
</file>

<file path=Object 20/content.xml><?xml version="1.0" encoding="utf-8"?>
<math xmlns="http://www.w3.org/1998/Math/MathML">
  <mi>B</mi>
  <mi>l</mi>
  <mi>o</mi>
  <mi>c</mi>
  <mi>k</mi>
</math>
</file>

<file path=Object 21/content.xml><?xml version="1.0" encoding="utf-8"?>
<math xmlns="http://www.w3.org/1998/Math/MathML">
  <mi>G</mi>
  <mi>r</mi>
  <mi>o</mi>
  <mi>u</mi>
  <mi>p</mi>
  <mo>×</mo>
  <mi>B</mi>
  <mi>l</mi>
  <mi>o</mi>
  <mi>c</mi>
  <mi>k</mi>
</math>
</file>

<file path=Object 22/content.xml><?xml version="1.0" encoding="utf-8"?>
<math xmlns="http://www.w3.org/1998/Math/MathML">
  <mi>S</mi>
  <mi>e</mi>
  <mi>x</mi>
</math>
</file>

<file path=Object 23/content.xml><?xml version="1.0" encoding="utf-8"?>
<math xmlns="http://www.w3.org/1998/Math/MathML">
  <mi>A</mi>
  <mi>g</mi>
  <mi>e</mi>
</math>
</file>

<file path=Object 24/content.xml><?xml version="1.0" encoding="utf-8"?>
<math xmlns="http://www.w3.org/1998/Math/MathML">
  <mrow>
    <mo/>
    <mrow>
      <msub>
        <mrow>
          <mi>u</mi>
        </mrow>
        <mrow>
          <mn>0</mn>
          <mi>i</mi>
        </mrow>
      </msub>
    </mrow>
    <mo>)</mo>
  </mrow>
</math>
</file>

<file path=Object 25/content.xml><?xml version="1.0" encoding="utf-8"?>
<math xmlns="http://www.w3.org/1998/Math/MathML">
  <mrow>
    <mo>|</mo>
    <mrow>
      <mi>P</mi>
      <mi>E</mi>
    </mrow>
    <mo>|</mo>
  </mrow>
</math>
</file>

<file path=Object 26/content.xml><?xml version="1.0" encoding="utf-8"?>
<math xmlns="http://www.w3.org/1998/Math/MathML">
  <mi>p</mi>
  <mo>&lt;</mo>
  <mn>0.001</mn>
</math>
</file>

<file path=Object 27/content.xml><?xml version="1.0" encoding="utf-8"?>
<math xmlns="http://www.w3.org/1998/Math/MathML">
  <msub>
    <mrow>
      <mi>p</mi>
    </mrow>
    <mrow>
      <mi>F</mi>
      <mi>W</mi>
      <mi>E</mi>
    </mrow>
  </msub>
  <mo>&lt;</mo>
  <mn>0.05</mn>
</math>
</file>

<file path=Object 28/content.xml><?xml version="1.0" encoding="utf-8"?>
<math xmlns="http://www.w3.org/1998/Math/MathML">
  <mi>M</mi>
</math>
</file>

<file path=Object 29/content.xml><?xml version="1.0" encoding="utf-8"?>
<math xmlns="http://www.w3.org/1998/Math/MathML">
  <mi>S</mi>
  <mi>D</mi>
  <mo>;</mo>
  <mo>±</mo>
</math>
</file>

<file path=Object 3/content.xml><?xml version="1.0" encoding="utf-8"?>
<math xmlns="http://www.w3.org/1998/Math/MathML">
  <mi>α</mi>
</math>
</file>

<file path=Object 30/content.xml><?xml version="1.0" encoding="utf-8"?>
<math xmlns="http://www.w3.org/1998/Math/MathML">
  <msub>
    <mrow>
      <mi>M</mi>
    </mrow>
    <mrow>
      <mi>S</mi>
      <mi>Z</mi>
    </mrow>
  </msub>
  <mo>=</mo>
  <mn>0.53</mn>
  <mo>±</mo>
  <mn>0.39</mn>
</math>
</file>

<file path=Object 31/content.xml><?xml version="1.0" encoding="utf-8"?>
<math xmlns="http://www.w3.org/1998/Math/MathML">
  <msub>
    <mrow>
      <mi>M</mi>
    </mrow>
    <mrow>
      <mi>H</mi>
      <mi>C</mi>
    </mrow>
  </msub>
  <mo>=</mo>
  <mn>0.74</mn>
  <mo>±</mo>
  <mn>0.20</mn>
  <mo>,</mo>
  <mi>p</mi>
  <mtext>=</mtext>
  <mo>.</mo>
  <mn>0004</mn>
</math>
</file>

<file path=Object 32/content.xml><?xml version="1.0" encoding="utf-8"?>
<math xmlns="http://www.w3.org/1998/Math/MathML">
  <msub>
    <mrow>
      <mi>M</mi>
    </mrow>
    <mrow>
      <mi>S</mi>
      <mi>Z</mi>
    </mrow>
  </msub>
  <mo>=</mo>
  <mn>0.47</mn>
  <mo>±</mo>
  <mn>0.32</mn>
  <mo>,</mo>
  <msub>
    <mrow>
      <mi>M</mi>
    </mrow>
    <mrow>
      <mi>H</mi>
      <mi>C</mi>
    </mrow>
  </msub>
  <mo>=</mo>
  <mn>0.42</mn>
  <mo>±</mo>
  <mn>0.25</mn>
  <mo>,</mo>
  <mi>p</mi>
  <mtext>=</mtext>
  <mo>.</mo>
  <mn>407</mn>
</math>
</file>

<file path=Object 33/content.xml><?xml version="1.0" encoding="utf-8"?>
<math xmlns="http://www.w3.org/1998/Math/MathML">
  <mi>β</mi>
</math>
</file>

<file path=Object 34/content.xml><?xml version="1.0" encoding="utf-8"?>
<math xmlns="http://www.w3.org/1998/Math/MathML">
  <mi>M</mi>
  <mi>e</mi>
  <mi>d</mi>
  <mi>i</mi>
  <mi>a</mi>
  <msub>
    <mrow>
      <mi>n</mi>
    </mrow>
    <mrow>
      <mi>H</mi>
      <mi>C</mi>
    </mrow>
  </msub>
  <mo>=</mo>
  <mn>3.577</mn>
  <mo>,</mo>
  <mi>M</mi>
  <mi>e</mi>
  <mi>d</mi>
  <mi>i</mi>
  <mi>a</mi>
  <msub>
    <mrow>
      <mi>n</mi>
    </mrow>
    <mrow>
      <mi>S</mi>
      <mi>Z</mi>
    </mrow>
  </msub>
  <mo>=</mo>
  <mn>3.499</mn>
  <mo>;</mo>
  <mi>p</mi>
  <mo>=</mo>
  <mo>.</mo>
  <mn>069</mn>
</math>
</file>

<file path=Object 35/content.xml><?xml version="1.0" encoding="utf-8"?>
<math xmlns="http://www.w3.org/1998/Math/MathML">
  <mi>M</mi>
  <mi>e</mi>
  <mi>d</mi>
  <mi>i</mi>
  <mi>a</mi>
  <mi>n</mi>
  <mo>=</mo>
  <mn>0.047</mn>
</math>
</file>

<file path=Object 36/content.xml><?xml version="1.0" encoding="utf-8"?>
<math xmlns="http://www.w3.org/1998/Math/MathML">
  <mi>M</mi>
  <mi>e</mi>
  <mi>d</mi>
  <mi>i</mi>
  <mi>a</mi>
  <mi>n</mi>
  <mo>=</mo>
  <mn>0.178</mn>
  <mo>;</mo>
  <mi>p</mi>
  <mo>=</mo>
  <mn>0.0070</mn>
</math>
</file>

<file path=Object 37/content.xml><?xml version="1.0" encoding="utf-8"?>
<math xmlns="http://www.w3.org/1998/Math/MathML">
  <msub>
    <mrow>
      <mi>α</mi>
    </mrow>
    <mrow>
      <mi>c</mi>
      <mi>o</mi>
      <mi>r</mi>
      <mi>r</mi>
      <mi>e</mi>
      <mi>c</mi>
      <mi>t</mi>
      <mi>e</mi>
      <mi>d</mi>
    </mrow>
  </msub>
  <mo>=</mo>
  <mn>0.0166</mn>
</math>
</file>

<file path=Object 38/content.xml><?xml version="1.0" encoding="utf-8"?>
<math xmlns="http://www.w3.org/1998/Math/MathML">
  <mi>M</mi>
  <mi>e</mi>
  <mi>d</mi>
  <mi>i</mi>
  <mi>a</mi>
  <mi>n</mi>
  <mo>=</mo>
  <mn>0.051</mn>
</math>
</file>

<file path=Object 39/content.xml><?xml version="1.0" encoding="utf-8"?>
<math xmlns="http://www.w3.org/1998/Math/MathML">
  <mi>M</mi>
  <mi>e</mi>
  <mi>d</mi>
  <mi>i</mi>
  <mi>a</mi>
  <mi>n</mi>
  <mo>=</mo>
  <mn>0.197</mn>
  <mo>,</mo>
  <mi>p</mi>
  <mo>=</mo>
  <mo>.</mo>
  <mn>010</mn>
</math>
</file>

<file path=Object 4/content.xml><?xml version="1.0" encoding="utf-8"?>
<math xmlns="http://www.w3.org/1998/Math/MathML">
  <mi>β</mi>
</math>
</file>

<file path=Object 40/content.xml><?xml version="1.0" encoding="utf-8"?>
<math xmlns="http://www.w3.org/1998/Math/MathML">
  <mi>α</mi>
</math>
</file>

<file path=Object 41/content.xml><?xml version="1.0" encoding="utf-8"?>
<math xmlns="http://www.w3.org/1998/Math/MathML">
  <mrow>
    <mo>(</mo>
    <mrow>
      <mi>β</mi>
    </mrow>
    <mo/>
  </mrow>
</math>
</file>

<file path=Object 42/content.xml><?xml version="1.0" encoding="utf-8"?>
<math xmlns="http://www.w3.org/1998/Math/MathML">
  <mi>β</mi>
</math>
</file>

<file path=Object 43/content.xml><?xml version="1.0" encoding="utf-8"?>
<math xmlns="http://www.w3.org/1998/Math/MathML">
  <mi>F</mi>
  <mo>(</mo>
  <mn>2,24</mn>
  <mo>)</mo>
  <mo>=</mo>
  <mn>1.82</mn>
  <mo>,</mo>
  <mi>p</mi>
  <mo>=</mo>
  <mo>.</mo>
  <mn>184</mn>
</math>
</file>

<file path=Object 44/content.xml><?xml version="1.0" encoding="utf-8"?>
<math xmlns="http://www.w3.org/1998/Math/MathML">
  <mi>F</mi>
  <mo>(</mo>
  <mn>2,24</mn>
  <mo>)</mo>
  <mo>=</mo>
  <mn>4.02</mn>
  <mo>,</mo>
  <mi>p</mi>
  <mo>=</mo>
  <mo>.</mo>
  <mn>031</mn>
  <mo>,</mo>
  <msup>
    <mrow>
      <mi>R</mi>
    </mrow>
    <mrow>
      <mn>2</mn>
    </mrow>
  </msup>
  <mo>=</mo>
  <mn>0.25</mn>
</math>
</file>

<file path=Object 45/content.xml><?xml version="1.0" encoding="utf-8"?>
<math xmlns="http://www.w3.org/1998/Math/MathML">
  <mrow>
    <mo>(</mo>
    <mrow>
      <mi>t</mi>
      <mtext>=-</mtext>
      <mn>2.51</mn>
      <mo>,</mo>
      <mi>p</mi>
      <mtext>=</mtext>
      <mo>.</mo>
      <mn>019</mn>
    </mrow>
    <mo>)</mo>
  </mrow>
</math>
</file>

<file path=Object 46/content.xml><?xml version="1.0" encoding="utf-8"?>
<math xmlns="http://www.w3.org/1998/Math/MathML">
  <mi>α</mi>
</math>
</file>

<file path=Object 47/content.xml><?xml version="1.0" encoding="utf-8"?>
<math xmlns="http://www.w3.org/1998/Math/MathML">
  <mi>β</mi>
</math>
</file>

<file path=Object 48/content.xml><?xml version="1.0" encoding="utf-8"?>
<math xmlns="http://www.w3.org/1998/Math/MathML">
  <mi>p</mi>
  <mo>=</mo>
  <mo>.</mo>
  <mn>868</mn>
</math>
</file>

<file path=Object 49/content.xml><?xml version="1.0" encoding="utf-8"?>
<math xmlns="http://www.w3.org/1998/Math/MathML">
  <mi>p</mi>
  <mo>=</mo>
  <mo>.</mo>
  <mn>852</mn>
</math>
</file>

<file path=Object 5/content.xml><?xml version="1.0" encoding="utf-8"?>
<math xmlns="http://www.w3.org/1998/Math/MathML">
  <mi>α</mi>
</math>
</file>

<file path=Object 50/content.xml><?xml version="1.0" encoding="utf-8"?>
<math xmlns="http://www.w3.org/1998/Math/MathML">
  <mi>C</mi>
  <mi>o</mi>
  <mi>e</mi>
  <mi>f</mi>
  <mi>f</mi>
  <mi>i</mi>
  <mi>c</mi>
  <mi>i</mi>
  <mi>e</mi>
  <mi>n</mi>
  <mi>t</mi>
  <mo>=</mo>
  <mn>0.032</mn>
  <mo>,</mo>
  <mi>z</mi>
  <mo>=</mo>
  <mn>2.74</mn>
  <mo>,</mo>
  <mi>p</mi>
  <mo>=</mo>
  <mo>.</mo>
  <mn>006</mn>
</math>
</file>

<file path=Object 51/content.xml><?xml version="1.0" encoding="utf-8"?>
<math xmlns="http://www.w3.org/1998/Math/MathML">
  <mi>C</mi>
  <mi>o</mi>
  <mi>e</mi>
  <mi>f</mi>
  <mi>f</mi>
  <mi>i</mi>
  <mi>c</mi>
  <mi>i</mi>
  <mi>e</mi>
  <mi>n</mi>
  <mi>t</mi>
  <mo>=</mo>
  <mo>-</mo>
  <mn>0.039</mn>
  <mo>,</mo>
  <mi>z</mi>
  <mo>=</mo>
  <mo>-</mo>
  <mn>2.07</mn>
  <mo>,</mo>
  <mi>p</mi>
  <mo>=</mo>
  <mo>.</mo>
  <mn>038</mn>
</math>
</file>

<file path=Object 52/content.xml><?xml version="1.0" encoding="utf-8"?>
<math xmlns="http://www.w3.org/1998/Math/MathML">
  <mi>p</mi>
  <mo>=</mo>
  <mo>.</mo>
  <mn>878</mn>
</math>
</file>

<file path=Object 53/content.xml><?xml version="1.0" encoding="utf-8"?>
<math xmlns="http://www.w3.org/1998/Math/MathML">
  <mi>p</mi>
  <mo>&lt;</mo>
  <mn>0.001</mn>
</math>
</file>

<file path=Object 54/content.xml><?xml version="1.0" encoding="utf-8"?>
<math xmlns="http://www.w3.org/1998/Math/MathML">
  <mi>p</mi>
  <mo>&lt;</mo>
  <mn>0.05</mn>
</math>
</file>

<file path=Object 55/content.xml><?xml version="1.0" encoding="utf-8"?>
<math xmlns="http://www.w3.org/1998/Math/MathML">
  <mi>k</mi>
  <mo>=</mo>
  <mn>1833</mn>
</math>
</file>

<file path=Object 56/content.xml><?xml version="1.0" encoding="utf-8"?>
<math xmlns="http://www.w3.org/1998/Math/MathML">
  <mi>Z</mi>
  <mo>=</mo>
  <mn>5.82</mn>
</math>
</file>

<file path=Object 57/content.xml><?xml version="1.0" encoding="utf-8"?>
<math xmlns="http://www.w3.org/1998/Math/MathML">
  <msub>
    <mrow>
      <mi>p</mi>
    </mrow>
    <mrow>
      <mi>F</mi>
      <mi>W</mi>
      <mi>E</mi>
    </mrow>
  </msub>
  <mo>=</mo>
  <mn>0.005</mn>
</math>
</file>

<file path=Object 58/content.xml><?xml version="1.0" encoding="utf-8"?>
<math xmlns="http://www.w3.org/1998/Math/MathML">
  <mi>k</mi>
  <mo>=</mo>
  <mn>223</mn>
</math>
</file>

<file path=Object 59/content.xml><?xml version="1.0" encoding="utf-8"?>
<math xmlns="http://www.w3.org/1998/Math/MathML">
  <mi>Z</mi>
  <mo>=</mo>
  <mn>4.73</mn>
</math>
</file>

<file path=Object 6/content.xml><?xml version="1.0" encoding="utf-8"?>
<math xmlns="http://www.w3.org/1998/Math/MathML">
  <mi>β</mi>
</math>
</file>

<file path=Object 60/content.xml><?xml version="1.0" encoding="utf-8"?>
<math xmlns="http://www.w3.org/1998/Math/MathML">
  <msub>
    <mrow>
      <mi>p</mi>
    </mrow>
    <mrow>
      <mi>F</mi>
      <mi>W</mi>
      <mi>E</mi>
    </mrow>
  </msub>
  <mo>=</mo>
  <mn>0.016</mn>
</math>
</file>

<file path=Object 61/content.xml><?xml version="1.0" encoding="utf-8"?>
<math xmlns="http://www.w3.org/1998/Math/MathML">
  <mi>Z</mi>
  <mo>=</mo>
  <mn>4.54</mn>
</math>
</file>

<file path=Object 62/content.xml><?xml version="1.0" encoding="utf-8"?>
<math xmlns="http://www.w3.org/1998/Math/MathML">
  <msub>
    <mrow>
      <mi>p</mi>
    </mrow>
    <mrow>
      <mi>F</mi>
      <mi>W</mi>
      <mi>E</mi>
    </mrow>
  </msub>
  <mo>=</mo>
  <mn>0.036</mn>
</math>
</file>

<file path=Object 63/content.xml><?xml version="1.0" encoding="utf-8"?>
<math xmlns="http://www.w3.org/1998/Math/MathML">
  <mi>k</mi>
  <mo>=</mo>
  <mn>177</mn>
</math>
</file>

<file path=Object 64/content.xml><?xml version="1.0" encoding="utf-8"?>
<math xmlns="http://www.w3.org/1998/Math/MathML">
  <mi>Z</mi>
  <mo>=</mo>
  <mn>4.83</mn>
</math>
</file>

<file path=Object 65/content.xml><?xml version="1.0" encoding="utf-8"?>
<math xmlns="http://www.w3.org/1998/Math/MathML">
  <msub>
    <mrow>
      <mi>p</mi>
    </mrow>
    <mrow>
      <mi>F</mi>
      <mi>W</mi>
      <mi>E</mi>
    </mrow>
  </msub>
</math>
</file>

<file path=Object 66/content.xml><?xml version="1.0" encoding="utf-8"?>
<math xmlns="http://www.w3.org/1998/Math/MathML">
  <mi>p</mi>
  <mo>&lt;</mo>
  <mn>0.001</mn>
</math>
</file>

<file path=Object 67/content.xml><?xml version="1.0" encoding="utf-8"?>
<math xmlns="http://www.w3.org/1998/Math/MathML">
  <mi>p</mi>
  <mo>&lt;</mo>
  <mn>0.05</mn>
</math>
</file>

<file path=Object 68/content.xml><?xml version="1.0" encoding="utf-8"?>
<math xmlns="http://www.w3.org/1998/Math/MathML">
  <mi>α</mi>
</math>
</file>

<file path=Object 69/content.xml><?xml version="1.0" encoding="utf-8"?>
<math xmlns="http://www.w3.org/1998/Math/MathML">
  <mi>β</mi>
</math>
</file>

<file path=Object 7/content.xml><?xml version="1.0" encoding="utf-8"?>
<math xmlns="http://www.w3.org/1998/Math/MathML">
  <mi>t</mi>
  <mtext>+</mtext>
  <mn>1</mn>
</math>
</file>

<file path=Object 70/content.xml><?xml version="1.0" encoding="utf-8"?>
<math xmlns="http://www.w3.org/1998/Math/MathML">
  <mi>β</mi>
</math>
</file>

<file path=Object 71/content.xml><?xml version="1.0" encoding="utf-8"?>
<math xmlns="http://www.w3.org/1998/Math/MathML">
  <mi>β</mi>
</math>
</file>

<file path=Object 72/content.xml><?xml version="1.0" encoding="utf-8"?>
<math xmlns="http://www.w3.org/1998/Math/MathML">
  <mi>β</mi>
</math>
</file>

<file path=Object 73/content.xml><?xml version="1.0" encoding="utf-8"?>
<math xmlns="http://www.w3.org/1998/Math/MathML">
  <mi>β</mi>
</math>
</file>

<file path=Object 74/content.xml><?xml version="1.0" encoding="utf-8"?>
<math xmlns="http://www.w3.org/1998/Math/MathML">
  <mrow>
    <mo>(</mo>
    <mrow>
      <mi>α</mi>
    </mrow>
    <mo>)</mo>
  </mrow>
</math>
</file>

<file path=Object 75/content.xml><?xml version="1.0" encoding="utf-8"?>
<math xmlns="http://www.w3.org/1998/Math/MathML">
  <mrow>
    <mo>(</mo>
    <mrow>
      <mi>β</mi>
    </mrow>
    <mo>)</mo>
  </mrow>
</math>
</file>

<file path=Object 8/content.xml><?xml version="1.0" encoding="utf-8"?>
<math xmlns="http://www.w3.org/1998/Math/MathML">
  <mi>t</mi>
  <mo>.</mo>
</math>
</file>

<file path=Object 9/content.xml><?xml version="1.0" encoding="utf-8"?>
<math xmlns="http://www.w3.org/1998/Math/MathML">
  <mi>α</mi>
</math>
</file>